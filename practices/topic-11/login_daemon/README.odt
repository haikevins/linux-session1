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5pt solid #000000"/>
    </style:style>
    <style:style style:name="P1" style:family="paragraph" style:parent-style-name="Standard">
      <style:text-properties style:font-name="Liberation Serif" fo:font-size="13pt" style:font-size-asian="13pt" style:font-size-complex="13pt"/>
    </style:style>
    <style:style style:name="P2" style:family="paragraph" style:parent-style-name="Standard">
      <style:text-properties style:font-name="Liberation Serif" fo:font-size="13pt" officeooo:paragraph-rsid="000e27c2" style:font-size-asian="13pt" style:font-size-complex="13pt"/>
    </style:style>
    <style:style style:name="P3" style:family="paragraph" style:parent-style-name="Table_20_Contents">
      <style:text-properties style:font-name="Liberation Serif" fo:font-size="13pt" style:font-size-asian="13pt" style:font-size-complex="13pt"/>
    </style:style>
    <style:style style:name="P4" style:family="paragraph" style:parent-style-name="Standard">
      <style:text-properties style:font-name="Liberation Serif" fo:font-size="13pt" officeooo:paragraph-rsid="000f503e" style:font-size-asian="13pt" style:font-size-complex="13pt"/>
    </style:style>
    <style:style style:name="T1" style:family="text">
      <style:text-properties officeooo:rsid="001075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D SERVICE</text:p>
      <text:p text:style-name="P4">sudo nano /etc/systemd/system/login-daemon.service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">[Unit]</text:p>
            <text:p text:style-name="P2">Description=Login Monitor Daemon</text:p>
            <text:p text:style-name="P2">After=multi-user.target</text:p>
            <text:p text:style-name="P2"/>
            <text:p text:style-name="P2">[Service]</text:p>
            <text:p text:style-name="P2">Type=<text:span text:style-name="T1">forking</text:span></text:p>
            <text:p text:style-name="P2">ExecStart=/usr/local/bin/login_daemon</text:p>
            <text:p text:style-name="P2">Restart=on-failure</text:p>
            <text:p text:style-name="P2">RestartSec=3</text:p>
            <text:p text:style-name="P2"/>
            <text:p text:style-name="P2">[Install]</text:p>
            <text:p text:style-name="P2">WantedBy=multi-user.target</text:p>
          </table:table-cell>
        </table:table-row>
      </table:table>
      <text:p text:style-name="P1"/>
      <text:p text:style-name="P1">BUILD + INSTALL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gcc login_daemon.c -o login_daemon</text:p>
            <text:p text:style-name="P3">sudo mv login_daemon /usr/local/bin/</text:p>
            <text:p text:style-name="P3">sudo chmod +x /usr/local/bin/login_daemon</text:p>
          </table:table-cell>
        </table:table-row>
      </table:table>
      <text:p text:style-name="P1"/>
      <text:p text:style-name="P1">ENABLE SERVICE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sudo systemctl daemon-reload</text:p>
            <text:p text:style-name="P3">sudo systemctl enable login-daemon</text:p>
            <text:p text:style-name="P3">sudo systemctl restart login-daemon</text:p>
          </table:table-cell>
        </table:table-row>
      </table:table>
      <text:p text:style-name="P1"/>
      <text:p text:style-name="P1">CHECK STATUS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">systemctl status login-daemon</text:p>
          </table:table-cell>
        </table:table-row>
      </table:table>
      <text:p text:style-name="P1"/>
      <text:p text:style-name="P1">CHECK LOG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">cat /tmp/login_daemon.log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19T15:55:35.414222273</dc:date>
    <meta:editing-duration>PT3M48S</meta:editing-duration>
    <meta:editing-cycles>5</meta:editing-cycles>
    <meta:generator>LibreOffice/24.2.7.2$Linux_X86_64 LibreOffice_project/420$Build-2</meta:generator>
    <meta:document-statistic meta:table-count="5" meta:image-count="0" meta:object-count="0" meta:page-count="1" meta:paragraph-count="24" meta:word-count="54" meta:character-count="561" meta:non-whitespace-character-count="531"/>
  </office:meta>
</office:document-meta>
</file>