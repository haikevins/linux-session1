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1f97f3" style:font-size-asian="11pt" style:font-size-complex="11pt"/>
    </style:style>
    <style:style style:name="T1" style:family="text">
      <style:text-properties officeooo:rsid="002002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→</text:p>
      <text:p text:style-name="P1">-----------------------------------------------------------------------------------------------------------------------------------</text:p>
      <text:p text:style-name="P1">T1: <text:s text:c="2"/>lock ── work ── unlock</text:p>
      <text:p text:style-name="P1">T2: <text:s text:c="7"/>wait ────── lock ── work ── unlock</text:p>
      <text:p text:style-name="P2">T3: <text:s text:c="7"/>wait ───────────────── lock ── work ── unlock</text:p>
      <text:p text:style-name="P2">T4: <text:s text:c="7"/>wait ──────────────────────────── lock ── work ── unlock</text:p>
      <text:p text:style-name="P2">T5: <text:s text:c="7"/>wait ─────────────────────────────────────── lock ── work ── unlock</text:p>
      <text:p text:style-name="P2">Mỗi lần work, biến dùng chung sẽ tăng lên <text:span text:style-name="T1">1 đơn v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10:42:15.318019609</meta:creation-date>
    <dc:date>2026-04-10T10:52:34.560533259</dc:date>
    <meta:editing-duration>PT10M18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3" meta:character-count="462" meta:non-whitespace-character-count="387"/>
  </office:meta>
</office:document-meta>
</file>