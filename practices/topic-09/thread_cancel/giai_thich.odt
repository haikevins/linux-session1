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Text_20_body" style:list-style-name="L2"/>
    <style:style style:name="P3" style:family="paragraph" style:parent-style-name="Text_20_body">
      <style:text-properties fo:font-size="13pt" style:font-size-asian="13pt" style:font-size-complex="13pt"/>
    </style:style>
    <style:style style:name="P4" style:family="paragraph" style:parent-style-name="Text_20_body" style:list-style-name="L2">
      <style:paragraph-properties fo:margin-top="0in" fo:margin-bottom="0in" style:contextual-spacing="false"/>
      <style:text-properties fo:font-size="13pt" style:font-size-asian="13pt" style:font-size-complex="13pt"/>
    </style:style>
    <style:style style:name="T1" style:family="text">
      <style:text-properties officeooo:rsid="0001afd7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thread_cancel(thread_id); gửi yêu cầu dừng thread, nhưng không phải lúc nào thread cùng dừng ngay lập tức. Thread sẽ dừng dựa vào các điểm gọi là cancellation points. Ví dụ:</text:p>
      <text:p text:style-name="P1">sleep()</text:p>
      <text:p text:style-name="P1">read()</text:p>
      <text:p text:style-name="P1">write()</text:p>
      <text:p text:style-name="P1">pthread_testcancel()</text:p>
      <text:p text:style-name="P1"/>
      <text:p text:style-name="P1">void* func(void* arg) {</text:p>
      <text:p text:style-name="P1"><text:s text:c="4"/>while (1) {</text:p>
      <text:p text:style-name="P1"><text:s text:c="8"/>printf("Running...\n");</text:p>
      <text:p text:style-name="P1"><text:s text:c="8"/>sleep(1); // &lt;-- cancellation point</text:p>
      <text:p text:style-name="P1"><text:s text:c="4"/>}</text:p>
      <text:p text:style-name="P1">}</text:p>
      <text:p text:style-name="P1"/>
      <text:p text:style-name="P3">Thread sẽ:</text:p>
      <text:list text:style-name="L2">
        <text:list-item>
          <text:p text:style-name="P4">Không chết ngay </text:p>
        </text:list-item>
        <text:list-item>
          <text:p text:style-name="P2"><text:span text:style-name="T2">Nhưng khi tới </text:span><text:span text:style-name="Source_20_Text"><text:span text:style-name="T2">sleep()</text:span></text:span><text:span text:style-name="T2"> → bị dừng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0T11:43:20.448787200</meta:creation-date>
    <dc:date>2026-04-10T11:46:34.709932505</dc:date>
    <meta:editing-duration>PT3M14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63" meta:character-count="391" meta:non-whitespace-character-count="319"/>
  </office:meta>
</office:document-meta>
</file>