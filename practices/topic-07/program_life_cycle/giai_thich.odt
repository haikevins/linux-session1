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hi bạn chạy chương trình:</text:p>
      <text:p text:style-name="P1"/>
      <text:p text:style-name="P1">C start-up routines (ẩn) chạy trước → chuẩn bị môi trường</text:p>
      <text:p text:style-name="P1"/>
      <text:p text:style-name="P1">→ vào main() → in ra:</text:p>
      <text:p text:style-name="P1"/>
      <text:p text:style-name="P1">Bắt đầu chương trình (main)</text:p>
      <text:p text:style-name="P1">Đang xử lý trong main...</text:p>
      <text:p text:style-name="P1"/>
      <text:p text:style-name="P1">Bạn gọi exit(0) → chương trình không quay lại main nữa</text:p>
      <text:p text:style-name="P1"/>
      <text:p text:style-name="P1">Sau đó hệ thống tự động:</text:p>
      <text:p text:style-name="P1"/>
      <text:p text:style-name="P1">Gọi các exit handler (cleanup2 rồi cleanup1)</text:p>
      <text:p text:style-name="P1">(Lưu ý: chạy theo thứ tự ngược lại với lúc đăng ký)</text:p>
      <text:p text:style-name="P1"/>
      <text:p text:style-name="P1">Thực hiện standard I/O cleanup</text:p>
      <text:p text:style-name="P1">→ đảm bảo mọi printf được in ra hết</text:p>
      <text:p text:style-name="P1"/>
      <text:p text:style-name="P1">Trả quyền điều khiển về kern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29T00:05:48.435068804</dc:date>
    <meta:editing-duration>PT33S</meta:editing-duration>
    <meta:editing-cycles>1</meta:editing-cycles>
    <meta:document-statistic meta:table-count="0" meta:image-count="0" meta:object-count="0" meta:page-count="1" meta:paragraph-count="12" meta:word-count="88" meta:character-count="423" meta:non-whitespace-character-count="347"/>
  </office:meta>
</office:document-meta>
</file>