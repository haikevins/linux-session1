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00000001B63856CD65.png" manifest:media-type="image/png"/>
  <manifest:file-entry manifest:full-path="Pictures/10000000000002DC000001E692ECAEB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5pt solid #000000"/>
    </style:style>
    <style:style style:name="Table26" style:family="table">
      <style:table-properties style:width="6.6931in" table:align="margins"/>
    </style:style>
    <style:style style:name="Table26.A" style:family="table-column">
      <style:table-column-properties style:column-width="6.6931in" style:rel-column-width="65535*"/>
    </style:style>
    <style:style style:name="Table26.A1" style:family="table-cell">
      <style:table-cell-properties fo:padding="0.0382in" fo:border="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5pt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5pt solid #000000"/>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fo:padding="0.0382in" fo:border="0.5pt solid #000000"/>
    </style:style>
    <style:style style:name="Table16" style:family="table">
      <style:table-properties style:width="6.6931in" table:align="margins"/>
    </style:style>
    <style:style style:name="Table16.A" style:family="table-column">
      <style:table-column-properties style:column-width="6.6931in" style:rel-column-width="65535*"/>
    </style:style>
    <style:style style:name="Table16.A1" style:family="table-cell">
      <style:table-cell-properties fo:padding="0.0382in" fo:border="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1" style:family="table-row">
      <style:table-row-properties style:min-row-height="0.3125in"/>
    </style:style>
    <style:style style:name="Table17.A1" style:family="table-cell">
      <style:table-cell-properties fo:padding="0.0382in" fo:border="0.5pt solid #000000"/>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5pt solid #000000"/>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0.5pt solid #000000"/>
    </style:style>
    <style:style style:name="Table20" style:family="table">
      <style:table-properties style:width="6.6931in" table:align="margins"/>
    </style:style>
    <style:style style:name="Table20.A" style:family="table-column">
      <style:table-column-properties style:column-width="6.6931in" style:rel-column-width="65535*"/>
    </style:style>
    <style:style style:name="Table20.A1" style:family="table-cell">
      <style:table-cell-properties fo:padding="0.0382in" fo:border="0.5pt solid #000000"/>
    </style:style>
    <style:style style:name="Table21" style:family="table">
      <style:table-properties style:width="6.6931in" table:align="margins"/>
    </style:style>
    <style:style style:name="Table21.A" style:family="table-column">
      <style:table-column-properties style:column-width="6.6931in" style:rel-column-width="65535*"/>
    </style:style>
    <style:style style:name="Table21.A1" style:family="table-cell">
      <style:table-cell-properties fo:padding="0.0382in" fo:border="0.5pt solid #000000"/>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5pt solid #000000"/>
    </style:style>
    <style:style style:name="Table23" style:family="table">
      <style:table-properties style:width="6.6931in" table:align="margins"/>
    </style:style>
    <style:style style:name="Table23.A" style:family="table-column">
      <style:table-column-properties style:column-width="6.6931in" style:rel-column-width="65535*"/>
    </style:style>
    <style:style style:name="Table23.A1" style:family="table-cell">
      <style:table-cell-properties fo:padding="0.0382in" fo:border="0.5pt solid #000000"/>
    </style:style>
    <style:style style:name="Table24" style:family="table">
      <style:table-properties style:width="6.6931in" table:align="margins"/>
    </style:style>
    <style:style style:name="Table24.A" style:family="table-column">
      <style:table-column-properties style:column-width="6.6931in" style:rel-column-width="65535*"/>
    </style:style>
    <style:style style:name="Table24.A1" style:family="table-cell">
      <style:table-cell-properties fo:padding="0.0382in" fo:border="0.5pt solid #000000"/>
    </style:style>
    <style:style style:name="Table25" style:family="table">
      <style:table-properties style:width="6.6931in" table:align="margins"/>
    </style:style>
    <style:style style:name="Table25.A" style:family="table-column">
      <style:table-column-properties style:column-width="6.6931in" style:rel-column-width="65535*"/>
    </style:style>
    <style:style style:name="Table25.A1" style:family="table-cell">
      <style:table-cell-properties fo:padding="0.0382in" fo:border="0.5pt solid #000000"/>
    </style:style>
    <style:style style:name="P1" style:family="paragraph" style:parent-style-name="Text_20_body">
      <style:paragraph-properties fo:margin-top="0.0598in" fo:margin-bottom="0.0598in" style:contextual-spacing="false" fo:line-height="100%" fo:text-align="justify" style:justify-single-word="false" style:register-true="true"/>
      <style:text-properties officeooo:paragraph-rsid="009a6c05"/>
    </style:style>
    <style:style style:name="P2" style:family="paragraph" style:parent-style-name="Text_20_body">
      <style:paragraph-properties fo:margin-top="0.0598in" fo:margin-bottom="0.0598in" style:contextual-spacing="false" fo:line-height="100%" fo:text-align="justify" style:justify-single-word="false" style:register-true="true"/>
    </style:style>
    <style:style style:name="P3" style:family="paragraph" style:parent-style-name="Text_20_body">
      <style:paragraph-properties fo:margin-top="0.0598in" fo:margin-bottom="0.0598in" style:contextual-spacing="false" fo:line-height="100%" style:register-true="true"/>
      <style:text-properties officeooo:paragraph-rsid="009a6c05"/>
    </style:style>
    <style:style style:name="P4" style:family="paragraph" style:parent-style-name="Heading_20_2">
      <style:paragraph-properties fo:margin-top="0.0598in" fo:margin-bottom="0.0598in" style:contextual-spacing="false" fo:line-height="100%" style:register-true="true"/>
      <style:text-properties officeooo:paragraph-rsid="009a6c05"/>
    </style:style>
    <style:style style:name="P5" style:family="paragraph" style:parent-style-name="Text_20_body">
      <style:paragraph-properties fo:margin-top="0.0598in" fo:margin-bottom="0.0598in" style:contextual-spacing="false" fo:line-height="100%" style:register-true="true"/>
      <style:text-properties officeooo:paragraph-rsid="00b586af"/>
    </style:style>
    <style:style style:name="P6" style:family="paragraph" style:parent-style-name="Text_20_body">
      <style:paragraph-properties fo:margin-top="0.0598in" fo:margin-bottom="0.0598in" style:contextual-spacing="false" fo:line-height="100%" style:register-true="true"/>
      <style:text-properties officeooo:paragraph-rsid="00ab1e9a"/>
    </style:style>
    <style:style style:name="P7" style:family="paragraph" style:parent-style-name="Text_20_body">
      <style:paragraph-properties fo:margin-top="0.0598in" fo:margin-bottom="0.0598in" style:contextual-spacing="false" fo:line-height="100%" style:register-true="true"/>
      <style:text-properties officeooo:paragraph-rsid="00d3e33d"/>
    </style:style>
    <style:style style:name="P8" style:family="paragraph" style:parent-style-name="Text_20_body">
      <style:paragraph-properties fo:margin-top="0.0598in" fo:margin-bottom="0.0598in" style:contextual-spacing="false" fo:line-height="100%" style:register-true="true"/>
      <style:text-properties officeooo:paragraph-rsid="00d76f9f"/>
    </style:style>
    <style:style style:name="P9" style:family="paragraph" style:parent-style-name="Text_20_body">
      <style:paragraph-properties fo:margin-top="0.0598in" fo:margin-bottom="0.0598in" style:contextual-spacing="false" fo:line-height="100%" style:register-true="true"/>
      <style:text-properties officeooo:paragraph-rsid="00d8952d"/>
    </style:style>
    <style:style style:name="P10" style:family="paragraph" style:parent-style-name="Text_20_body">
      <style:paragraph-properties fo:margin-top="0.0598in" fo:margin-bottom="0.0598in" style:contextual-spacing="false" fo:line-height="100%" style:register-true="true"/>
      <style:text-properties officeooo:paragraph-rsid="00d9c79a"/>
    </style:style>
    <style:style style:name="P11" style:family="paragraph" style:parent-style-name="Text_20_body">
      <style:paragraph-properties fo:margin-top="0.0598in" fo:margin-bottom="0.0598in" style:contextual-spacing="false" fo:line-height="100%" style:register-true="true"/>
    </style:style>
    <style:style style:name="P12" style:family="paragraph" style:parent-style-name="Heading_20_1">
      <style:paragraph-properties fo:margin-top="0.0598in" fo:margin-bottom="0.0598in" style:contextual-spacing="false" fo:line-height="100%" style:register-true="true"/>
    </style:style>
    <style:style style:name="P13" style:family="paragraph" style:parent-style-name="Text_20_body">
      <style:paragraph-properties fo:margin-left="0in" fo:margin-right="0in" fo:margin-top="0.0598in" fo:margin-bottom="0.0598in" style:contextual-spacing="false" fo:line-height="100%" style:register-true="true" fo:text-indent="0in" style:auto-text-indent="false"/>
    </style:style>
    <style:style style:name="P14" style:family="paragraph" style:parent-style-name="Text_20_body">
      <style:paragraph-properties fo:margin-top="0.0598in" fo:margin-bottom="0.0598in" style:contextual-spacing="false" fo:line-height="100%" fo:text-align="justify" style:justify-single-word="false" style:register-true="true"/>
      <style:text-properties style:font-name="Liberation Serif" fo:font-size="13pt" fo:font-weight="bold" officeooo:paragraph-rsid="009f5c4e" style:font-size-asian="13pt" style:font-weight-asian="bold" style:font-size-complex="13pt" style:font-weight-complex="bold"/>
    </style:style>
    <style:style style:name="P15" style:family="paragraph" style:parent-style-name="Text_20_body">
      <style:paragraph-properties fo:margin-top="0.0598in" fo:margin-bottom="0.0598in" style:contextual-spacing="false" fo:line-height="100%" style:register-true="true"/>
      <style:text-properties style:font-name="Liberation Serif" fo:font-size="13pt" fo:font-weight="bold" officeooo:paragraph-rsid="00d76f9f" style:font-size-asian="13pt" style:font-weight-asian="bold" style:font-size-complex="13pt" style:font-weight-complex="bold"/>
    </style:style>
    <style:style style:name="P16" style:family="paragraph" style:parent-style-name="Text_20_body">
      <style:paragraph-properties fo:margin-top="0.0598in" fo:margin-bottom="0.0598in" style:contextual-spacing="false" fo:line-height="100%" style:register-true="true"/>
      <style:text-properties style:font-name="Liberation Serif" fo:font-size="13pt" fo:font-weight="bold" style:font-size-asian="13pt" style:font-weight-asian="bold" style:font-size-complex="13pt" style:font-weight-complex="bold"/>
    </style:style>
    <style:style style:name="P17" style:family="paragraph" style:parent-style-name="Heading_20_5">
      <style:paragraph-properties fo:margin-top="0.0598in" fo:margin-bottom="0.0598in" style:contextual-spacing="false" fo:line-height="100%" style:register-true="true"/>
      <style:text-properties style:font-name="Liberation Serif" fo:font-size="13pt" fo:font-weight="bold" style:font-size-asian="13pt" style:font-weight-asian="bold" style:font-size-complex="13pt" style:font-weight-complex="bold"/>
    </style:style>
    <style:style style:name="P18" style:family="paragraph" style:parent-style-name="Text_20_body">
      <style:paragraph-properties fo:margin-top="0.0598in" fo:margin-bottom="0.0598in" style:contextual-spacing="false" fo:line-height="100%" fo:text-align="start" style:justify-single-word="false" style:register-true="true"/>
      <style:text-properties style:font-name="Liberation Serif" fo:font-size="13pt" officeooo:paragraph-rsid="00df3b94" style:font-size-asian="13pt" style:font-size-complex="13pt"/>
    </style:style>
    <style:style style:name="P19" style:family="paragraph" style:parent-style-name="Text_20_body">
      <style:paragraph-properties fo:margin-left="0in" fo:margin-right="0in" fo:margin-top="0.0598in" fo:margin-bottom="0.0598in" style:contextual-spacing="false" fo:line-height="100%" fo:text-align="start" style:justify-single-word="false" style:register-true="true" fo:text-indent="0in" style:auto-text-indent="false"/>
      <style:text-properties style:font-name="Liberation Serif" fo:font-size="13pt" officeooo:paragraph-rsid="00aa2a79" style:font-size-asian="13pt" style:font-size-complex="13pt"/>
    </style:style>
    <style:style style:name="P20" style:family="paragraph" style:parent-style-name="Text_20_body">
      <style:paragraph-properties fo:margin-top="0.0598in" fo:margin-bottom="0.0598in" style:contextual-spacing="false" fo:line-height="100%" style:register-true="true"/>
      <style:text-properties style:font-name="Liberation Serif" fo:font-size="13pt" style:font-size-asian="13pt" style:font-size-complex="13pt"/>
    </style:style>
    <style:style style:name="P21" style:family="paragraph" style:parent-style-name="Heading_20_3">
      <style:paragraph-properties fo:margin-top="0.0598in" fo:margin-bottom="0.0598in" style:contextual-spacing="false" fo:line-height="100%" style:register-true="true"/>
      <style:text-properties style:font-name="Liberation Serif" fo:font-size="13pt" style:font-size-asian="13pt" style:font-size-complex="13pt"/>
    </style:style>
    <style:style style:name="P22" style:family="paragraph" style:parent-style-name="Table_20_Contents">
      <style:paragraph-properties fo:margin-top="0.0598in" fo:margin-bottom="0.0598in" style:contextual-spacing="false" fo:line-height="100%" style:register-true="true"/>
      <style:text-properties style:font-name="Liberation Serif" fo:font-size="13pt" style:font-size-asian="13pt" style:font-size-complex="13pt"/>
    </style:style>
    <style:style style:name="P23" style:family="paragraph" style:parent-style-name="Heading_20_5">
      <style:paragraph-properties fo:margin-top="0.0598in" fo:margin-bottom="0.0598in" style:contextual-spacing="false" fo:line-height="100%" style:register-true="true"/>
      <style:text-properties style:font-name="Liberation Serif" fo:font-size="13pt" style:font-size-asian="13pt" style:font-size-complex="13pt"/>
    </style:style>
    <style:style style:name="P24" style:family="paragraph" style:parent-style-name="Heading_20_4">
      <style:paragraph-properties fo:margin-top="0.0598in" fo:margin-bottom="0.0598in" style:contextual-spacing="false" fo:line-height="100%" style:register-true="true"/>
      <style:text-properties style:font-name="Liberation Serif" fo:font-size="13pt" style:font-size-asian="13pt" style:font-size-complex="13pt"/>
    </style:style>
    <style:style style:name="P25" style:family="paragraph" style:parent-style-name="Text_20_body">
      <style:paragraph-properties fo:margin-left="0in" fo:margin-right="0in" fo:margin-top="0.0598in" fo:margin-bottom="0.0598in" style:contextual-spacing="false" fo:line-height="100%" style:register-true="true" fo:text-indent="0in" style:auto-text-indent="false"/>
      <style:text-properties style:font-name="Liberation Serif" fo:font-size="13pt" style:font-size-asian="13pt" style:font-size-complex="13pt"/>
    </style:style>
    <style:style style:name="P26" style:family="paragraph" style:parent-style-name="Table_20_Contents">
      <style:paragraph-properties fo:margin-top="0.0598in" fo:margin-bottom="0.0598in" style:contextual-spacing="false" fo:line-height="100%" style:register-true="true"/>
      <style:text-properties style:font-name="Liberation Serif" fo:font-size="13pt" officeooo:paragraph-rsid="00e298d9" style:font-size-asian="13pt" style:font-size-complex="13pt"/>
    </style:style>
    <style:style style:name="P27" style:family="paragraph" style:parent-style-name="Table_20_Contents">
      <style:paragraph-properties fo:margin-top="0.0598in" fo:margin-bottom="0.0598in" style:contextual-spacing="false" fo:line-height="100%" style:register-true="true"/>
      <style:text-properties style:font-name="Liberation Serif" fo:font-size="13pt" officeooo:paragraph-rsid="00d57ea3" style:font-size-asian="13pt" style:font-size-complex="13pt"/>
    </style:style>
    <style:style style:name="P28" style:family="paragraph" style:parent-style-name="Text_20_body">
      <style:paragraph-properties fo:margin-top="0.0598in" fo:margin-bottom="0.0598in" style:contextual-spacing="false" fo:line-height="100%" fo:text-align="center" style:justify-single-word="false" style:register-true="true"/>
      <style:text-properties style:font-name="Liberation Serif" fo:font-size="13pt" style:font-size-asian="13pt" style:font-size-complex="13pt"/>
    </style:style>
    <style:style style:name="P29" style:family="paragraph" style:parent-style-name="Text_20_body">
      <style:paragraph-properties fo:margin-top="0.0598in" fo:margin-bottom="0.0598in" style:contextual-spacing="false" fo:line-height="100%" style:register-true="true"/>
      <style:text-properties style:font-name="Liberation Serif" fo:font-size="13pt" fo:font-weight="normal" style:font-size-asian="13pt" style:font-weight-asian="normal" style:font-size-complex="13pt" style:font-weight-complex="normal"/>
    </style:style>
    <style:style style:name="P30" style:family="paragraph" style:parent-style-name="Text_20_body">
      <style:paragraph-properties fo:margin-top="0.0598in" fo:margin-bottom="0.0598in" style:contextual-spacing="false" fo:line-height="100%" fo:text-align="center" style:justify-single-word="false" style:register-true="true"/>
      <style:text-properties style:font-name="Liberation Serif" fo:font-size="13pt" fo:font-style="italic" style:font-size-asian="13pt" style:font-style-asian="italic" style:font-size-complex="13pt" style:font-style-complex="italic"/>
    </style:style>
    <style:style style:name="P31" style:family="paragraph" style:parent-style-name="Heading_20_5">
      <style:paragraph-properties fo:margin-top="0.0598in" fo:margin-bottom="0.0598in" style:contextual-spacing="false" fo:line-height="100%" fo:text-align="start" style:justify-single-word="false" style:register-true="true"/>
      <style:text-properties style:font-name="Liberation Serif" fo:font-size="13pt" fo:font-style="italic" style:font-size-asian="13pt" style:font-style-asian="italic" style:font-size-complex="13pt" style:font-style-complex="italic"/>
    </style:style>
    <style:style style:name="P32" style:family="paragraph" style:parent-style-name="Heading_20_5">
      <style:paragraph-properties fo:margin-top="0.0598in" fo:margin-bottom="0.0598in" style:contextual-spacing="false" fo:line-height="100%" fo:text-align="start" style:justify-single-word="false" style:register-true="true"/>
      <style:text-properties style:font-name="Liberation Serif" fo:font-size="13pt" fo:font-style="normal" fo:font-weight="bold" officeooo:paragraph-rsid="00c85b3d" style:font-size-asian="13pt" style:font-style-asian="normal" style:font-weight-asian="bold" style:font-size-complex="13pt" style:font-style-complex="normal" style:font-weight-complex="bold"/>
    </style:style>
    <style:style style:name="P33" style:family="paragraph" style:parent-style-name="Text_20_body">
      <style:text-properties style:font-name="Liberation Serif"/>
    </style:style>
    <style:style style:name="P34" style:family="paragraph" style:parent-style-name="Heading_20_2">
      <style:paragraph-properties fo:margin-top="0.0598in" fo:margin-bottom="0.0598in" style:contextual-spacing="false" fo:line-height="100%" style:register-true="true"/>
      <style:text-properties style:font-name="Liberation Serif" fo:font-size="16pt" style:font-size-asian="16pt" style:font-size-complex="16pt"/>
    </style:style>
    <style:style style:name="P35" style:family="paragraph" style:parent-style-name="Heading_20_3">
      <style:paragraph-properties fo:margin-top="0.0598in" fo:margin-bottom="0.0598in" style:contextual-spacing="false" fo:line-height="100%" style:register-true="true"/>
      <style:text-properties style:font-name="Liberation Serif" fo:font-size="16pt" style:font-size-asian="16pt" style:font-size-complex="16pt"/>
    </style:style>
    <style:style style:name="P36" style:family="paragraph" style:parent-style-name="Heading_20_2">
      <style:paragraph-properties fo:margin-top="0.0598in" fo:margin-bottom="0.0598in" style:contextual-spacing="false" fo:line-height="100%" style:register-true="true"/>
      <style:text-properties style:font-name="Liberation Serif" fo:font-size="18pt" officeooo:paragraph-rsid="00d3e33d" style:font-size-asian="18pt" style:font-size-complex="18pt"/>
    </style:style>
    <style:style style:name="P37" style:family="paragraph" style:parent-style-name="Heading_20_2">
      <style:paragraph-properties fo:margin-top="0.0598in" fo:margin-bottom="0.0598in" style:contextual-spacing="false" fo:line-height="100%" style:register-true="true"/>
      <style:text-properties style:font-name="Liberation Serif" fo:font-size="18pt" style:font-size-asian="18pt" style:font-size-complex="18pt"/>
    </style:style>
    <style:style style:name="P38" style:family="paragraph" style:parent-style-name="Heading_20_2">
      <style:paragraph-properties fo:margin-top="0.0598in" fo:margin-bottom="0.0598in" style:contextual-spacing="false" fo:line-height="100%" style:register-true="true"/>
      <style:text-properties style:font-name="Liberation Serif" fo:font-size="17pt" style:font-size-asian="17pt" style:font-size-complex="17pt"/>
    </style:style>
    <style:style style:name="P39" style:family="paragraph" style:parent-style-name="Heading_20_3">
      <style:paragraph-properties fo:margin-top="0.0598in" fo:margin-bottom="0.0598in" style:contextual-spacing="false" fo:line-height="100%" style:register-true="true"/>
      <style:text-properties style:font-name="Liberation Serif" fo:font-size="15pt" style:font-size-asian="15pt" style:font-size-complex="15pt"/>
    </style:style>
    <style:style style:name="P40" style:family="paragraph" style:parent-style-name="Text_20_body">
      <style:paragraph-properties fo:margin-top="0.0598in" fo:margin-bottom="0.0598in" style:contextual-spacing="false" fo:line-height="100%" fo:text-align="start" style:justify-single-word="false" style:register-true="true"/>
      <style:text-properties fo:color="#000000" loext:opacity="100%" style:font-name="Liberation Serif" fo:font-size="13pt" officeooo:paragraph-rsid="00c85b3d" style:font-size-asian="13pt" style:font-size-complex="13pt"/>
    </style:style>
    <style:style style:name="P41" style:family="paragraph" style:parent-style-name="Text_20_body">
      <style:paragraph-properties fo:margin-left="0in" fo:margin-right="0in" fo:margin-top="0.0598in" fo:margin-bottom="0.0598in" style:contextual-spacing="false" fo:line-height="100%" style:register-true="true" fo:text-indent="0in" style:auto-text-indent="false"/>
      <style:text-properties fo:color="#000000" loext:opacity="100%" style:font-name="Liberation Serif" fo:font-size="13pt" officeooo:paragraph-rsid="00c85b3d" style:font-size-asian="13pt" style:font-size-complex="13pt"/>
    </style:style>
    <style:style style:name="P42" style:family="paragraph" style:parent-style-name="Text_20_body">
      <style:paragraph-properties fo:margin-left="0in" fo:margin-right="0in" fo:margin-top="0.0598in" fo:margin-bottom="0.0598in" style:contextual-spacing="false" fo:line-height="100%" style:register-true="true" fo:text-indent="0in" style:auto-text-indent="false"/>
      <style:text-properties fo:color="#000000" loext:opacity="100%" style:font-name="Liberation Serif" fo:font-size="13pt" officeooo:paragraph-rsid="011d3131" style:font-size-asian="13pt" style:font-size-complex="13pt"/>
    </style:style>
    <style:style style:name="P43" style:family="paragraph" style:parent-style-name="Text_20_body">
      <style:text-properties style:font-name="Liberation Serif" fo:font-size="13pt" officeooo:paragraph-rsid="011f0060" style:font-size-asian="13pt" style:font-size-complex="13pt"/>
    </style:style>
    <style:style style:name="T1" style:family="text">
      <style:text-properties style:font-name="Liberation Serif"/>
    </style:style>
    <style:style style:name="T2" style:family="text">
      <style:text-properties style:font-name="Liberation Serif" fo:font-size="13pt" style:font-size-asian="13pt" style:font-size-complex="13pt"/>
    </style:style>
    <style:style style:name="T3" style:family="text">
      <style:text-properties style:font-name="Liberation Serif" fo:font-size="13pt" fo:font-weight="normal" style:font-size-asian="13pt" style:font-weight-asian="normal" style:font-size-complex="13pt" style:font-weight-complex="normal"/>
    </style:style>
    <style:style style:name="T4" style:family="text">
      <style:text-properties style:font-name="Liberation Serif" fo:font-size="13pt" style:text-underline-style="solid" style:text-underline-width="auto" style:text-underline-color="font-color" style:font-size-asian="13pt" style:font-size-complex="13pt"/>
    </style:style>
    <style:style style:name="T5" style:family="text">
      <style:text-properties style:font-name="Liberation Serif" fo:font-size="13pt" style:text-underline-style="solid" style:text-underline-width="auto" style:text-underline-color="font-color" fo:font-weight="normal" style:font-size-asian="13pt" style:font-weight-asian="normal" style:font-size-complex="13pt" style:font-weight-complex="normal"/>
    </style:style>
    <style:style style:name="T6" style:family="text">
      <style:text-properties style:font-name="Liberation Serif" fo:font-size="13pt" style:text-underline-style="none" style:font-size-asian="13pt" style:font-size-complex="13pt"/>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size="18pt" style:font-size-asian="18pt" style:font-size-complex="18pt"/>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size="15pt" style:font-size-asian="15pt" style:font-size-complex="15pt"/>
    </style:style>
    <style:style style:name="T12" style:family="text">
      <style:text-properties style:text-underline-style="solid" style:text-underline-width="auto" style:text-underline-color="font-color"/>
    </style:style>
    <style:style style:name="T13" style:family="text">
      <style:text-properties officeooo:rsid="00d16f1c"/>
    </style:style>
    <style:style style:name="T14" style:family="text">
      <style:text-properties style:text-underline-style="none"/>
    </style:style>
    <style:style style:name="T15" style:family="text">
      <style:text-properties style:text-underline-style="solid" style:text-underline-type="double"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span text:style-name="Strong_20_Emphasis"><text:span text:style-name="T8">Programs and Libraries</text:span></text:span><text:bookmark text:name="h2-1"/></text:h>
      <text:p text:style-name="P1"><text:span text:style-name="Strong_20_Emphasis"><text:span text:style-name="T3">Một chương trình là một thuật toán được viết bằng một ngôn ngữ cụ thể mà bộ thực thi chương trình có thể hiểu được. Chúng ta phân biệt giữa ngôn ngữ máy, được CPU hiểu trực tiếp, và các ngôn ngữ bậc cao (ngôn ngữ thuật toán), được thiết kế cho người viết chương trình — tức là lập trình viên.</text:span></text:span></text:p>
      <text:p text:style-name="P2"><text:span text:style-name="T3">Các chương trình viết bằng ngôn ngữ bậc cao phải được dịch sang ngôn ngữ máy của hệ thống đích trước khi có thể chạy. Việc này được thực hiện bằng các công cụ đặc biệt gọi là </text:span><text:span text:style-name="Strong_20_Emphasis"><text:span text:style-name="T3">trình dịch</text:span></text:span><text:span text:style-name="T3">. Có hai loại trình dịch: </text:span><text:span text:style-name="Strong_20_Emphasis"><text:span text:style-name="T3">trình biên dịch (compiler)</text:span></text:span><text:span text:style-name="T3"> và </text:span><text:span text:style-name="Strong_20_Emphasis"><text:span text:style-name="T3">trình thông dịch (interpreter)</text:span></text:span><text:span text:style-name="T3">. Trình biên dịch sẽ dịch toàn bộ chương trình sang mã máy ngay từ đầu và không tham gia vào quá trình thực thi. Ngược lại, trình thông dịch sẽ dịch từng lệnh một theo từng bước và thực thi ngay lập tức. Ví dụ, một trình thông dịch lệnh ở chế độ tương tác sẽ thực thi các lệnh do người dùng nhập từng bước một; trong chế độ batch, nó cũng thực thi lần lượt các lệnh được ghi trong một file script.</text:span></text:p>
      <text:p text:style-name="P2"><text:span text:style-name="T3">Một thuật toán là tập hợp các chỉ dẫn mà khi thực hiện sẽ cho ra lời giải cho một bài toán cụ thể. Trong hầu hết các trường hợp, các chỉ dẫn này có sự phụ thuộc lẫn nhau và được hệ thống thực hiện theo trình tự (tuần tự). Tuy nhiên, nếu có thể tách ra các tập con “độc lập” của các chỉ dẫn (các nhánh độc lập), thì chúng có thể được thực thi đồng thời bởi nhiều đơn vị xử lý — tức là thực thi song song. Do đó, chúng ta phân biệt giữa </text:span><text:span text:style-name="Strong_20_Emphasis"><text:span text:style-name="T3">thuật toán tuần tự</text:span></text:span><text:span text:style-name="T3"> và </text:span><text:span text:style-name="Strong_20_Emphasis"><text:span text:style-name="T3">thuật toán song song</text:span></text:span><text:span text:style-name="T3">, cũng như các chương trình tương ứng. Một số chương trình hiện thực các thuật toán dùng chung — ví dụ như nén dữ liệu, mã hóa, hoặc các giao thức mạng. Những chương trình này chủ yếu được sử dụng bởi các phần mềm khác chứ không phải người dùng cuối, và được gọi là </text:span><text:span text:style-name="Strong_20_Emphasis"><text:span text:style-name="T3">thư viện (libraries)</text:span></text:span><text:span text:style-name="T3">.</text:span></text:p>
      <text:p text:style-name="P2"><text:span text:style-name="T3">Theo cấu trúc hệ thống, các chương trình đã được biên dịch thành mã máy thường được đặt trong các thư mục như </text:span><text:span text:style-name="Source_20_Text"><text:span text:style-name="T3">/bin</text:span></text:span><text:span text:style-name="T3">, </text:span><text:span text:style-name="Source_20_Text"><text:span text:style-name="T3">/sbin</text:span></text:span><text:span text:style-name="T3">, </text:span><text:span text:style-name="Source_20_Text"><text:span text:style-name="T3">/usr/bin</text:span></text:span><text:span text:style-name="T3">, </text:span><text:span text:style-name="Source_20_Text"><text:span text:style-name="T3">/usr/sbin</text:span></text:span><text:span text:style-name="T3">, </text:span><text:span text:style-name="Source_20_Text"><text:span text:style-name="T3">/usr/local/bin</text:span></text:span><text:span text:style-name="T3">, </text:span><text:span text:style-name="Source_20_Text"><text:span text:style-name="T3">/usr/local/sbin</text:span></text:span><text:span text:style-name="T3">, còn các thư viện được đặt trong </text:span><text:span text:style-name="Source_20_Text"><text:span text:style-name="T3">/lib</text:span></text:span><text:span text:style-name="T3">, </text:span><text:span text:style-name="Source_20_Text"><text:span text:style-name="T3">/usr/lib</text:span></text:span><text:span text:style-name="T3">, </text:span><text:span text:style-name="Source_20_Text"><text:span text:style-name="T3">/usr/local/lib</text:span></text:span><text:span text:style-name="T3">. Các chương trình sử dụng định dạng nhị phân thực thi ELF và phụ thuộc vào các thư viện, như được minh họa trong ví dụ sử dụng lệnh </text:span><text:span text:style-name="Source_20_Text"><text:span text:style-name="T3">ldd</text:span></text:span><text:span text:style-name="T3"> (hiển thị các phụ thuộc của trình nạp). Mỗi phụ thuộc được hiển thị gồm: tên thư viện ❶ (SONAME – shared object name), tệp thư viện tương ứng trên hệ thống ❷, và địa chỉ trong bộ nhớ của tiến trình ❸ (32-bit hoặc 48-bit tùy nền tảng) nơi thư viện sẽ được nạp.</text:span></text:p>
      <text:p text:style-name="P14"><text:bookmark text:name="h5-1"/>Programs and Libraries</text:p>
      <table:table table:name="Table1" table:style-name="Table1">
        <table:table-column table:style-name="Table1.A"/>
        <table:table-row>
          <table:table-cell table:style-name="Table1.A1" office:value-type="string">
            <text:p text:style-name="P18"><text:bookmark text:name="p5"/>fitz@ubuntu:~which ls<text:line-break/>/usr/bin/ls</text:p>
            <text:p text:style-name="P18"><text:line-break/>fitz@ubuntu:  file /usr/bin/ls<text:line-break/>/usr/bin/ls: ELF 64-bit LSB pie executable, x86-64, version 1 (SYSV), dynamically linked, interpreter /lib64/ld-linux-x86-64.so.2, BuildID[sha1]=2f15ad836be3339dec0e2e6a3c637e08e48aacbd, for GNU/Linux 3.2.0, stripped</text:p>
            <text:p text:style-name="P18"><text:line-break/>fitz@ubuntu:~$ ldd /usr/bin/ls<text:line-break/>linux-vdso.so.1 (0x00007ffcb529d000)<text:line-break/>libselinux.so.1 =&gt; /lib/x86_64-linux-gnu/libselinux.so.1 (0x00007fb02f58d000)<text:line-break/>❶ libc.so.6 =&gt; ❷ /lib/x86_64-linux-gnu/libc.so.6 (0x00007fb02f39c000) ❸<text:line-break/><text:soft-page-break/>libpcre2-8.so.0 =&gt; /lib/x86_64-linux-gnu/libpcre2-8.so.0 (0x00007fb02f317000)<text:line-break/>libdl.so.2 =&gt; /lib/x86_64-linux-gnu/libdl.so.2 (0x00007fb02f311000)<text:line-break/>/lib64/ld-linux-x86-64.so.2 (0x00007fb02f5f1000)<text:line-break/>libpthread.so.0 =&gt; /lib/x86_64-linux-gnu/libpthread.so.0 (0x00007fb02f2ee000)</text:p>
            <text:p text:style-name="P19"><text:bookmark text:name="p6"/>fitz@ubuntu:~$ file /lib/x86_64-linux-gnu/libc.so.6<text:line-break/>❹ /lib/x86_64-linux-gnu/libc.so.6: symbolic link to libc-2.30.so</text:p>
          </table:table-cell>
        </table:table-row>
      </table:table>
      <text:p text:style-name="P3"><text:span text:style-name="Strong_20_Emphasis"><text:span text:style-name="T3">Lưu ý rằng không tồn tại tệp thực trên đĩa cho thư viện </text:span></text:span><text:span text:style-name="Strong_20_Emphasis"><text:span text:style-name="Source_20_Text"><text:span text:style-name="T3">linux-vdso.so.1</text:span></text:span></text:span><text:span text:style-name="Strong_20_Emphasis"><text:span text:style-name="T3"> (thư viện này triển khai giao diện cho các lời gọi hệ thống đến kernel), bởi vì nó là một đối tượng ảo — một VDSO (virtual dynamic shared object) do chính kernel cung cấp và ánh xạ trực tiếp vào không gian bộ nhớ của tiến trình như thể nó là một thư viện dùng chung thực sự. Ngoài ra, </text:span></text:span><text:span text:style-name="Strong_20_Emphasis"><text:span text:style-name="Source_20_Text"><text:span text:style-name="T3">ld-linux-x86-64.so.2</text:span></text:span></text:span><text:span text:style-name="Strong_20_Emphasis"><text:span text:style-name="T3"> được chỉ định bằng một đường dẫn tuyệt đối, vì vậy hệ thống không cần thực hiện việc tìm kiếm tệp của nó.</text:span></text:span></text:p>
      <text:p text:style-name="P5"><text:span text:style-name="T3">Đối với hầu hết các thư viện, các phụ thuộc được khai báo thông qua một </text:span><text:span text:style-name="Strong_20_Emphasis"><text:span text:style-name="T3">SONAME</text:span></text:span><text:span text:style-name="T3"> có dạng </text:span><text:span text:style-name="Source_20_Text"><text:span text:style-name="T3">libNAME.so.X</text:span></text:span><text:span text:style-name="T3">, trong đó </text:span><text:span text:style-name="Source_20_Text"><text:span text:style-name="T3">lib</text:span></text:span><text:span text:style-name="T3"> là tiền tố chuẩn (library), </text:span><text:span text:style-name="Source_20_Text"><text:span text:style-name="T3">.so</text:span></text:span><text:span text:style-name="T3"> là hậu tố (shared object), </text:span><text:span text:style-name="Source_20_Text"><text:span text:style-name="T3">NAME</text:span></text:span><text:span text:style-name="T3"> là tên riêng của thư viện, và </text:span><text:span text:style-name="Source_20_Text"><text:span text:style-name="T3">.X</text:span></text:span><text:span text:style-name="T3"> là số phiên bản giao diện. Dựa trên SONAME này, hệ thống sẽ tìm kiếm trong các thư mục nhất định (được cấu hình cho linker) để tìm tệp thư viện tương ứng; thông thường, tệp tìm được sẽ là một </text:span><text:span text:style-name="Strong_20_Emphasis"><text:span text:style-name="T3">liên kết tượng trưng (symbolic link)</text:span></text:span><text:span text:style-name="T3"> <text:s/>❹ trỏ tới tệp thư viện “thực”. Ví dụ, với phiên bản giao diện 6 của thư viện runtime C dùng chung (</text:span><text:span text:style-name="Source_20_Text"><text:span text:style-name="T3">libc.so.6</text:span></text:span><text:span text:style-name="T3">), tệp thực tế có tên là </text:span><text:span text:style-name="Source_20_Text"><text:span text:style-name="T3">libc-2.30.so</text:span></text:span><text:span text:style-name="T3">, trong đó con số 2.30 biểu thị phiên bản thực của thư viện.</text:span></text:p>
      <text:h text:style-name="P4" text:outline-level="2"><text:span text:style-name="Strong_20_Emphasis"><text:span text:style-name="T2">Library Versions</text:span></text:span></text:h>
      <table:table table:name="Table2" table:style-name="Table2">
        <table:table-column table:style-name="Table2.A"/>
        <table:table-row>
          <table:table-cell table:style-name="Table2.A1" office:value-type="string">
            <text:p text:style-name="P6"><text:span text:style-name="Strong_20_Emphasis"><text:span text:style-name="T3">fitz@ubuntu:~$ file /lib/x86_64-linux-gnu/libpcre2-8.so.0<text:line-break/>/lib/x86_64-linux-gnu/libpcre2-8.so.0: symbolic link to libpcre2-8.so.0.7.1</text:span></text:span></text:p>
          </table:table-cell>
        </table:table-row>
      </table:table>
      <text:p text:style-name="P3"><text:span text:style-name="Strong_20_Emphasis"><text:span text:style-name="T3">Tương tự, danh sách ở trên cho thấy rằng đối với phiên bản giao diện 0 của thư viện dùng chung PCRE2 (Perl-compatible regular expressions) (libpcre2-8.so.0), tệp thư viện thực tế có tên là libpcre2-8.so.0.7.1, điều này cho thấy phiên bản nội tại của thư viện là 0.7.1.</text:span></text:span></text:p>
      <text:p text:style-name="P29">Cách tiếp cận này cho phép bạn thay thế các thư viện (để sửa lỗi, cải thiện các thuật toán kém hiệu quả, v.v.) miễn là giao diện của chúng vẫn giữ nguyên, một cách độc lập với các chương trình phụ thuộc vào chúng. Ví dụ, khi cập nhật thư viện từ libc-2.30.so lên libc-2.32.so, chỉ cần trỏ symbolic link SONAME libc.so.6 tới libc-2.32.so, sau đó tất cả các chương trình phụ thuộc vào libc.so.6 sẽ bắt đầu sử dụng phiên bản mới. Hơn nữa, hệ thống có thể chứa đồng thời nhiều phiên bản của cùng một thư viện — triển khai cùng hoặc khác phiên bản giao diện — với việc lựa chọn được điều khiển bởi các symbolic link SONAME tương ứng.</text:p>
      <text:h text:style-name="P4" text:outline-level="2"><text:span text:style-name="Strong_20_Emphasis"><text:span text:style-name="T2">Libraries Are Programs You Don’t Run</text:span></text:span></text:h>
      <table:table table:name="Table3" table:style-name="Table3">
        <table:table-column table:style-name="Table3.A"/>
        <table:table-row>
          <table:table-cell table:style-name="Table3.A1" office:value-type="string">
            <text:p text:style-name="P22">fitz@ubuntu:~$ file /lib/x86_64-linux-gnu/libc-2.30.so</text:p>
            <text:p text:style-name="P26">/lib/x86_64-linux-gnu/libc-2.30.so: ELF 64-bit LSB shared object, x86-64, version 1 (GNU/Linux), dynamically linked, interpreter /lib64/ld-linux-x86-64.so.2, BuildID[sha1]=2155f455ad56bd871c8225bcca85ee25c1c197c4, for GNU/Linux 3.2.0, stripped</text:p>
            <text:p text:style-name="P26"><text:soft-page-break/><text:line-break/>fitz@ubuntu:~$ file /lib/x86_64-linux-gnu/libpcre2-8.so.0.7.1</text:p>
            <text:p text:style-name="P22">/lib/x86_64-linux-gnu/libpcre2-8.so.0.7.1: ELF 64-bit LSB shared object, x86-64, version 1 (SYSV), dynamically linked, BuildID[sha1]=815e1acbcc22015f05d62c17fe982c1b573125b1, stripped<text:line-break/>fitz@ubuntu:~$ ldd /lib/x86_64-linux-gnu/libpcre2-8.so.0.7.1</text:p>
            <text:p text:style-name="P22">linux-vdso.so.1 (0x00007ffe22093000)</text:p>
            <text:p text:style-name="P22">libpthread.so.0 =&gt; /lib/x86_64-linux-gnu/libpthread.so.0 (0x00007f8ec2bdd000)</text:p>
            <text:p text:style-name="P22">libc.so.6 =&gt; /lib/x86_64-linux-gnu/libc.so.6 (0x00007f8ec29ec000)</text:p>
            <text:p text:style-name="P22">/lib64/ld-linux-x86-64.so.2 (0x00007f8ec2c99000)</text:p>
          </table:table-cell>
        </table:table-row>
      </table:table>
      <text:p text:style-name="P20">Các thư viện sử dụng cùng định dạng nhị phân ELF như các chương trình “thực thi”, nhưng thay vì là một chương trình thực thi độc lập, chúng là các “shared object” (đối tượng dùng chung). Mặc dù các thư viện không được thiết kế để chạy trực tiếp, chúng vẫn là các chương trình và do đó cũng phụ thuộc vào các thư viện khác, như được minh họa trong ví dụ tiếp theo.</text:p>
      <text:p text:style-name="P20">Trên thực tế, việc một tệp ELF có thể “chạy” được hay không không phụ thuộc vào loại của nó, mà phụ thuộc vào quyền thực thi và việc nó có một điểm vào (entry point) hợp lệ hay không — tức là địa chỉ của lệnh đầu tiên mà quyền điều khiển sẽ được chuyển tới khi bạn cố gắng thực thi nó.</text:p>
      <text:p text:style-name="P20">Ví dụ, bạn có thể chạy thư viện libc-2.30.so, và khi đó nó sẽ in ra thông tin trạng thái.</text:p>
      <text:h text:style-name="P23" text:outline-level="5"><text:bookmark text:name="h5-4"/>Executable Libraries</text:h>
      <table:table table:name="Table4" table:style-name="Table4">
        <table:table-column table:style-name="Table4.A"/>
        <table:table-row>
          <table:table-cell table:style-name="Table4.A1" office:value-type="string">
            <text:p text:style-name="P22">fitz@ubuntu:~$ ls -l /lib/x86_64-linux-gnu/libc-2.30.so</text:p>
            <text:p text:style-name="P22">-rwxr-xr-x 1 root root 2025032 Sep 16 17:56 /lib/x86_64-linux-gnu/libc-2.30.so<text:line-break/></text:p>
            <text:p text:style-name="P22">fitz@ubuntu:~$ /lib/i386-linux-gnu/libc-2.15.so</text:p>
            <text:p text:style-name="P22">GNU C Library (Ubuntu GLIBC 2.30-0ubuntu2) stable release version 2.30.</text:p>
            <text:p text:style-name="P22">Copyright (C) 2019 Free Software Foundation, Inc.</text:p>
            <text:p text:style-name="P22">This is free software; see the source for copying conditions.</text:p>
            <text:p text:style-name="P22">There is NO warranty; not even for MERCHANTABILITY or FITNESS FOR A</text:p>
            <text:p text:style-name="P22">PARTICULAR PURPOSE.</text:p>
            <text:p text:style-name="P22">Compiled by GNU CC version 9.2.1 20190909.</text:p>
            <text:p text:style-name="P22">libc ABIs: UNIQUE IFUNC ABSOLUTE</text:p>
            <text:p text:style-name="P22">For bug reporting instructions, please see:</text:p>
            <text:p text:style-name="P22">&lt;https://bugs.launchpad.net/ubuntu/+source/glibc/+bugs&gt;.</text:p>
          </table:table-cell>
        </table:table-row>
      </table:table>
      <text:h text:style-name="P35" text:outline-level="3"><text:bookmark text:name="h3-1"/><text:soft-page-break/>The Linux Kernel</text:h>
      <text:p text:style-name="P20"><text:span text:style-name="T9">Hãy nhớ rằng chương trình quan trọng nhất trong bất kỳ hệ điều hành nào chính là </text:span><text:span text:style-name="Strong_20_Emphasis"><text:span text:style-name="T9">kernel (hạt nhân)</text:span></text:span><text:span text:style-name="T9"> của nó. Trong Linux, kernel bao gồm một mô-đun khởi động tĩnh (static bootstrap module) ở định dạng thực thi ELF và các mô-đun có thể nạp động ở định dạng ELF dạng tái định vị (relocatable). Trong giai đoạn khởi động sớm, mô-đun bootstrap được đóng gói dưới dạng một tệp bzImage tự giải nén (big zipped image) — về bản chất là một ảnh được nén bằng gzip, bao gồm một bộ giải nén nhỏ và chính mô-đun bootstrap đã được nén.</text:span></text:p>
      <text:p text:style-name="P11"><text:span text:style-name="T3">Danh sách bên dưới minh họa cách trích xuất ảnh kernel từ tệp lưu trữ bzImage ⓿ tại </text:span><text:span text:style-name="Source_20_Text"><text:span text:style-name="T3">/boot/vmlinuz-3.13.0-49-generic</text:span></text:span><text:span text:style-name="T3">, tệp này trước tiên được sao chép ❶ sang </text:span><text:span text:style-name="Source_20_Text"><text:span text:style-name="T3">/tmp/vmlinuz</text:span></text:span><text:span text:style-name="T3">. Quá trình giải nén sử dụng script </text:span><text:span text:style-name="Source_20_Text"><text:span text:style-name="T3">extract-vmlinux</text:span></text:span><text:span text:style-name="T3"> ❷ từ gói kernel headers. Kernel sau khi giải nén ❸ tại </text:span><text:span text:style-name="Source_20_Text"><text:span text:style-name="T3">/tmp/vmlinux</text:span></text:span><text:span text:style-name="T3">, như dự đoán, là một tệp thực thi ELF được liên kết tĩnh (tức là không sử dụng các thư viện dùng chung ELF).</text:span></text:p>
      <text:h text:style-name="P23" text:outline-level="5"><text:bookmark text:name="h5-5"/>Operating System Kernel</text:h>
      <table:table table:name="Table5" table:style-name="Table5">
        <table:table-column table:style-name="Table5.A"/>
        <table:table-row>
          <table:table-cell table:style-name="Table5.A1" office:value-type="string">
            <text:p text:style-name="P22">fitz@ubuntu:~$ uname -r</text:p>
            <text:p text:style-name="P22">5.3.0-23-generic</text:p>
            <text:p text:style-name="P22"/>
            <text:p text:style-name="P22">fitz@ubuntu:~$ file /boot/vmlinuz-5.3.0-23-generic</text:p>
            <text:p text:style-name="P22">/boot/vmlinuz-5.3.0-23-generic: regular file, no read permission</text:p>
            <text:p text:style-name="P22"/>
            <text:p text:style-name="P22">fitz@ubuntu:~$ ls -l /boot/vmlinuz-5.3.0-23-generic</text:p>
            <text:p text:style-name="P22">-rw------- 1 root root 11399928 Nov 12 11:51 /boot/vmlinuz-5.3.0-23-generic</text:p>
            <text:p text:style-name="P22"/>
            <text:p text:style-name="P22">fitz@ubuntu:~$ sudo file /boot/vmlinuz-5.3.0-23-generic</text:p>
            <text:p text:style-name="P22">⓿ /boot/vmlinuz-5.3.0-23-generic: Linux kernel x86 boot executable bzImage, version 5.3.0-23-generic (buildd@lgw01-amd64-002) #25-Ubuntu SMP Tue Nov 12 09:22:33 UTC 2019, RO-rootFS, swap_dev 0xA, Normal VGA</text:p>
            <text:p text:style-name="P22"/>
            <text:p text:style-name="P22">❶ fitz@ubuntu:~$ sudo cat /boot/vmlinuz-5.3.0-23-generic &gt; /tmp/vmlinuz</text:p>
            <text:p text:style-name="P22"/>
            <text:p text:style-name="P22">❷ fitz@ubuntu:~$ /usr/src/linux-headers-5.3.0-23/scripts/extract-vmlinux /tmp/vmlinuz &gt; /tmp/vmlinux</text:p>
            <text:p text:style-name="P22"/>
            <text:p text:style-name="P22">fitz@ubuntu:~$ file /tmp/vmlinux</text:p>
            <text:p text:style-name="P22">/tmp/vmlinux: ELF 64-bit LSB executable ❸, x86-64, version 1 (SYSV), statically linked, <text:soft-page-break/>BuildID[sha1]=b23ff3f6790319ec538278e3269af619ba2ca642, stripped</text:p>
          </table:table-cell>
        </table:table-row>
      </table:table>
      <text:p text:style-name="P20">Các mô-đun động được nạp vào không gian kernel và được liên kết với kernel đang chạy tại thời điểm chạy (runtime) bằng các tiện ích hệ thống như <text:span text:style-name="Source_20_Text"><text:span text:style-name="T1">insmod</text:span></text:span> hoặc <text:span text:style-name="Source_20_Text"><text:span text:style-name="T1">modprobe</text:span></text:span>. Để gỡ bỏ và tháo các mô-đun không cần thiết, sử dụng <text:span text:style-name="Source_20_Text"><text:span text:style-name="T1">rmmod</text:span></text:span>; để xem danh sách các mô-đun đã được nạp, sử dụng <text:span text:style-name="Source_20_Text"><text:span text:style-name="T1">lsmod</text:span></text:span>; và để kiểm tra các thuộc tính cũng như tham số của một mô-đun, sử dụng <text:span text:style-name="Source_20_Text"><text:span text:style-name="T1">modinfo</text:span></text:span>.</text:p>
      <text:p text:style-name="P11"><text:span text:style-name="T2">Việc nạp và gỡ mô-đun được thực hiện thông qua các lời gọi hệ thống </text:span><text:span text:style-name="Source_20_Text"><text:span text:style-name="T2">init_module</text:span></text:span><text:span text:style-name="T2"> và </text:span><text:span text:style-name="Source_20_Text"><text:span text:style-name="T2">delete_module</text:span></text:span><text:span text:style-name="T2">. Danh sách các mô-đun đã nạp được cung cấp thông qua tệp </text:span><text:span text:style-name="Source_20_Text"><text:span text:style-name="T2">/proc/modules</text:span></text:span><text:span text:style-name="T2"> trong hệ thống tập tin giả (pseudo-filesystem) </text:span><text:span text:style-name="Source_20_Text"><text:span text:style-name="T2">/proc</text:span></text:span><text:span text:style-name="T2">, và các thuộc tính cùng tham số của mô-đun được lấy bằng cách đọc các phần (section) đặc biệt trong các tệp ELF của mô-đun.</text:span></text:p>
      <text:h text:style-name="P24" text:outline-level="4"><text:bookmark text:name="h4-1"/>Kernel Modules</text:h>
      <table:table table:name="Table6" table:style-name="Table6">
        <table:table-column table:style-name="Table6.A"/>
        <table:table-row>
          <table:table-cell table:style-name="Table6.A1" office:value-type="string">
            <text:p text:style-name="P22">❶ fitz@ubuntu:~$ lsmod</text:p>
            <text:p text:style-name="P22">Module <text:s text:c="17"/>Size <text:s/>Used by</text:p>
            <text:p text:style-name="P22">…</text:p>
            <text:p text:style-name="P22">i915 <text:s text:c="16"/>1949696 <text:s/>4</text:p>
            <text:p text:style-name="P22">…</text:p>
            <text:p text:style-name="P22">btusb <text:s text:c="17"/>57344 <text:s/>0</text:p>
            <text:p text:style-name="P22">…</text:p>
            <text:p text:style-name="P22">uvcvideo <text:s text:c="14"/>98304 <text:s/>0</text:p>
            <text:p text:style-name="P22">…</text:p>
            <text:p text:style-name="P22">e1000e <text:s text:c="16"/>258048 0</text:p>
            <text:p text:style-name="P22">…<text:line-break/><text:line-break/>❷ fitz@ubuntu:~$ modinfo i915</text:p>
            <text:p text:style-name="P22">filename: <text:s text:c="6"/>/lib/modules/5.3.0-23-generic/kernel/drivers/gpu/drm/i915/i915.ko</text:p>
            <text:p text:style-name="P22">license: <text:s text:c="7"/>GPL and additional rights</text:p>
            <text:p text:style-name="P22">description: <text:s text:c="3"/>Intel Graphics</text:p>
            <text:p text:style-name="P22">…<text:line-break/><text:line-break/>fitz@ubuntu:~$ file /lib/modules/5.3.0-23-generic/kernel/drivers/gpu/drm/i915/i915.ko</text:p>
            <text:p text:style-name="P22">/lib/modules/5.3.0-23-generic/kernel/drivers/gpu/drm/i915/i915.ko: ELF 64-bit LSB relocatable, x86-64, version 1 (SYSV), BuildID[sha1]=49e59590c1a718074b76b6541702f6f794ea7eae, not stripped</text:p>
          </table:table-cell>
        </table:table-row>
      </table:table>
      <text:p text:style-name="P20">Các mô-đun kernel có thể nạp (loadable kernel modules) thường là các trình điều khiển thiết bị (device drivers), như được minh họa trong danh sách sử dụng các tiện ích <text:span text:style-name="Source_20_Text"><text:span text:style-name="T1">lspci</text:span></text:span> và <text:span text:style-name="Source_20_Text"><text:span text:style-name="T1">lsusb</text:span></text:span>. <text:soft-page-break/>Các tiện ích này sử dụng hệ thống tập tin giả <text:span text:style-name="Source_20_Text"><text:span text:style-name="T1">sysfs</text:span></text:span> để liệt kê các thiết bị mà kernel đã phát hiện trên các bus PCI và USB, cùng với các driver chịu trách nhiệm điều khiển chúng.</text:p>
      <text:h text:style-name="P23" text:outline-level="5"><text:bookmark text:name="h5-6"/>Device Drivers</text:h>
      <table:table table:name="Table7" table:style-name="Table7">
        <table:table-column table:style-name="Table7.A"/>
        <table:table-row>
          <table:table-cell table:style-name="Table7.A1" office:value-type="string">
            <text:p text:style-name="P22">fitz@ubuntu:~$ lspci -k</text:p>
            <text:p text:style-name="P22">...</text:p>
            <text:p text:style-name="P22">00:02.0 VGA compatible controller: Intel Corporation 2nd Generation Core Processor Family Integrated Graphics Controller (rev 09)</text:p>
            <text:p text:style-name="P22"><text:s text:c="8"/>Subsystem: Dell 2nd Generation Core Processor Family Integrated Graphics Controller</text:p>
            <text:p text:style-name="P22"><text:s text:c="8"/>Kernel driver in use: i915</text:p>
            <text:p text:style-name="P22"><text:s text:c="8"/>Kernel modules: i915</text:p>
            <text:p text:style-name="P22">...</text:p>
            <text:p text:style-name="P22">00:19.0 Ethernet controller: Intel Corporation 82579LM Gigabit Network Connection (Lewisville) (rev 04)</text:p>
            <text:p text:style-name="P22"><text:s text:c="8"/>Subsystem: Dell 82579LM Gigabit Network Connection (Lewisville)</text:p>
            <text:p text:style-name="P22"><text:s text:c="8"/>Kernel driver in use: e1000e</text:p>
            <text:p text:style-name="P22"><text:s text:c="8"/>Kernel modules: e1000e</text:p>
            <text:p text:style-name="P22"/>
            <text:p text:style-name="P22">fitz@ubuntu:~$ lsusb -t</text:p>
            <text:p text:style-name="P22">...</text:p>
            <text:p text:style-name="P22">/: <text:s/>Bus 01.Port 1: Dev 1, Class=root_hub, Driver=ehci-pci/3p, 480M</text:p>
            <text:p text:style-name="P22">|__ Port 1: Dev 2, If 0, Class=Hub, Driver=hub/6p, 480M</text:p>
            <text:p text:style-name="P22">|__ Port 4: Dev 3, If 2, Class=Vendor Specific Class, Driver=, 12M</text:p>
            <text:p text:style-name="P22">|__ Port 4: Dev 3, If 0, Class=Wireless, Driver=btusb, 12M</text:p>
            <text:p text:style-name="P22">|__ Port 4: Dev 3, If 3, Class=Application Specific Interface, Driver=, 12M</text:p>
            <text:p text:style-name="P22">|__ Port 4: Dev 3, If 1, Class=Wireless, Driver=btusb, 12M</text:p>
            <text:p text:style-name="P22">|__ Port 5: Dev 4, If 0, Class=Video, Driver=uvcvideo, 480M</text:p>
            <text:p text:style-name="P22">|__ Port 5: Dev 4, If 1, Class=Video, Driver=uvcvideo, 480M</text:p>
          </table:table-cell>
        </table:table-row>
      </table:table>
      <text:h text:style-name="P34" text:outline-level="2"/>
      <text:h text:style-name="P37" text:outline-level="2">Processes and Threads</text:h>
      <text:p text:style-name="P11"><text:span text:style-name="T3">Khái niệm </text:span><text:span text:style-name="Strong_20_Emphasis"><text:span text:style-name="T3">tiến trình (process)</text:span></text:span><text:span text:style-name="T3"> gắn liền với khả năng </text:span><text:span text:style-name="Strong_20_Emphasis"><text:span text:style-name="T3">đa chương trình (multiprogramming)</text:span></text:span><text:span text:style-name="T3"> và </text:span><text:span text:style-name="Strong_20_Emphasis"><text:span text:style-name="T3">đa nhiệm (multitasking)</text:span></text:span><text:span text:style-name="T3"> của hệ điều hành. Ví dụ, trong các hệ điều hành đơn nhiệm, </text:span><text:soft-page-break/><text:span text:style-name="T3">chương trình vẫn tồn tại nhưng không có khái niệm tiến trình. Trong hệ điều hành đơn nhiệm, tại một thời điểm chỉ có một chương trình tuần tự được thực thi</text:span><text:span text:style-name="T2"> bởi một đơn vị xử lý duy nhất (CPU), và chương trình đó được sử dụng độc quyền tất cả tài nguyên (bộ nhớ, thiết bị I/O, v.v.).</text:span></text:p>
      <text:p text:style-name="P20">Trong bất kỳ chương trình nào, ta có thể phân biệt các pha luân phiên giữa việc sử dụng CPU và thiết bị I/O. CPU sẽ bị buộc phải rảnh (idle) khi chương trình thực hiện các thao tác I/O—ví dụ: chờ ghi (hoặc đọc) một khối dữ liệu từ thiết bị lưu trữ, chờ gửi (hoặc nhận) một gói tin mạng, hoặc chờ sự kiện từ thiết bị giao diện người–máy (HMI). Ngược lại, các thiết bị I/O cũng sẽ rảnh khi chương trình đang thực hiện tính toán—chẳng hạn như chờ kết quả để xuất ra hoặc chờ chương trình cần dữ liệu đầu vào mới.</text:p>
      <text:p text:style-name="P20">Dựa trên mô hình hành vi này của chương trình, ta có thể phân tích cách chúng tiêu thụ tài nguyên trong thời gian chạy. Ví dụ, các công cụ như gzip, bzip2 và xz sẽ đọc khối dữ liệu tiếp theo từ file đầu vào, dành nhiều thời gian để nén, sau đó ghi kết quả ra file đầu ra và lặp lại cho đến khi xử lý xong toàn bộ dữ liệu. Thời gian dành cho bước nén (tính toán nặng) lớn hơn nhiều so với thời gian đọc và ghi, do đó tải CPU cao trong khi tải I/O thấp.</text:p>
      <text:p text:style-name="P20">Phân tích tương tự cũng áp dụng cho các công cụ như dd (sao chép đĩa), rsync (đồng bộ dữ liệu) hoặc tar (nén/giải nén), vốn thực hiện rất ít tính toán và chủ yếu xử lý lượng lớn dữ liệu. Khi sử dụng các công cụ này, tải CPU tương đối thấp, trong khi hệ thống I/O lại chịu tải nặng.</text:p>
      <text:p text:style-name="P20">Đối với các chương trình tương tác như shell Bash và các trình soạn thảo văn bản như nano và Vim, mô hình hoạt động điển hình là: chờ lâu (idle) cho các lệnh ngắn, xử lý nhanh và đơn giản, và đầu ra rất ít. Do đó, cả mức sử dụng CPU và I/O đều gần như bằng 0.</text:p>
      <text:p text:style-name="P20">Chính kiểu phân tích này và nhu cầu cải thiện hiệu quả sử dụng tài nguyên đã dẫn đến sự ra đời của các hệ điều hành đa nhiệm, dựa trên ý tưởng đơn giản là một CPU có thể “giả lập” việc thực thi đồng thời nhiều chương trình tuần tự. Thay vì để CPU rảnh khi một chương trình đang chờ I/O, CPU sẽ chuyển sang thực thi chương trình khác, từ đó tăng hiệu suất sử dụng tổng thể.</text:p>
      <text:p text:style-name="P20">Với sự xuất hiện của đa chương trình (tập hợp các chương trình mà CPU luân phiên xử lý), không còn chương trình nào có thể chiếm toàn bộ tài nguyên nữa (ví dụ: bộ nhớ phải được chia sẻ cho nhiều chương trình cùng lúc). Do đó, hệ điều hành đảm nhận nhiệm vụ lập lịch và phân bổ tài nguyên giữa các chương trình. Trong Linux, cũng như nhiều hệ điều hành khác, các chương trình được cô lập trong các môi trường thực thi “ảo”. Mỗi môi trường như vậy được gọi là một tiến trình và được cấp một phần tài nguyên—bao gồm vùng nhớ riêng và các lát thời gian CPU được lập lịch. Đối với chương trình, tiến trình tạo ra cảm giác như đang chạy trong môi trường đơn nhiệm, với quyền sử dụng độc quyền các tài nguyên của chính nó.</text:p>
      <text:p text:style-name="P20">Như đã đề cập trước đó, các chương trình song song bao gồm các nhánh độc lập, mỗi nhánh tuân theo mô hình hoạt động của một chương trình tuần tự. Do đó, một chương trình song song có thể được thực thi thông qua nhiều tiến trình theo cách giả song song. Trong hệ điều hành, các tiến trình đóng vai trò như các “container” cho việc thực thi đa nhiệm của cả chương trình tuần tự và song song.</text:p>
      <text:p text:style-name="P20">Trong ví dụ sau, lệnh ps hiển thị các tiến trình của người dùng dưới dạng cây dựa trên quan hệ cha–con giữa các tiến trình. Định danh duy nhất của tiến trình được hiển thị trong cột <text:soft-page-break/>PID (Process ID), và tên chương trình cùng các tham số dòng lệnh của nó được hiển thị trong cột COMMAND.</text:p>
      <text:p text:style-name="P20">Cột STAT cho biết trạng thái hiện tại của tiến trình, chẳng hạn như S (sleep – ngủ) hoặc R (running/runnable – đang chạy hoặc sẵn sàng chạy). Các tiến trình đang chờ hoàn thành I/O sẽ ở trạng thái sleep; còn lại, chúng đang chạy hoặc sẵn sàng chạy—tức là đang chờ CPU được cấp phát khi tiến trình đang chạy chuyển sang trạng thái sleep. Cột TIME cho biết tổng thời gian CPU mà tiến trình đã sử dụng kể từ khi bắt đầu, và giá trị này chỉ tăng khi tiến trình thực sự đang chạy.</text:p>
      <text:h text:style-name="P23" text:outline-level="5"><text:bookmark text:name="h5-7"/>The User’s Process Tree</text:h>
      <table:table table:name="Table8" table:style-name="Table8">
        <table:table-column table:style-name="Table8.A"/>
        <table:table-row>
          <table:table-cell table:style-name="Table8.A1" office:value-type="string">
            <text:p text:style-name="P20"><text:bookmark text:name="p33"/>fitz@ubuntu:~$ ps fx<text:line-break/>PID TTY STAT TIME COMMAND<text:line-break/>…<text:line-break/>17764 tty3 Ssl+ 0:00 /usr/lib/gdm3/gdm-x-session –run-script …<text:line-break/>17766 tty3 Sl+ 3:09 _ /usr/lib/xorg/Xorg vt3 -displayfd 3 …<text:line-break/>17774 tty3 Sl+ 0:00 _ /usr/lib/gnome-session/gnome-session-binary …<text:line-break/>…<text:line-break/>2987 ? Ss 0:04 /lib/systemd/systemd –user<text:line-break/>2992 ? S 0:00 _ (sd-pam)<text:line-break/>17373 ? Ssl 0:08 _ /usr/bin/pulseaudio –daemonize=no<text:line-break/>17444 ? Ss 0:02 _ /usr/bin/dbus-daemon –session –address=systemd: …<text:line-break/>…<text:line-break/>17921 ? Ssl 10:04 _ /usr/bin/gnome-shell<text:line-break/>…<text:line-break/>⓿ 30192 ? Ssl 0:00 _ /usr/libexec/gnome-terminal-server<text:line-break/>❶ 30202 pts/1 Ss 0:00 _ bash<text:line-break/>❷ 30226 pts/1 S+ 0:00 _ man ps<text:line-break/>30236 pts/1 S+ 0:00 _ pager<text:line-break/>❶ 30245 pts/3 Ss 0:00 _ bash<text:line-break/>❷ 30251 pts/3 R+ 0:00 _ ps fx<text:line-break/>❸ 30315 ? Sl 0:04 _ /usr/lib/firefox/firefox -new-window<text:line-break/>30352 ? Sl 0:02 _ /usr/lib/firefox/firefox -contentproc -childID 1 …<text:line-break/>30396 ? Sl 0:00 _ /usr/lib/firefox/firefox -contentproc -childID 2 …<text:line-break/>30442 ? Sl 0:00 _ /usr/lib/firefox/firefox -contentproc -childID 3 …</text:p>
          </table:table-cell>
        </table:table-row>
      </table:table>
      <text:p text:style-name="P20">Thiết bị đầu cuối điều khiển (controlling terminal) của một tiến trình, được hiển thị trong cột TTY, được sử dụng để gửi các tín hiệu tương tác (xem §4.8) khi người dùng nhập các ký tự điều khiển như intr ^C, quit ^. Một số tiến trình ⓿, ❸ không có controlling terminal vì chúng chạy các ứng dụng tương tác với người dùng không thông qua terminal mà thông qua hệ thống đồ họa.</text:p>
      <text:p text:style-name="P20">Theo định nghĩa, một tiến trình cô lập chương trình của nó khỏi các chương trình đang chạy khác, điều này khiến tiến trình không phù hợp với các tác vụ song song mà các nhánh không hoàn toàn độc lập và cần trao đổi dữ liệu. Việc sử dụng giao tiếp giữa các tiến trình (interprocess communication) quá nhiều sẽ tạo ra chi phí (overhead) đáng kể, do đó các chương trình song song như vậy được thực thi hiệu quả hơn bằng các tiến trình nhẹ (lightweight processes – LWP), tức là các luồng (thread).</text:p>
      <text:p text:style-name="P20"><text:soft-page-break/><text:span text:style-name="T12">Info:</text:span><text:span text:style-name="T14"> </text:span>Có một cách dịch khác trong tiếng Nga của thuật ngữ “thread” — “поток” (“dòng/chảy”) — theo quan điểm của tôi là không phù hợp. Thứ nhất, nó trùng với cách dịch đã được dùng cho “stream” là “поток”; thứ hai, khác với dòng chảy, một thread không “chảy”. Tuy nhiên, một tiến trình chứa các thread theo cách tương tự như một sợi dây được tạo thành từ nhiều sợi nhỏ.</text:p>
      <text:p text:style-name="P20">Cơ chế đa luồng (threading) cho phép CPU chuyển đổi giữa các nhánh song song của cùng một chương trình, tất cả đều chạy trong một (!) tiến trình duy nhất. Các thread không bị cô lập với nhau và có quyền truy cập vào toàn bộ tài nguyên của tiến trình. Do đó, không tồn tại vấn đề trao đổi dữ liệu riêng biệt giữa các thread—mặc định, tất cả dữ liệu đều được chia sẻ.</text:p>
      <text:p text:style-name="P20">Trong ví dụ từ cktle.otuj ở phần liệt kê bên dưới, các thread của tiến trình được hiển thị theo định dạng kiểu BSD. Tiến trình được chọn bằng PID của nó, PID này trước đó được lấy bằng lệnh pgrep dựa trên tên chương trình đang chạy trong tiến trình mục tiêu.</text:p>
      <text:p text:style-name="P20">Trong kết quả hiển thị, sự tồn tại của các thread trong một tiến trình được thể hiện bằng cờ l (lwp) trong cột STAT, và mỗi dòng không có PID tương ứng với một thread. Do thời gian CPU của một chương trình đa luồng được phân chia giữa các thread, các trạng thái S (sleeping) và R (running/runnable) được báo cáo riêng cho từng thread.</text:p>
      <text:h text:style-name="P23" text:outline-level="5"><text:bookmark text:name="h5-8"/>Process Threads and BSD-Style Output</text:h>
      <table:table table:name="Table9" table:style-name="Table9">
        <table:table-column table:style-name="Table9.A"/>
        <table:table-row>
          <table:table-cell table:style-name="Table9.A1" office:value-type="string">
            <text:p text:style-name="P22">fitz@ubuntu:~$ pgrep firefox</text:p>
            <text:p text:style-name="P22">30315</text:p>
            <text:p text:style-name="P22"/>
            <text:p text:style-name="P22">fitz@ubuntu:~$ ps mp 30315</text:p>
            <text:p text:style-name="P22"><text:s text:c="2"/>PID TTY <text:s text:c="5"/>STAT <text:s text:c="2"/>TIME COMMAND</text:p>
            <text:p text:style-name="P22"><text:s text:c="2"/>PID TTY <text:s text:c="5"/>STAT <text:s text:c="2"/>TIME COMMAND</text:p>
            <text:p text:style-name="P22">30315 ? <text:s text:c="7"/>- <text:s text:c="5"/>0:05 /usr/lib/firefox/firefox -new-window</text:p>
            <text:p text:style-name="P22"><text:s text:c="4"/>- - <text:s text:c="5"/>Sl <text:s text:c="4"/>0:03 -</text:p>
            <text:p text:style-name="P22">...</text:p>
            <text:p text:style-name="P22"><text:s text:c="4"/>- - <text:s text:c="5"/>Sl <text:s text:c="4"/>0:00 -</text:p>
            <text:p text:style-name="P22"><text:s text:c="4"/>- - <text:s text:c="5"/>Sl <text:s text:c="4"/>0:00 -</text:p>
            <text:p text:style-name="P22"><text:s text:c="4"/>- - <text:s text:c="5"/>Sl <text:s text:c="4"/>0:00 -</text:p>
          </table:table-cell>
        </table:table-row>
      </table:table>
      <text:p text:style-name="P20">Danh sách dưới đây hiển thị các thread của một tiến trình theo định dạng kiểu SysV. Tiến trình được chọn dựa trên tên của chương trình thực thi của nó. ID của tiến trình (process ID) được chia sẻ bởi tất cả các thread được hiển thị trong cột PID, định danh duy nhất của từng thread xuất hiện trong cột LWP (đôi khi còn được gọi là TID – thread identifier), và tên tiến trình (hoặc tên riêng của thread, nếu có) được hiển thị trong cột CMD.</text:p>
      <text:h text:style-name="P23" text:outline-level="5"><text:bookmark text:name="h5-9"/><text:soft-page-break/>Process Threads and SYSV-Style Output</text:h>
      <table:table table:name="Table10" table:style-name="Table10">
        <table:table-column table:style-name="Table10.A"/>
        <table:table-row>
          <table:table-cell table:style-name="Table10.A1" office:value-type="string">
            <text:p text:style-name="P20"><text:bookmark text:name="p42"/>fitz@ubuntu:~$ ps -LC firefox<text:line-break/>PID LWP TTY TIME CMD<text:line-break/>30315 30315 ? 00:00:04 firefox<text:line-break/>30315 30320 ? 00:00:00 gmain<text:line-break/>30315 30321 ? 00:00:00 gdbus<text:line-break/>…<text:line-break/>30315 30328 ? 00:00:00 Socket Thread<text:line-break/>30315 30332 ? 00:00:00 Cache2 I/O<text:line-break/>30315 30333 ? 00:00:00 Cookie<text:line-break/>…<text:line-break/>30315 30371 ? 00:00:00 HTML5 Parser<text:line-break/>30315 30373 ? 00:00:00 DNS Resolver #3<text:line-break/>…</text:p>
          </table:table-cell>
        </table:table-row>
      </table:table>
      <text:p text:style-name="P20"/>
      <text:h text:style-name="P39" text:outline-level="3"><text:bookmark text:name="h3-2 Copy 1"/>Process and Thread Creation, Program Executio</text:h>
      <text:p text:style-name="P20">Mặc dù có những khác biệt rõ ràng và lịch sử phát triển riêng biệt, tiến trình và luồng có cùng một mục đích: chúng là các cơ chế để thực thi một chuỗi các lệnh. Thực tế, xét theo nghĩa rộng, luồng đã xuất hiện trong hệ điều hành trước khi có các tiến trình UNIX độc lập; theo thời gian, UNIX đã đưa khái niệm luồng trở lại trong mô hình tiến trình của mình.</text:p>
      <text:p text:style-name="P20">Tiến trình thực thi các chương trình độc lập riêng biệt hoặc các nhánh của một chương trình song song, nhưng trong một môi trường cách ly với tập tài nguyên riêng. Ngược lại, các luồng thực thi các nhánh của cùng một chương trình song song trong một môi trường duy nhất với tập tài nguyên được chia sẻ. Trong nhân Linux đa nhiệm, tồn tại một khái niệm thống nhất gọi là “task”, có thể chia sẻ tài nguyên (bộ nhớ, file đang mở, v.v.) với các task khác, hoặc giữ một số tài nguyên riêng cho chính nó.</text:p>
      <text:p text:style-name="P20">Một tiến trình mới được tạo ra thông qua lời gọi hệ thống fork, trong đó nhân hệ điều hành tạo ra một tiến trình con PID^2—là bản sao chính xác của tiến trình cha PID^1. Gần như toàn bộ bộ nhớ của tiến trình (với một vài ngoại lệ nhỏ)—bao gồm trạng thái, thuộc tính, đặc điểm (ngoại trừ PID), và thậm chí cả nội dung (chương trình và các thư viện)—được kế thừa bởi tiến trình con. Cả tiến trình cha và tiến trình con tiếp tục thực thi từ cùng một lệnh trong cùng một chương trình. Cơ chế sao chép này thường được sử dụng trong các chương trình song song, với các nhánh được thực thi trong các tiến trình con.</text:p>
      <text:p text:style-name="P20">Việc kết thúc tiến trình (ví dụ, khi chương trình kết thúc bình thường) được thực hiện thông qua lời gọi exit(). Tiến trình cha sẽ nhận được tín hiệu SIGCHLD để thông báo rằng tiến trình con đã kết thúc. Trạng thái kết thúc (termination status) được tiến trình con truyền qua lời gọi exit() sẽ được nhân lưu giữ cho đến khi tiến trình cha thu thập nó bằng lời gọi hệ thống wait(); trong khoảng thời gian này, tiến trình con sẽ ở trạng thái Z (zombie).</text:p>
      <text:p text:style-name="P20">Một tiến trình cha có thể kết thúc trước các tiến trình con của nó. Có thể nghĩ rằng tất cả các tiến trình mồ côi (orphan) này sẽ trở thành zombie khi chúng kết thúc, vì không còn tiến trình cha nào để thu thập trạng thái của chúng. Tuy nhiên, thực tế không phải vậy: các tiến trình mồ côi sẽ được nhận nuôi bởi tổ tiên của tất cả các tiến trình, tiến trình init với PID = 1.</text:p>
      <text:p text:style-name="P28"><draw:frame draw:style-name="fr1" draw:name="Image3" text:anchor-type="char" svg:width="5.352in" svg:height="3.5528in" draw:z-index="0"><draw:image xlink:href="Pictures/10000000000002DC000001E692ECAEBE.png" xlink:type="simple" xlink:show="embed" xlink:actuate="onLoad" draw:mime-type="image/png"/></draw:frame><text:soft-page-break/></text:p>
      <text:p text:style-name="P30">Process creation (a) and program execution (b)</text:p>
      <text:h text:style-name="P31" text:outline-level="5"/>
      <text:p text:style-name="P28"><draw:frame draw:style-name="fr1" draw:name="Image4" text:anchor-type="char" svg:width="5.1465in" svg:height="4.402in" draw:z-index="1"><draw:image xlink:href="Pictures/1000000000000200000001B63856CD65.png" xlink:type="simple" xlink:show="embed" xlink:actuate="onLoad" draw:mime-type="image/png"/></draw:frame></text:p>
      <text:p text:style-name="P30">Launching a program in a separate process</text:p>
      <text:p text:style-name="P20"><text:span text:style-name="T9">Danh sách sau đây minh họa một lệnh shell được khởi chạy </text:span><text:span text:style-name="Strong_20_Emphasis"><text:span text:style-name="T9">ở chế độ nền</text:span></text:span><text:span text:style-name="T9"> bằng cách sử dụng danh sách bất đồng bộ. Giống như các ví dụ trước, shell sử dụng </text:span><text:span text:style-name="Strong_20_Emphasis"><text:span text:style-name="T9">fork-and-exec</text:span></text:span><text:span text:style-name="T9"> để khởi chạy </text:span><text:soft-page-break/><text:span text:style-name="T9">chương trình trong một tiến trình con có </text:span><text:span text:style-name="Strong_20_Emphasis"><text:span text:style-name="T9">PID 23228</text:span></text:span><text:span text:style-name="T9">, nhưng thay vì chờ nó kết thúc thông qua </text:span><text:span text:style-name="Strong_20_Emphasis"><text:span text:style-name="T9">wait</text:span></text:span><text:span text:style-name="T9">, shell ngay lập tức ❶ </text:span><text:span text:style-name="Strong_20_Emphasis"><text:span text:style-name="T9">trở lại chế độ tương tác</text:span></text:span><text:span text:style-name="T9">, thông báo cho người dùng biết </text:span><text:span text:style-name="Strong_20_Emphasis"><text:span text:style-name="T9">PID của tiến trình được tạo</text:span></text:span><text:span text:style-name="T9"> và </text:span><text:span text:style-name="Strong_20_Emphasis"><text:span text:style-name="T9">số công việc nền</text:span></text:span><text:span text:style-name="T9"> “[1]”. Sau đó, shell sẽ nhận thông báo về việc tiến trình con kết thúc thông qua </text:span><text:span text:style-name="Strong_20_Emphasis"><text:span text:style-name="T9">tín hiệu SIGCHLD</text:span></text:span><text:span text:style-name="T9"> và sẽ in ra một thông báo ❷ cho biết </text:span><text:span text:style-name="Strong_20_Emphasis"><text:span text:style-name="T9">công việc nền đã hoàn tất</text:span></text:span><text:span text:style-name="T9">.</text:span></text:p>
      <text:h text:style-name="P32" text:outline-level="5"><text:bookmark text:name="h5-10"/>Running Programs in the Background</text:h>
      <table:table table:name="Table11" table:style-name="Table11">
        <table:table-column table:style-name="Table11.A"/>
        <table:table-row>
          <table:table-cell table:style-name="Table11.A1" office:value-type="string">
            <text:p text:style-name="P40"><text:bookmark text:name="p51"/>fitz@ubuntu:~$ dd if=/dev/dvd of=plan9.iso &amp;</text:p>
            <text:p text:style-name="P42"><text:bookmark text:name="p52"/>❶ [1] 23228</text:p>
            <text:p text:style-name="P42"><text:line-break/>fitz@ubuntu:~ ps f<text:line-break/>PID TTY STAT TIME COMMAND<text:line-break/>23025 pts/1 S <text:s text:c="4"/>0:00 -bash<text:line-break/>23228 pts/1 R <text:s text:c="3"/>1:23 _ dd if=/dev/dvd of=plan9.iso<text:line-break/>23230 pts/1 R+ <text:s/>0:00 _ ps f</text:p>
            <text:p text:style-name="P42"><text:line-break/>fitz@ubuntu:~<text:line-break/>…</text:p>
            <text:p text:style-name="P42"><text:line-break/>fitz@ubuntu:~$ 586896+0 records in<text:line-break/>586896+0 records out<text:line-break/>300490752 bytes (300 MB, 286 MiB) copied, 14.6916 s, 20.5 MB/s</text:p>
            <text:p text:style-name="P41"><text:bookmark text:name="p53"/>❷ [1]+ Done dd if=/dev/dvd of=plan9.iso</text:p>
          </table:table-cell>
        </table:table-row>
      </table:table>
      <text:p text:style-name="P20"><text:span text:style-name="T9">Danh sách sau đây minh họa một </text:span><text:span text:style-name="Strong_20_Emphasis"><text:span text:style-name="T9">pipeline của shell</text:span></text:span><text:span text:style-name="T9"> tìm kiếm từ thư mục </text:span><text:span text:style-name="Source_20_Text"><text:span text:style-name="T7">/usr/share/doc</text:span></text:span><text:span text:style-name="T9"> xuống để xác định </text:span><text:span text:style-name="Strong_20_Emphasis"><text:span text:style-name="T9">tệp lớn nhất có hậu tố .html</text:span></text:span><text:span text:style-name="T9">. Nó được thực hiện thông qua </text:span><text:span text:style-name="Strong_20_Emphasis"><text:span text:style-name="T9">fork-and-exec</text:span></text:span><text:span text:style-name="T9"> dưới dạng </text:span><text:span text:style-name="Strong_20_Emphasis"><text:span text:style-name="T9">bốn tiến trình con được tạo đồng thời</text:span></text:span><text:span text:style-name="T9">, mỗi tiến trình chạy chương trình tương ứng với giai đoạn của pipeline, và các tiến trình con được kết nối bằng </text:span><text:span text:style-name="Strong_20_Emphasis"><text:span text:style-name="T9">các pipe không tên</text:span></text:span><text:span text:style-name="T9"> — hình thức đơn giản nhất của </text:span><text:span text:style-name="Strong_20_Emphasis"><text:span text:style-name="T9">giao tiếp liên tiến trình (IPC)</text:span></text:span><text:span text:style-name="T9">. Lệnh </text:span><text:span text:style-name="Strong_20_Emphasis"><text:span text:style-name="T9">wait</text:span></text:span><text:span text:style-name="T9"> tích hợp sẵn trong shell thực thi </text:span><text:span text:style-name="Strong_20_Emphasis"><text:span text:style-name="T9">hàm gọi hệ thống wait</text:span></text:span><text:span text:style-name="T9"> và được sử dụng để chờ tất cả các tiến trình con trong pipeline, vốn được khởi chạy hoàn toàn </text:span><text:span text:style-name="Strong_20_Emphasis"><text:span text:style-name="T9">ở chế độ nền</text:span></text:span><text:span text:style-name="T9">.</text:span></text:p>
      <text:h text:style-name="P17" text:outline-level="5"><text:bookmark text:name="h5-11"/>Launching Interacting Programs in Parallel</text:h>
      <table:table table:name="Table26" table:style-name="Table26">
        <table:table-column table:style-name="Table26.A"/>
        <table:table-row>
          <table:table-cell table:style-name="Table26.A1" office:value-type="string">
            <text:p text:style-name="P43">fitz@ubuntu:~$ find /usr/share/doc -type f -name '*.html' | xargs -n1 wc -l | sort -k 1 -nr | head -1 &amp;<text:line-break/>[1] 12827</text:p>
            <text:p text:style-name="P43"><text:line-break/>fitz@ubuntu:~$ ps f<text:line-break/>PPID PID PGID SID TTY TPGID STAT UID TIME COMMAND<text:line-break/>11715 11716 11716 9184 pts/0 14699 S 1006 0:01 -bash<text:line-break/>11716 12824 12824 9184 pts/0 14699 R 1006 0:00 _ find … -type f -name *.html<text:line-break/>11716 12825 12824 9184 pts/0 14699 R 1006 0:00 _ xargs -n1 wc -l<text:line-break/>11716 12826 12824 9184 pts/0 14699 S 1006 0:00 _ sort -k 1 -nr<text:line-break/><text:soft-page-break/>11716 12827 12824 9184 pts/0 14699 S 1006 0:00 _ head -1<text:line-break/>11716 14699 14699 9184 pts/0 14699 R+ 1006 0:00 _ ps f</text:p>
            <text:p text:style-name="P33">fitz@ubuntu:~$ wait<text:line-break/>15283 /usr/share/doc/xterm/xterm.log.html<text:line-break/>[1]+ Done find /usr/share/doc -type f -name '*.html' | xargs -n1 wc -l | sort -k 1 -nr | head -1</text:p>
          </table:table-cell>
        </table:table-row>
      </table:table>
      <text:h text:style-name="P35" text:outline-level="3"/>
      <text:h text:style-name="P39" text:outline-level="3"><text:bookmark text:name="h3-3"/>Parallel multi-process programs</text:h>
      <text:p text:style-name="P20"><text:span text:style-name="T9">Như đã đề cập trước đó, các chương trình </text:span><text:span text:style-name="Strong_20_Emphasis"><text:span text:style-name="T9">song song</text:span></text:span><text:span text:style-name="T9"> thường sử dụng </text:span><text:span text:style-name="Strong_20_Emphasis"><text:span text:style-name="T9">tiến trình</text:span></text:span><text:span text:style-name="T9"> để chạy các nhánh thực thi riêng biệt. Các </text:span><text:span text:style-name="Strong_20_Emphasis"><text:span text:style-name="T9">dịch vụ mạng</text:span></text:span><text:span text:style-name="T9"> thường thuộc loại này — ví dụ, </text:span><text:span text:style-name="Strong_20_Emphasis"><text:span text:style-name="T9">máy chủ cơ sở dữ liệu PostgreSQL</text:span></text:span><text:span text:style-name="T9">, </text:span><text:span text:style-name="Strong_20_Emphasis"><text:span text:style-name="T9">dịch vụ truy cập từ xa SSH</text:span></text:span><text:span text:style-name="T9">, và các phần mềm tương tự. Danh sách sau đây cho thấy </text:span><text:span text:style-name="Strong_20_Emphasis"><text:span text:style-name="T9">chương trình postgres</text:span></text:span><text:span text:style-name="T9"> đang chạy dưới dạng </text:span><text:span text:style-name="Strong_20_Emphasis"><text:span text:style-name="T9">sáu tiến trình song song</text:span></text:span><text:span text:style-name="T9">: một tiến trình là </text:span><text:span text:style-name="Strong_20_Emphasis"><text:span text:style-name="T9">master</text:span></text:span><text:span text:style-name="T9"> ❶, bốn tiến trình là </text:span><text:span text:style-name="Strong_20_Emphasis"><text:span text:style-name="T9">phụ trợ (auxiliary)</text:span></text:span><text:span text:style-name="T9"> ❷, và một tiến trình khác ❸ được tạo ra khi </text:span><text:span text:style-name="Strong_20_Emphasis"><text:span text:style-name="T9">người dùng fitz kết nối với cơ sở dữ liệu fitz</text:span></text:span><text:span text:style-name="T9"> có cùng tên. Khi các người dùng khác kết nối với máy chủ, các </text:span><text:span text:style-name="Strong_20_Emphasis"><text:span text:style-name="T9">tiến trình con mới</text:span></text:span><text:span text:style-name="T9"> được tạo để xử lý yêu cầu của họ — </text:span><text:span text:style-name="Strong_20_Emphasis"><text:span text:style-name="T9">mỗi kết nối một tiến trình</text:span></text:span></text:p>
      <text:h text:style-name="P17" text:outline-level="5"><text:bookmark text:name="h5-12"/>Parallel Multi-Process Services</text:h>
      <table:table table:name="Table12" table:style-name="Table12">
        <table:table-column table:style-name="Table12.A"/>
        <table:table-row>
          <table:table-cell table:style-name="Table12.A1" office:value-type="string">
            <text:p text:style-name="P22">fitz@ubuntu:~$ ps f -C postgres</text:p>
            <text:p text:style-name="P22"><text:s text:c="2"/>PID TTY <text:s text:c="5"/>STAT <text:s text:c="2"/>TIME COMMAND</text:p>
            <text:p text:style-name="P22">❶ <text:s/>6711 ? <text:s text:c="7"/>S <text:s text:c="5"/>0:00 <text:s text:c="5"/>/usr/lib/postgresql/11/bin/postgres -D /var/lib/postgresql…</text:p>
            <text:p text:style-name="P22">❷ <text:s/>6713 ? <text:s text:c="7"/>Ss <text:s text:c="4"/>0:00 <text:s text:c="4"/>_ postgres: 11/main: checkpointer</text:p>
            <text:p text:style-name="P22">│ <text:s/>6714 ? <text:s text:c="7"/>Ss <text:s text:c="4"/>0:00 <text:s text:c="4"/>\_ postgres: 11/main: background writer</text:p>
            <text:p text:style-name="P22">│ <text:s/>6715 ? <text:s text:c="7"/>Ss <text:s text:c="4"/>0:00 <text:s text:c="4"/>\_ postgres: 11/main: walwriter</text:p>
            <text:p text:style-name="P22">│ <text:s/>6716 ? <text:s text:c="7"/>Ss <text:s text:c="4"/>0:00 <text:s text:c="4"/>\_ postgres: 11/main: autovacuum launcher</text:p>
            <text:p text:style-name="P22">│ <text:s/>6717 ? <text:s text:c="7"/>Ss <text:s text:c="4"/>0:00 <text:s text:c="3"/>\_ postgres: 11/main: stats collector</text:p>
            <text:p text:style-name="P22">6718 ? <text:s text:c="12"/>Ss <text:s text:c="4"/>0:00 <text:s text:c="3"/>\_ postgres: 11/main: logical replication launcher</text:p>
            <text:p text:style-name="P22">❸ <text:s/>9443 ? <text:s text:c="7"/>Ss <text:s text:c="4"/>0:00 <text:s text:c="3"/>_ postgres: 11/main: fitz <text:s/>fitz [local] idle</text:p>
            <text:p text:style-name="P22"/>
            <text:p text:style-name="P22">fitz@ubuntu:~$ ssh ubuntu</text:p>
            <text:p text:style-name="P22">fitz@ubuntu’s password:</text:p>
            <text:p text:style-name="P22">…</text:p>
            <text:p text:style-name="P22">Last login: Sat Nov 21 13:29:33 2015 from localhost</text:p>
            <text:p text:style-name="P22"/>
            <text:p text:style-name="P22">fitz@ubuntu:~$ ps f -C sshd</text:p>
            <text:p text:style-name="P22"><text:soft-page-break/><text:s text:c="5"/>PID <text:s text:c="2"/>TTY <text:s text:c="2"/>STAT <text:s text:c="2"/>TIME COMMAND</text:p>
            <text:p text:style-name="P22">① 655 <text:s text:c="4"/>? <text:s text:c="7"/>Ss <text:s text:c="4"/>0:00 /usr/sbin/sshd -D</text:p>
            <text:p text:style-name="P22">② 21975 ? <text:s text:c="7"/>Ss <text:s text:c="4"/>0:00 <text:s text:c="3"/>_ sshd: fitz [priv]</text:p>
            <text:p text:style-name="P22">③ 22086 ? <text:s text:c="7"/>S <text:s text:c="5"/>0:00 <text:s text:c="3"/>_ sshd: fitz@pts/1</text:p>
            <text:p text:style-name="P22"/>
            <text:p text:style-name="P22">fitz@ubuntu:~$ ^D</text:p>
            <text:p text:style-name="P22">logout</text:p>
            <text:p text:style-name="P22">Connection to ubuntu closed.</text:p>
          </table:table-cell>
        </table:table-row>
      </table:table>
      <text:p text:style-name="P29">Tương tự, với truy cập từ xa qua SSH, daemon sshd chạy như một bộ điều phối ① trong một tiến trình chính; đối với mỗi kết nối đến, nó tạo ra một tiến trình con ②, sau khi hoàn tất xác thực và phân quyền người dùng, sẽ tạo ra thêm một tiến trình con ③, tiến trình này đảm nhận quyền của người dùng và phục vụ phiên làm việc.</text:p>
      <text:p text:style-name="P29"/>
      <text:h text:style-name="P39" text:outline-level="3"><text:bookmark text:name="h3-4"/>Parallel Multithreaded Programs</text:h>
      <text:p text:style-name="P20">Trong Linux, quản lý luồng sử dụng giao diện chuẩn POSIX pthreads, được triển khai bởi thư viện W:[NPTL], là một phần của libc. Giao diện này cung cấp lời gọi tạo luồng pthread_create, tương tự một cách lỏng lẻo với fork và exec ở cấp tiến trình, lời gọi kết thúc luồng pthread_exit, tương tự lỏng lẻo với exit, và lời gọi để lấy trạng thái kết thúc của một luồng pthread_join, tương tự lỏng lẻo với wait.</text:p>
      <text:p text:style-name="P20">Các ví dụ điển hình về việc sử dụng luồng bao gồm các dịch vụ mạng xử lý các yêu cầu của client song song bằng các luồng thay vì tiến trình. Ví dụ, máy chủ web Apache, như được thể hiện trong danh sách dưới đây, chạy hai tiến trình đa luồng với mỗi tiến trình có 27 luồng. Điều này tiết kiệm bộ nhớ — vì tất cả các luồng trong một tiến trình chia sẻ cùng một không gian địa chỉ — đồng thời phục vụ một số lượng lớn các kết nối client đồng thời.</text:p>
      <text:h text:style-name="P23" text:outline-level="5"><text:bookmark text:name="h5-13"/>Parallel Multithreaded Services</text:h>
      <table:table table:name="Table13" table:style-name="Table13">
        <table:table-column table:style-name="Table13.A"/>
        <table:table-row>
          <table:table-cell table:style-name="Table13.A1" office:value-type="string">
            <text:p text:style-name="P20">fitz@ubuntu:~$ ps f -C apache2<text:line-break/>PID TTY STAT TIME COMMAND<text:line-break/>10129 ? Ss 0:00 /usr/sbin/apache2 -k start<text:line-break/>10131 ? Sl 0:00 _ /usr/sbin/apache2 -k start<text:line-break/>10132 ? Sl 0:00 _ /usr/sbin/apache2 -k start</text:p>
            <text:p text:style-name="P20">fitz@ubuntu:~$ ps f -o pid,nlwp,cmd -C apache2<text:line-break/>PID NLWP CMD<text:line-break/>10129 1 /usr/sbin/apache2 -k start<text:line-break/>10131 27 _ /usr/sbin/apache2 -k start<text:line-break/>10132 27 _ /usr/sbin/apache2 -k start</text:p>
            <text:p text:style-name="P20">fitz@ubuntu:~$ ps -fLC rsyslogd<text:line-break/>UID PID PPID LWP C NLWP STIME TTY TIME CMD<text:line-break/>syslog 606 1 606 0 4 Nov18 ? 00:00:00 /usr/sbin/rsyslogd -n -iNONE<text:line-break/><text:soft-page-break/>syslog 606 1 680 0 4 Nov18 ? 00:00:00 /usr/sbin/rsyslogd -n -iNONE<text:line-break/>syslog 606 1 681 0 4 Nov18 ? 00:00:00 /usr/sbin/rsyslogd -n -iNONE<text:line-break/>syslog 606 1 682 0 4 Nov18 ? 00:00:00 /usr/sbin/rsyslogd -n -iNONE</text:p>
          </table:table-cell>
        </table:table-row>
      </table:table>
      <text:p text:style-name="P29">Tương tự, dịch vụ ghi nhật ký sự kiện tập trung rsyslogd sử dụng các luồng để thu thập các sự kiện từ nhiều nguồn một cách song song, xử lý chúng và ghi vào các tệp nhật ký. Một luồng đọc các thông điệp của kernel từ /proc/kmsg, một luồng khác nhận các sự kiện từ các dịch vụ khác thông qua Unix domain socket /run/systemd/journal/syslog (hoặc /dev/log trên các hệ thống cũ, trước systemd), và một luồng thứ ba lọc luồng sự kiện đến và ghi vào các tệp nhật ký dưới /var/log/*, v.v. Việc xử lý song song các luồng sự kiện đến bằng các luồng được thực hiện với chi phí tối thiểu, cho phép thông lượng rất cao về số lượng thông điệp được xử lý trên mỗi giây.</text:p>
      <text:p text:style-name="P29">Song song hóa không chỉ được sử dụng để chạy các nhánh của một chương trình song song gần như đồng thời trên một CPU đơn, mà còn để chạy chúng thực sự đồng thời trên nhiều lõi CPU. Ví dụ tiếp theo cho thấy thời gian nén một tệp ISO giảm xuống khi sử dụng trình nén song song pbzip2 so với bzip2 đơn luồng. Để đo thời gian nén, lệnh built-in time của shell được sử dụng: đầu tiên chúng ta đo thời gian nén ❶ và thời gian giải nén ❷ với trình nén tuần tự, sau đó đo thời gian nén ① và giải nén ② với trình nén song song. Các lệnh nén được khởi chạy ở chế độ nền; sau đó chúng ta kiểm tra các tiến trình và luồng của các trình nén; sau đó chúng được đưa lên tiền cảnh bằng lệnh built-in fg của shell và thời gian trôi qua được ghi nhận.</text:p>
      <text:h text:style-name="P17" text:outline-level="5"><text:bookmark text:name="h5-14"/>Parallel, Multithreaded Utilities</text:h>
      <table:table table:name="Table14" table:style-name="Table14">
        <table:table-column table:style-name="Table14.A"/>
        <table:table-row>
          <table:table-cell table:style-name="Table14.A1" office:value-type="string">
            <text:p text:style-name="P20">fitz@ubuntu:~$ ls -lh plan9.iso<text:line-break/>-rw-r--r-- 1 fitz fitz 287M Nov 28 15:47 plan9.iso ❶</text:p>
            <text:p text:style-name="P20">fitz@ubuntu:~$ time bzip2 plan9.iso &amp;<text:line-break/>[1] 5545</text:p>
            <text:p text:style-name="P20">fitz@ubuntu:~$ ps f<text:line-break/>PID TTY STAT TIME COMMAND<text:line-break/>4637 pts/0 S 0:00 -bash<text:line-break/>5545 pts/0 S 0:00 _ -bash<text:line-break/>5546 pts/0 R 0:12 _ bzip2 plan9.iso<text:line-break/>5548 pts/0 R+ 0:00 _ ps f</text:p>
            <text:p text:style-name="P20">fitz@ubuntu:~$ ps -fLp 5546<text:line-break/>UID PID PPID LWP C NLWP STIME TTY TIME CMD<text:line-break/>fitz 5546 5545 5546 96 1 10:50 pts/0 00:00:22 bzip2 plan9.iso</text:p>
            <text:p text:style-name="P20">fitz@ubuntu:~$ fg<text:line-break/>time bzip2 plan9.iso</text:p>
            <text:p text:style-name="P20">real 0m54.780s<text:line-break/>user 0m51.772s<text:line-break/>sys 0m0.428s</text:p>
            <text:p text:style-name="P20">fitz@ubuntu:~$ ls -lh plan9.iso.bz2<text:line-break/>-rw-r--r-- 1 fitz fitz 89M Nov 28 15:47 plan9.iso.bz2 ❷</text:p>
            <text:p text:style-name="P20"><text:soft-page-break/>fitz@ubuntu:~$ time bzip2 -d plan9.iso.bz2</text:p>
            <text:p text:style-name="P20">real 0m20.705s<text:line-break/>user 0m19.044s<text:line-break/>sys 0m1.168s</text:p>
            <text:p text:style-name="P20">① fitz@ubuntu:~$ time pbzip2 plan9.iso &amp;<text:line-break/>[1] 5571</text:p>
            <text:p text:style-name="P20">fitz@ubuntu:~$ ps f<text:line-break/>PID TTY STAT TIME COMMAND<text:line-break/>4637 pts/0 S 0:00 -bash<text:line-break/>5571 pts/0 S 0:00 -bash<text:line-break/>5572 pts/0 Sl 0:03 _ pbzip2 plan9.iso<text:line-break/>5580 pts/0 R+ 0:00 _ ps f</text:p>
            <text:p text:style-name="P20">fitz@ubuntu:~$ ps -fLp 5572<text:line-break/>UID PID PPID LWP C NLWP STIME TTY TIME CMD<text:line-break/>fitz 5572 5571 5578 92 8 10:52 pts/0 00:00:43 pbzip2 plan9.iso<text:line-break/>fitz 5572 5571 5579 1 8 10:52 pts/0 00:00:00 pbzip2 plan9.iso</text:p>
            <text:p text:style-name="P20">fitz@ubuntu:~$ fg<text:line-break/>time pbzip2 plan9.iso</text:p>
            <text:p text:style-name="P20">real 0m24.259s<text:line-break/>user 1m22.940s<text:line-break/>sys 0m1.888s</text:p>
            <text:p text:style-name="P20">fitz@ubuntu:~$ ls -lh plan9.iso.bz2<text:line-break/>-rw-r--r-- 1 fitz fitz 89M Nov 28 15:47 plan9.iso.bz2 ②</text:p>
            <text:p text:style-name="P20">fitz@ubuntu:~$ time pbzip2 -d plan9.iso.bz2</text:p>
            <text:p text:style-name="P20">real 0m7.384s<text:line-break/>user 0m25.972s<text:line-break/>sys 0m1.396s</text:p>
          </table:table-cell>
        </table:table-row>
      </table:table>
      <text:p text:style-name="P29">Đánh giá cho thấy bộ nén bzip2 đơn luồng chạy dưới dạng một tiến trình đơn luồng và mất khoảng 54,7 giây đồng hồ thực để nén, trong đó chiếm khoảng 51,7 giây ở chế độ người dùng (user mode) và chỉ khoảng 0,4 giây ở chế độ nhân hệ thống (kernel sys mode, thực hiện các lệnh hệ thống như read hoặc write). Tỷ lệ này cho thấy chương trình bị chi phối bởi tính toán (compute-bound): thời gian CPU dành cho việc nén vượt xa thời gian I/O để đọc đầu vào và ghi đầu ra. Nói cách khác, tải CPU của bộ nén (nếu đây là khối lượng công việc duy nhất) gần đạt tối đa trên một lõi, và việc triển khai song song cố gắng lập lịch giả đồng thời các luồng (thường hầu như không bao giờ bị chặn) là không hợp lý.</text:p>
      <text:p text:style-name="P29">Bộ nén song song pbzip2 chạy dưới dạng một tiến trình đa luồng với tám luồng và mất khoảng 24,4 giây đồng hồ thực để nén, chiếm khoảng 1 phút 22,9 giây (!) ở chế độ người dùng và khoảng 1,8 giây ở chế độ nhân. Tốc độ tăng—và do đó thời gian nén giảm—đến từ việc thực thi song song thực sự các luồng trên nhiều bộ xử lý (lõi CPU riêng biệt). Thực tế là tổng thời gian CPU ở chế độ người dùng gấp khoảng ba lần thời gian đồng hồ thực ngụ ý mức độ song song trung bình xấp xỉ ba lõi CPU được sử dụng cho công việc nén.</text:p>
      <text:p text:style-name="P29"><text:soft-page-break/></text:p>
      <text:h text:style-name="P39" text:outline-level="3"><text:bookmark text:name="h3-5"/>The Duality of Processes and Threads in Linux</text:h>
      <text:p text:style-name="P20">Như đã đề cập trước đó, trong nhân Linux cả tiến trình và luồng đều được thống nhất dưới khái niệm chung “task” (tác vụ). Một task chia sẻ toàn bộ tài nguyên của nó (bộ nhớ, tệp mở, v.v.) với các task khác được coi là một luồng. Ngược lại, các task có bộ tài nguyên riêng tư của mình được coi là tiến trình.</text:p>
      <text:p text:style-name="P20">Lệnh hệ thống tổng quát clone cho phép bạn chỉ định tài nguyên nào sẽ được chia sẻ giữa task cha và task con, và tài nguyên nào sẽ vẫn riêng tư. Trong Linux, lệnh tạo tiến trình theo chuẩn POSIX là fork và lệnh tạo luồng theo chuẩn POSIX là pthread_create chỉ là những lớp bao mỏng xung quanh clone, như minh họa trong hai ví dụ tiếp theo.</text:p>
      <text:p text:style-name="P20">Trong ví dụ đầu tiên, chương trình nén tar (PID 11801) sử dụng lệnh hệ thống clone để tạo một tiến trình con (PID 11802) và sau đó chạy bộ nén gzip trong tiến trình con đó thông qua execve. Khi hai tiến trình hợp tác này chạy song song, chúng tạo ra tệp lưu trữ nén docs.tgz từ thư mục /usr/share/doc.</text:p>
      <text:h text:style-name="P23" text:outline-level="5"><text:bookmark text:name="h5-15"/>The clone() system call: spawning a new process</text:h>
      <table:table table:name="Table15" table:style-name="Table15">
        <table:table-column table:style-name="Table15.A"/>
        <table:table-row>
          <table:table-cell table:style-name="Table15.A1" office:value-type="string">
            <text:p text:style-name="P20">fitz@ubuntu:~$ strace -fe clone,fork,execve tar czf docs.tgz /usr/share/doc<text:line-break/>execve("/usr/bin/tar", ["tar", "czf", "docs.tgz", "/usr/share/doc"], … ) = 0<text:line-break/>clone(child_stack=NULL, flags=CLONE_CHILD_CLEARTID|CLONE_CHILD_SETTID| …) = 12403<text:line-break/>tar: Removing leading /' from member names<text:line-break/>strace: Process 12403 attached<text:line-break/>[pid 12403] execve("/bin/sh", ["/bin/sh", "-c", "gzip"], 0x7ffd8dd597c0 …) = 0<text:line-break/>[pid 12403] clone(child_stack=NULL, flags=CLONE_CHILD_CLEARTID| …) = 12404<text:line-break/>strace: Process 12404 attached<text:line-break/>[pid 12404] execve("/usr/bin/gzip", ["gzip"], 0x55e2e45bbb48 /* 35 vars */) = 0</text:p>
            <text:p text:style-name="P20">…<text:line-break/>+++ exited with 0 +++</text:p>
          </table:table-cell>
        </table:table-row>
      </table:table>
      <text:p text:style-name="P20">Trong ví dụ từ danh sách tiếp theo, trình nén pbzip2 sử dụng gọi hệ thống clone để tạo bảy luồng con ❶…❼ (PID 12514–12520) chia sẻ bộ nhớ (CLONE_VM), các mô tả tệp mở (CLONE_FILES), và các tài nguyên khác.</text:p>
      <text:h text:style-name="P23" text:outline-level="5"><text:bookmark text:name="h5-16"/>The clone() System Call: Spawning a New Thread</text:h>
      <table:table table:name="Table16" table:style-name="Table16">
        <table:table-column table:style-name="Table16.A"/>
        <table:table-row>
          <table:table-cell table:style-name="Table16.A1" office:value-type="string">
            <text:p text:style-name="P20">fitz@ubuntu:~$ strace -fe clone,fork,execve pbzip2 plan9.iso<text:line-break/>execve("/usr/bin/pbzip2", ["pbzip2", "plan9.iso"], 0x7ffd28884938 /* 35 vars */) = 0<text:line-break/>❶ clone(child_stack=0x7f1d46d38fb0, flags=CLONE_VM|CLONE_FS|CLONE_FILES|… ) = 12514<text:line-break/>…<text:line-break/>❼ clone(child_stack=0x7f1d46537fb0, flags=CLONE_VM|CLONE_FS|CLONE_FILES|…) = 12520<text:line-break/>strace: Process 12520 attached<text:line-break/>…<text:line-break/>strace: Process 12514 attached<text:line-break/><text:soft-page-break/>[pid 12514] + exited with 0 +<text:line-break/>…<text:line-break/>[pid 12520] + exited with 0 +<text:line-break/>+++ exited with 0 +++</text:p>
          </table:table-cell>
        </table:table-row>
      </table:table>
      <text:h text:style-name="P38" text:outline-level="2"/>
      <text:h text:style-name="P37" text:outline-level="2"><text:bookmark text:name="h2-3"/>Process Tree</text:h>
      <text:p text:style-name="P20"><text:span text:style-name="T9">Các tiến trình được liên kết theo cặp cha–con tạo thành cây tiến trình của hệ điều hành. Tiến trình đầu tiên, </text:span><text:span text:style-name="Strong_20_Emphasis"><text:span text:style-name="T9">init</text:span></text:span><text:span text:style-name="T9"> — tổ tiên của tất cả các tiến trình — được kernel tạo ra sau khi khởi tạo và sau khi hệ thống tập tin gốc (root filesystem) được gắn kết, tại thời điểm này chương trình </text:span><text:span text:style-name="Source_20_Text"><text:span text:style-name="T7">/sbin/init</text:span></text:span><text:span text:style-name="T9"> được nạp (trên các hệ thống hiện đại, đây là một liên kết tượng trưng tới thực thể </text:span><text:span text:style-name="Source_20_Text"><text:span text:style-name="T7">/lib/systemd/systemd</text:span></text:span><text:span text:style-name="T9">). Tiến trình tổ tiên này luôn có </text:span><text:span text:style-name="Strong_20_Emphasis"><text:span text:style-name="T9">PID = 1</text:span></text:span><text:span text:style-name="T9">, và nhiệm vụ chính của nó là khởi động các dịch vụ hệ thống khác nhau, bao gồm các trình xử lý getty để truy cập bảng điều khiển văn bản, trình quản lý hiển thị đồ họa, dịch vụ truy cập từ xa SSH, và các dịch vụ khác (xem Chương 10). Ngoài ra, </text:span><text:span text:style-name="Strong_20_Emphasis"><text:span text:style-name="T9">systemd</text:span></text:span><text:span text:style-name="T9"> nhận nuôi các tiến trình mồ côi và giám sát các dịch vụ mà nó khởi chạy, khởi động lại chúng nếu chúng bị sự cố.</text:span></text:p>
      <text:p text:style-name="P11"><text:span text:style-name="T3">Ví dụ trong danh sách tiếp theo hiển thị một cây tiến trình được xây dựng bằng tiện ích </text:span><text:span text:style-name="Strong_20_Emphasis"><text:span text:style-name="T3">pstree</text:span></text:span><text:span text:style-name="T3">, trong khi danh sách “Kernel processes, daemons, and application processes” trình bày cái nhìn cổ điển về cây tiến trình sử dụng lệnh </text:span><text:span text:style-name="Strong_20_Emphasis"><text:span text:style-name="T3">ps</text:span></text:span><text:span text:style-name="T3">.</text:span></text:p>
      <text:p text:style-name="P16">Pro<text:span text:style-name="T13">cesses Tree</text:span></text:p>
      <table:table table:name="Table17" table:style-name="Table17">
        <table:table-column table:style-name="Table17.A"/>
        <table:table-row table:style-name="Table17.1">
          <table:table-cell table:style-name="Table17.A1" office:value-type="string">
            <text:p text:style-name="P22">fitz@ubuntu:~$ pstree -cnAhT<text:line-break/>systemd-+-systemd-journal<text:line-break/>❷ |-systemd-udevd<text:line-break/>❷ |-systemd-resolve<text:line-break/>❷ |-rsyslogd<text:line-break/>…<text:line-break/>|-gdm3—gdm-session-wor-+-gdm-session-wor<text:line-break/>| |-gdm-x-session-+-Xorg<text:line-break/>| | -gnome-session-b<text:line-break/>…<text:line-break/>|-systemd-+-(sd-pam)<text:line-break/>…<text:line-break/>| |-gnome-terminal--+-bash---man---pager ❸<text:line-break/>| |-bash<text:line-break/>…<text:line-break/>❷ |-postgres-+-postgres<text:line-break/>| |-postgres<text:line-break/>| |-postgres<text:line-break/>| |-postgres<text:line-break/>| |-postgres<text:line-break/>| -postgres<text:line-break/>❷ |-apache2-+-apache2<text:line-break/>|-apache2<text:line-break/>…<text:line-break/><text:soft-page-break/>❷ |-sshd-+-sshd—sshd—bash<text:line-break/>| `-sshd—sshd—bash<text:line-break/>…<text:line-break/>|-agetty<text:line-break/>|-login—bash—pstree ❸</text:p>
          </table:table-cell>
        </table:table-row>
      </table:table>
      <text:p text:style-name="P29">Các tiến trình của hệ điều hành thường được phân loại thành tiến trình hệ thống (kernel), tiến trình nền (daemons) và tiến trình ứng dụng, dựa trên vai trò và đặc điểm của chúng (xem danh sách “Kernel processes, daemons, application processes”).</text:p>
      <text:p text:style-name="P11"><text:span text:style-name="T3">Các tiến trình ứng dụng ❸ chạy các chương trình người dùng thông thường (ví dụ, tiện ích </text:span><text:span text:style-name="Strong_20_Emphasis"><text:span text:style-name="T3">man</text:span></text:span><text:span text:style-name="T3">). Mỗi tiến trình được cấp một không gian bộ nhớ riêng, với kích thước được hiển thị trong cột </text:span><text:span text:style-name="Strong_20_Emphasis"><text:span text:style-name="T3">VSZ</text:span></text:span><text:span text:style-name="T3"> của lệnh </text:span><text:span text:style-name="Strong_20_Emphasis"><text:span text:style-name="T3">ps</text:span></text:span><text:span text:style-name="T3">. Những tiến trình này thường tương tác với người dùng qua một terminal điều khiển (trừ các chương trình đồ họa), được hiển thị trong cột </text:span><text:span text:style-name="Strong_20_Emphasis"><text:span text:style-name="T3">TTY</text:span></text:span><text:span text:style-name="T3">.</text:span></text:p>
      <text:p text:style-name="P7"><text:span text:style-name="T3">Các tiến trình nền (daemons) ❷ chạy các chương trình hệ thống cung cấp các dịch vụ khác nhau của hệ điều hành. Ví dụ: </text:span><text:span text:style-name="Strong_20_Emphasis"><text:span text:style-name="T3">cron</text:span></text:span><text:span text:style-name="T3"> thực hiện lập lịch các công việc định kỳ, </text:span><text:span text:style-name="Strong_20_Emphasis"><text:span text:style-name="T3">atd</text:span></text:span><text:span text:style-name="T3"> xử lý các công việc hoãn, </text:span><text:span text:style-name="Strong_20_Emphasis"><text:span text:style-name="T3">rsyslogd</text:span></text:span><text:span text:style-name="T3"> cung cấp ghi nhật ký tập trung, </text:span><text:span text:style-name="Strong_20_Emphasis"><text:span text:style-name="T3">sshd</text:span></text:span><text:span text:style-name="T3"> cung cấp truy cập từ xa, và </text:span><text:span text:style-name="Strong_20_Emphasis"><text:span text:style-name="T3">systemd-udevd</text:span></text:span><text:span text:style-name="T3"> quản lý các thiết bị hot-plug, v.v. Các tiến trình nền được khởi động sớm trong quá trình boot và không tương tác trực tiếp với người dùng qua terminal; thay vào đó, người dùng tương tác gián tiếp với chúng thông qua các tiện ích. Do đó, việc không có terminal điều khiển trong cột </text:span><text:span text:style-name="Strong_20_Emphasis"><text:span text:style-name="T3">TTY</text:span></text:span><text:span text:style-name="T3"> phân biệt chúng với các tiến trình ứng dụng.</text:span></text:p>
      <text:p text:style-name="P7"><text:bookmark text:name="h5-18"/><text:span text:style-name="Strong_20_Emphasis"><text:span text:style-name="T2">Kernel Processes, Daemons, and User-Space Processes</text:span></text:span></text:p>
      <table:table table:name="Table18" table:style-name="Table18">
        <table:table-column table:style-name="Table18.A"/>
        <table:table-row>
          <table:table-cell table:style-name="Table18.A1" office:value-type="string">
            <text:p text:style-name="P22">fitz@ubuntu:~$ ps faxu<text:line-break/>USER PID %CPU %MEM VSZ RSS TTY STAT START TIME COMMAND<text:line-break/>root 2 0.0 0.0 0 0 ? S Nov18 0:00 [kthreadd]<text:line-break/>root 3 0.0 0.0 0 0 ? I&lt; Nov18 0:00 _ [rcu_gp]<text:line-break/>root 4 0.0 0.0 0 0 ? I&lt; Nov18 0:00 _ [rcu_par_gp]<text:line-break/>root 6 0.0 0.0 0 0 ? ❶ I&lt; Nov18 0:00 _ [kworker/0:0H…]<text:line-break/>root 8 0.0 0.0 0 0 ? I&lt; Nov18 0:00 _ [mm_percpu_wq]<text:line-break/>root 9 0.0 0.0 0 0 ? S Nov18 0:09 _ [ksoftirqd/0]<text:line-break/>…<text:line-break/>root 1 0.0 0.2 168400 11684 ? Ss Nov18 0:12 /sbin/init splash<text:line-break/>…<text:line-break/>root 333 0.0 0.1 21844 5348 ? Ss Nov18 0:07 /lib/systemd/systemd-udevd<text:line-break/>syslog 606 0.0 0.1 224360 4244 ? Ssl Nov18 0:01 /usr/sbin/rsyslogd -n –i…<text:line-break/>…<text:line-break/>root 649 0.0 0.0 20320 3036 ? ❷ Ss Nov18 0:00 /usr/sbin/cron -f<text:line-break/>daemon 675 0.0 0.0 3736 2184 ? Ss Nov18 0:00 /usr/sbin/atd –f<text:line-break/>…<text:line-break/>root 21545 0.0 0.0 5560 3420 tty4 Ss Nov18 0:00 /bin/login -p —<text:line-break/>fitz 28152 0.0 0.0 2600 1784 tty4 S 01:38 0:00 _ -sh<text:line-break/>fitz 28162 0.0 0.0 12948 3584 tty4 S+ 01:38 0:00 _ bash<text:line-break/>finn 12989 0.2 0.012092 3988 tty4 ❸ S+ 13:47 0:00 _ man ps<text:line-break/>finn 13000 0.0 0.0 10764 2544 tty4 S+ 13:47 0:00 _ pager</text:p>
          </table:table-cell>
        </table:table-row>
      </table:table>
      <text:p text:style-name="P7"><text:span text:style-name="T4">Info:</text:span><text:span text:style-name="T6"> </text:span><text:span text:style-name="T3">Các daemon thường có hậu tố </text:span><text:span text:style-name="Strong_20_Emphasis"><text:span text:style-name="T3">d</text:span></text:span><text:span text:style-name="T3"> ở cuối tên của chúng. Ví dụ, </text:span><text:span text:style-name="Strong_20_Emphasis"><text:span text:style-name="T3">sshd</text:span></text:span><text:span text:style-name="T3"> là daemon của Secure Shell, và </text:span><text:span text:style-name="Strong_20_Emphasis"><text:span text:style-name="T3">rsyslogd</text:span></text:span><text:span text:style-name="T3"> là daemon ghi nhật ký hệ thống Rocket, v.v.</text:span></text:p>
      <text:p text:style-name="P11"><text:soft-page-break/><text:span text:style-name="T3">Các tiến trình hệ thống (kernel) ❶ (chính xác hơn là các luồng kernel, vì chúng chạy trong không gian địa chỉ chia sẻ của nhân hệ điều hành) thực thi các phần song song của nhân OS, do đó chúng không có bộ nhớ ảo riêng cho từng tác vụ (VSZ) cũng như không có terminal điều khiển (TTY). Hơn nữa, các tiến trình kernel không chạy một chương trình độc lập được nạp từ tập tin ELF, nên tên </text:span><text:span text:style-name="Strong_20_Emphasis"><text:span text:style-name="T3">COMMAND</text:span></text:span><text:span text:style-name="T3"> của chúng là tên tổng hợp, được hiển thị trong ngoặc vuông, và chúng cũng mang trạng thái đặc biệt </text:span><text:span text:style-name="Strong_20_Emphasis"><text:span text:style-name="T3">I</text:span></text:span><text:span text:style-name="T3"> trong cột </text:span><text:span text:style-name="Strong_20_Emphasis"><text:span text:style-name="T3">STAT</text:span></text:span><text:span text:style-name="T3">.</text:span></text:p>
      <text:h text:style-name="P36" text:outline-level="2"/>
      <text:h text:style-name="P36" text:outline-level="2"><text:bookmark text:name="h2-4"/>Process Attributes</text:h>
      <text:p text:style-name="P7"><text:span text:style-name="T3">Trong một hệ điều hành, tiến trình là thực thể chủ động chính tương tác với các đối tượng xung quanh—các tập tin và hệ thống tập tin, các tiến trình khác, thiết bị, v.v. Những gì một tiến trình có thể làm với các đối tượng khác được xác định bởi các đặc tính cụ thể của nó, được gọi là </text:span><text:span text:style-name="Strong_20_Emphasis"><text:span text:style-name="T3">thuộc tính tiến trình</text:span></text:span><text:span text:style-name="T3">.</text:span></text:p>
      <text:h text:style-name="P21" text:outline-level="3"><text:bookmark text:name="h3-6"/><text:span text:style-name="Strong_20_Emphasis">Access Credentials</text:span></text:h>
      <text:p text:style-name="P20"><text:span text:style-name="Strong_20_Emphasis"><text:span text:style-name="T9">Quyền của một tiến trình đối với các đối tượng được quản lý bởi kiểm soát truy cập tùy ý (DAC, ví dụ: các tập tin trong cây hệ thống tập tin) được xác định bởi các thuộc tính tạo nên token truy cập DAC của nó—cụ thể là RUID, RGID, EUID, và EGID; xem chi tiết trong credentials.</text:span></text:span></text:p>
      <text:p text:style-name="P11"><text:span text:style-name="Strong_20_Emphasis"><text:span text:style-name="T3">Effective User ID (EUID)</text:span></text:span><text:span text:style-name="T3"> và </text:span><text:span text:style-name="Strong_20_Emphasis"><text:span text:style-name="T3">Effective Group ID (EGID)</text:span></text:span><text:span text:style-name="T3"> xác định người dùng và nhóm “hiệu lực” được DAC sử dụng để quyết định quyền của tiến trình trên các tập tin và đối tượng khác dựa trên </text:span><text:span text:style-name="Strong_20_Emphasis"><text:span text:style-name="T3">mode bits</text:span></text:span><text:span text:style-name="T3"> hoặc </text:span><text:span text:style-name="Strong_20_Emphasis"><text:span text:style-name="T3">access control lists</text:span></text:span><text:span text:style-name="T3">. </text:span><text:span text:style-name="Strong_20_Emphasis"><text:span text:style-name="T3">Real User ID (RUID)</text:span></text:span><text:span text:style-name="T3"> và </text:span><text:span text:style-name="Strong_20_Emphasis"><text:span text:style-name="T3">Real Group ID (RGID)</text:span></text:span><text:span text:style-name="T3"> xác định người dùng và nhóm “thực” kiểm soát hoặc sở hữu tiến trình.</text:span></text:p>
      <text:p text:style-name="P11"><text:span text:style-name="T3">Tiến trình đầu tiên trong một phiên người dùng (ví dụ, khi đăng nhập qua terminal alphanumeric—tức là trình thông dịch lệnh hoặc shell) được gán các thuộc tính </text:span><text:span text:style-name="Strong_20_Emphasis"><text:span text:style-name="T3">RUID/EUID</text:span></text:span><text:span text:style-name="T3"> và </text:span><text:span text:style-name="Strong_20_Emphasis"><text:span text:style-name="T3">RGID/EGID</text:span></text:span><text:span text:style-name="T3"> bằng </text:span><text:span text:style-name="Strong_20_Emphasis"><text:span text:style-name="T3">UID</text:span></text:span><text:span text:style-name="T3"> và </text:span><text:span text:style-name="Strong_20_Emphasis"><text:span text:style-name="T3">GID chính</text:span></text:span><text:span text:style-name="T3"> của người dùng đăng nhập. Các tiến trình tiếp theo trong phiên kế thừa các thuộc tính này vì chúng được tạo ra bằng cách sao chép thông qua </text:span><text:span text:style-name="Strong_20_Emphasis"><text:span text:style-name="T3">fork</text:span></text:span><text:span text:style-name="T3">. Trong ví dụ ở danh sách tiếp theo, lệnh </text:span><text:span text:style-name="Strong_20_Emphasis"><text:span text:style-name="T3">id</text:span></text:span><text:span text:style-name="T3"> hiển thị </text:span><text:span text:style-name="Strong_20_Emphasis"><text:span text:style-name="T3">EUID/EGID</text:span></text:span><text:span text:style-name="T3"> của phiên và việc chúng kế thừa từ shell, được xác nhận rõ ràng bởi lệnh </text:span><text:span text:style-name="Strong_20_Emphasis"><text:span text:style-name="T3">ps</text:span></text:span><text:span text:style-name="T3">.</text:span></text:p>
      <text:h text:style-name="P23" text:outline-level="5"><text:bookmark text:name="h5-19"/><text:span text:style-name="Strong_20_Emphasis"><text:span text:style-name="T10">Process DAC credentials: RUID, EUID, RGID, EGID</text:span></text:span></text:h>
      <table:table table:name="Table19" table:style-name="Table19">
        <table:table-column table:style-name="Table19.A"/>
        <table:table-row>
          <table:table-cell table:style-name="Table19.A1" office:value-type="string">
            <text:p text:style-name="P27">fitz@ubuntu:~$ id<text:line-break/>uid=1006(fitz) gid=1008(fitz) groups=1008(fitz)</text:p>
            <text:p text:style-name="P27"><text:line-break/>fitz@ubuntu:~$ ps fo euid,ruid,egid,rgid,user,group,tty,cmd<text:line-break/>EUID RUID EGID RGID USER GROUP TT CMD<text:line-break/>1006 1006 1008 1008 fitz fitz pts/2 -bash<text:line-break/>1006 1006 1008 1008 fitz fitz pts/2 _ ps fo euid,ruid,egid,rgid,user,group,tty,cmd</text:p>
          </table:table-cell>
        </table:table-row>
      </table:table>
      <text:p text:style-name="P20"><text:span text:style-name="Strong_20_Emphasis"><text:span text:style-name="T9">Các thay đổi đối với EUID/EGID của một tiến trình xảy ra khi cơ chế ủy quyền quyền hạn ngầm dựa trên các bit set-user-ID/set-group-ID (SUID/SGID) trên các tập tin chương trình được kích hoạt. Khi các chương trình như vậy được thực thi thông qua lệnh hệ thống exec, các ID người dùng và nhóm hiệu dụng (EUID/EGID) của tiến trình được thiết lập bằng UID/GID của chủ sở hữu chương trình. Kết quả là, tiến trình sinh ra sẽ có các quyền hạn của chủ sở hữu chương trình thay vì của người dùng khởi chạy nó.</text:span></text:span></text:p>
      <text:p text:style-name="P11"><text:soft-page-break/><text:span text:style-name="T2">Ví dụ tiếp theo minh họa cách sử dụng điển hình của ủy quyền quyền hạn ngầm khi chạy các lệnh passwd và wall. Khi người dùng thay đổi mật khẩu với </text:span><text:span text:style-name="Source_20_Text"><text:span text:style-name="T2">/usr/bin/passwd</text:span></text:span><text:span text:style-name="T2">, tiến trình của nó sẽ nhận được quyền ghi cần thiết ① vào </text:span><text:span text:style-name="Source_20_Text"><text:span text:style-name="T2">/etc/shadow</text:span></text:span><text:span text:style-name="T2"> bằng cách kế thừa ❶ quyền hạn của siêu người dùng root (UID=0) (thông qua setuid). Khi gửi thông báo đến tất cả người dùng bằng </text:span><text:span text:style-name="Source_20_Text"><text:span text:style-name="T2">/usr/bin/wall</text:span></text:span><text:span text:style-name="T2">, tiến trình cần quyền ghi ② vào các thiết bị đầu cuối của họ </text:span><text:span text:style-name="Source_20_Text"><text:span text:style-name="T2">/dev/tty*</text:span></text:span><text:span text:style-name="T2">, điều này được cấp ❷ thông qua việc ủy quyền quyền hạn nhóm tty GID=5 (thông qua setgid).</text:span></text:p>
      <text:p text:style-name="P20"><text:span text:style-name="Strong_20_Emphasis"><text:span text:style-name="T3"/></text:span></text:p>
      <text:h text:style-name="P23" text:outline-level="5"><text:bookmark text:name="h5-20"/><text:span text:style-name="Strong_20_Emphasis">Setuid/Setgid file bits and process credentials (RUID, EUID, RGID, EGID)</text:span></text:h>
      <table:table table:name="Table20" table:style-name="Table20">
        <table:table-column table:style-name="Table20.A"/>
        <table:table-row>
          <table:table-cell table:style-name="Table20.A1" office:value-type="string">
            <text:p text:style-name="P20"><text:bookmark text:name="p95"/>fitz@ubuntu:~$ who<text:line-break/>fitz pts/0 2019-11-22 00:52 (:0.0)<text:line-break/>fitz pts/1 2019-11-22 00:53 (:0.0)<text:line-break/>fitz pts/2 2019-11-22 01:06 (:0.0)</text:p>
            <text:p text:style-name="P25"><text:bookmark text:name="p96"/>fitz@ubuntu:~$ ls -la /etc/shadow /dev/pts/*<text:line-break/>crw–w—- 1 fitz tty 136, 2 Nov 19 12:00 /dev/pts/1<text:line-break/>② crw–w—- 1 fitz tty 136, 3 Nov 19 13:53 /dev/pts/2<text:line-break/>c——— 1 root root 5, 2 Nov 17 03:30 /dev/pts/ptmx<text:line-break/>① -rw-r—– 1 root shadow 1647 Nov 19 12:27 /etc/shadow</text:p>
            <text:p text:style-name="P25"><text:bookmark text:name="p97"/>fitz@ubuntu:~$ ls -l /usr/bin/passwd /usr/bin/wall<text:line-break/>-rwsr-xr-x 1 root root 67992 Aug 29 16:00 /usr/bin/passwd<text:line-break/>-rwxr-sr-x 1 root tty 35048 Aug 21 16:19 /usr/bin/wall</text:p>
            <text:p text:style-name="P25"><text:bookmark text:name="p98"/>fitz@ubuntu:~$ ls -ln /usr/bin/passwd /usr/bin/wall<text:line-break/>-rwsr-xr-x 1 0 0 67992 Aug 29 16:00 /usr/bin/passwd<text:line-break/>-rwxr-sr-x 1 0 5 35048 Aug 21 16:19 /usr/bin/wall</text:p>
            <text:p text:style-name="P25"><text:bookmark text:name="p99"/>fitz@ubuntu:~$ ps ft pts/1,pts/2 o pid,ruid,rgid,euid,egid,tty,cmd<text:line-break/>PID RUID RGID EUID EGID TT CMD<text:line-break/>27883 1006 1008 1006 1008 pts/2 bash<text:line-break/>❷ 27937 1006 1008 1006 5 pts/2 _ wall<text:line-break/>27124 1006 1008 1006 1008 pts/1 bash<text:line-break/>❶ 27839 1006 1008 0 1008 pts/1 _ passwd</text:p>
          </table:table-cell>
        </table:table-row>
      </table:table>
      <text:p text:style-name="P20"><text:span text:style-name="Strong_20_Emphasis"><text:span text:style-name="T9">Đối với các đối tượng được bảo vệ bởi cơ chế kiểm soát truy cập bắt buộc (mandatory access control – MAC), quyền hạn của một tiến trình được xác định bởi nhãn MAC của nó—cụ thể là thuộc tính LABEL. Tương tự như RUID/EUID/RGID/EGID, thuộc tính LABEL được gán rõ ràng cho tiến trình đầu tiên trong phiên làm việc của người dùng và sau đó được các tiến trình con kế thừa khi chúng được nhân bản từ tiến trình cha. Trong ví dụ ở danh sách dưới đây, lệnh </text:span></text:span><text:span text:style-name="Strong_20_Emphasis"><text:span text:style-name="Source_20_Text"><text:span text:style-name="T7">id</text:span></text:span></text:span><text:span text:style-name="Strong_20_Emphasis"><text:span text:style-name="T9"> hiển thị thuộc tính LABEL của phiên làm việc, và lệnh </text:span></text:span><text:span text:style-name="Strong_20_Emphasis"><text:span text:style-name="Source_20_Text"><text:span text:style-name="T7">ps</text:span></text:span></text:span><text:span text:style-name="Strong_20_Emphasis"><text:span text:style-name="T9"> minh họa cách nó được kế thừa rõ ràng từ tiến trình cha.</text:span></text:span></text:p>
      <text:p text:style-name="P11"><text:span text:style-name="T3">Tương tự như việc EUID/EGID của một tiến trình thay đổi khi thực thi chương trình SUID/SGID, LABEL của tiến trình cũng thay đổi (theo các quy tắc bắt buộc ❶) trong quá trình gọi hệ thống </text:span><text:span text:style-name="Source_20_Text"><text:span text:style-name="T3">exec</text:span></text:span><text:span text:style-name="T3"> khi một chương trình được đánh dấu với nhãn tệp bắt buộc tương ứng được khởi chạy. Ví dụ, khi </text:span><text:span text:style-name="Source_20_Text"><text:span text:style-name="T3">/usr/sbin/dhclient</text:span></text:span><text:span text:style-name="T3"> với loại </text:span><text:span text:style-name="Source_20_Text"><text:span text:style-name="T3">dhcpc_exec_t</text:span></text:span><text:span text:style-name="T3"> trong nhãn bắt buộc của nó ❸ được khởi động, tiến trình sẽ nhận loại </text:span><text:span text:style-name="Source_20_Text"><text:span text:style-name="T3">dhcpc_t</text:span></text:span><text:span text:style-name="T3"> trong nhãn bắt buộc của chính nó </text:span><text:soft-page-break/><text:span text:style-name="T3">❹, điều này hạn chế đáng kể quyền truy cập của nó tới các đối tượng khác trong hệ điều hành.</text:span></text:p>
      <text:h text:style-name="P23" text:outline-level="5"><text:bookmark text:name="h5-21"/><text:span text:style-name="Strong_20_Emphasis">Process MAC label — the SELinux mandatory label</text:span></text:h>
      <table:table table:name="Table21" table:style-name="Table21">
        <table:table-column table:style-name="Table21.A"/>
        <table:table-row>
          <table:table-cell table:style-name="Table21.A1" office:value-type="string">
            <text:p text:style-name="P20">fitz@ubuntu:~$ ssh lich@fedora<text:line-break/>lich@fedora’s password:<text:line-break/>Last login: Sat Nov 21 14:25:16 2015</text:p>
            <text:p text:style-name="P20">[lich@centos ~]$ id -Z<text:line-break/>staff_u:staff_r:staff_t:s0-s0:c0.c1023</text:p>
            <text:p text:style-name="P20">[lich@centos ~]$ ps Zf<text:line-break/>LABEL PID TTY STAT TIME COMMAND<text:line-break/>staff_u:staff_r:staff_t:s0-s0:c0.c1023 31396 pts/0 Ss 0:00 -bash<text:line-break/>staff_u:staff_r:staff_t:s0-s0:c0.c1023 31835 pts/0 R+ 0:00 _ ps Zf<text:line-break/>staff_u:staff_r:staff_t:s0-s0:c0.c1023 31334 tty2 Ss+ 0:00 -bash</text:p>
            <text:p text:style-name="P20">[lich@centos ~]$ sesearch -T -t dhcpc_exec_t -c process<text:line-break/>Found 19 semantic te rules:<text:line-break/>…<text:line-break/>❶ type_transition NetworkManager_t dhcpc_exec_t : process dhcpc_t;<text:line-break/>…</text:p>
            <text:p text:style-name="P20">[lich@centos ~]$ ls -Z /usr/sbin/dhclient<text:line-break/>❷ -rwxr-xr-x. root root system_u:object_r:dhcpc_exec_t:s0 /usr/sbin/dhclient</text:p>
            <text:p text:style-name="P20">[lich@centos ~]$ ps -ZC dhclient<text:line-break/>LABEL PID TTY TIME CMD<text:line-break/>❸ system_u:system_r:dhcpc_t:s0 2120 ? 00:00:00 dhclient<text:line-break/>system_u:system_r:dhcpc_t:s0 4320 ? 00:00:00 dhclient</text:p>
          </table:table-cell>
        </table:table-row>
      </table:table>
      <text:p text:style-name="P20"/>
      <text:h text:style-name="P39" text:outline-level="3"><text:bookmark text:name="h3-7"/>Capabilities</text:h>
      <text:p text:style-name="P20"><text:span text:style-name="T9">Một thuộc tính quan trọng khác của tiến trình quyết định các cuộc gọi hệ thống mà nó có thể sử dụng là khả năng (capabilities) của nó. Ví dụ, khả năng </text:span><text:span text:style-name="Strong_20_Emphasis"><text:span text:style-name="T9">CAP_SYS_PTRACE</text:span></text:span><text:span text:style-name="T9"> cho phép các công cụ theo dõi như </text:span><text:span text:style-name="Strong_20_Emphasis"><text:span text:style-name="T9">strace</text:span></text:span><text:span text:style-name="T9"> và </text:span><text:span text:style-name="Strong_20_Emphasis"><text:span text:style-name="T9">ltrace</text:span></text:span><text:span text:style-name="T9">, vốn dựa vào cuộc gọi hệ thống </text:span><text:span text:style-name="Strong_20_Emphasis"><text:span text:style-name="T9">ptrace</text:span></text:span><text:span text:style-name="T9">, theo dõi các tiến trình do bất kỳ người dùng nào sở hữu (không chỉ những tiến trình “của họ”, tức là những tiến trình có </text:span><text:span text:style-name="Strong_20_Emphasis"><text:span text:style-name="T9">EUID</text:span></text:span><text:span text:style-name="T9"> trùng với </text:span><text:span text:style-name="Strong_20_Emphasis"><text:span text:style-name="T9">EUID</text:span></text:span><text:span text:style-name="T9"> của công cụ theo dõi). Tương tự, </text:span><text:span text:style-name="Strong_20_Emphasis"><text:span text:style-name="T9">CAP_SYS_NICE</text:span></text:span><text:span text:style-name="T9"> cho phép thay đổi ưu tiên, thiết lập tính liên kết CPU (CPU affinity), và gán chính sách lập lịch cho các tiến trình và luồng do bất kỳ người dùng nào sở hữu, còn </text:span><text:span text:style-name="Strong_20_Emphasis"><text:span text:style-name="T9">CAP_KILL</text:span></text:span><text:span text:style-name="T9"> cho phép gửi tín hiệu đến các tiến trình do bất kỳ người dùng nào sở hữu.</text:span></text:p>
      <text:p text:style-name="P11"><text:span text:style-name="T3">Khả năng “chủ sở hữu” rõ ràng </text:span><text:span text:style-name="Strong_20_Emphasis"><text:span text:style-name="T3">CAP_FOWNER</text:span></text:span><text:span text:style-name="T3"> cho phép một tiến trình thay đổi chế độ truy cập, ACLs, nhãn bắt buộc (mandatory label), thuộc tính mở rộng, và các cờ tệp của bất kỳ tập tin nào như thể nó là chủ sở hữu của tập tin đó. Khả năng </text:span><text:span text:style-name="Strong_20_Emphasis"><text:span text:style-name="T3">CAP_LINUX_IMMUTABLE</text:span></text:span><text:span text:style-name="T3"> cho phép quản lý các cờ tệp </text:span><text:span text:style-name="Strong_20_Emphasis"><text:span text:style-name="T3">i</text:span></text:span><text:span text:style-name="T3"> (immutable) và </text:span><text:span text:style-name="Strong_20_Emphasis"><text:span text:style-name="T3">a</text:span></text:span><text:span text:style-name="T3"> (append-only). Khả năng </text:span><text:span text:style-name="Strong_20_Emphasis"><text:span text:style-name="T3">CAP_SETFCAP</text:span></text:span><text:span text:style-name="T3"> cho phép thiết lập capabilities của tập tin thực thi.</text:span></text:p>
      <text:p text:style-name="P11"><text:span text:style-name="T3">Cần lưu ý rằng việc sở hữu đầy đủ tập hợp quyền hạn là điều làm cho </text:span><text:span text:style-name="Strong_20_Emphasis"><text:span text:style-name="T3">root</text:span></text:span><text:span text:style-name="T3"> (UID=0) trở thành siêu người dùng (superuser) trong Linux. Ngược lại, một người dùng thông thường, </text:span><text:soft-page-break/><text:span text:style-name="T3">không có đặc quyền (tức UID ≠ 0) không có quyền hạn rõ ràng nào (ngầm định, họ chỉ có quyền của chủ sở hữu đối với các đối tượng của chính họ). Quyền hạn của một tiến trình được gán khi một chương trình được khởi động thông qua cuộc gọi hệ thống </text:span><text:span text:style-name="Strong_20_Emphasis"><text:span text:style-name="T3">exec</text:span></text:span><text:span text:style-name="T3"> — ở đây chúng ta đơn giản hóa một cách có chủ ý các quy tắc thừa kế/gán xung quanh </text:span><text:span text:style-name="Strong_20_Emphasis"><text:span text:style-name="T3">fork</text:span></text:span><text:span text:style-name="T3"> và </text:span><text:span text:style-name="Strong_20_Emphasis"><text:span text:style-name="T3">exec</text:span></text:span><text:span text:style-name="T3"> </text:span><text:span text:style-name="T2">mà không làm mất nghĩa — dựa trên việc tệp thực thi được đánh dấu với quyền hạn dựa trên tập tin.</text:span></text:p>
      <text:p text:style-name="P8"><text:span text:style-name="T3">Ví dụ trong danh sách tiếp theo cho thấy cách lấy tập hợp khả năng (capability set) của một tiến trình bằng tiện ích </text:span><text:span text:style-name="Strong_20_Emphasis"><text:span text:style-name="T3">getpcaps</text:span></text:span><text:span text:style-name="T3">. Như mong đợi, tiến trình </text:span><text:span text:style-name="Strong_20_Emphasis"><text:span text:style-name="T3">postgres</text:span></text:span><text:span text:style-name="T3"> (PID=6711), chạy dưới quyền người dùng giả (pseudo-user) thông thường </text:span><text:span text:style-name="Strong_20_Emphasis"><text:span text:style-name="T3">postgres</text:span></text:span><text:span text:style-name="T3"> (UID≠0), không có ❶ khả năng nào, trong khi tiến trình </text:span><text:span text:style-name="Strong_20_Emphasis"><text:span text:style-name="T3">apache2</text:span></text:span><text:span text:style-name="T3"> (PID=10129), chạy dưới quyền siêu người dùng </text:span><text:span text:style-name="Strong_20_Emphasis"><text:span text:style-name="T3">root</text:span></text:span><text:span text:style-name="T3"> (UID=0), có đầy đủ ❷ tập hợp khả năng. Tuy nhiên, tiến trình </text:span><text:span text:style-name="Strong_20_Emphasis"><text:span text:style-name="T3">NetworkManager</text:span></text:span><text:span text:style-name="T3"> (PID=646) chạy như một “siêu người dùng” nhưng bị loại bỏ ❸ hầu hết các khả năng của nó, vì chúng đã được giảm cố ý khi khởi động (xem </text:span><text:span text:style-name="Strong_20_Emphasis"><text:span text:style-name="T3">systemd</text:span></text:span><text:span text:style-name="T3"> trong Chương 8) xuống tập hợp tối thiểu cần thiết cho nhiệm vụ của nó (điều này giúp cải thiện bảo mật hệ điều hành).</text:span></text:p>
      <text:p text:style-name="P15"><text:bookmark text:name="h5-22"/>Process Privileges (Capabilities)</text:p>
      <table:table table:name="Table22" table:style-name="Table22">
        <table:table-column table:style-name="Table22.A"/>
        <table:table-row>
          <table:table-cell table:style-name="Table22.A1" office:value-type="string">
            <text:p text:style-name="P20"><text:bookmark text:name="p110"/>fitz@ubuntu:~$ ps fo user,pid,cmd -C NetworkManager,postgres,apache2<text:line-break/>USER PID CMD<text:line-break/>root 10129 /usr/sbin/apache2 -k start<text:line-break/>www-data 10131 _ /usr/sbin/apache2 -k start<text:line-break/>www-data 10132 _ /usr/sbin/apache2 -k start<text:line-break/>postgres 6711 /usr/lib/postgresql/11/bin/postgres -D /var/lib/postgresql/11/main …<text:line-break/>postgres 6713 _ postgres: 11/main: checkpointer<text:line-break/>postgres 6714 _ postgres: 11/main: background writer<text:line-break/>postgres 6715 _ postgres: 11/main: walwriter<text:line-break/>postgres 6716 _ postgres: 11/main: autovacuum launcher<text:line-break/>postgres 6717 _ postgres: 11/main: stats collector<text:line-break/>postgres 6718 _ postgres: 11/main: logical replication launcher<text:line-break/>root 646 /usr/sbin/NetworkManager –no-daemon</text:p>
            <text:p text:style-name="P13"><text:bookmark text:name="p111"/><text:span text:style-name="T2">fitz@ubuntu:~$ getpcaps 6711<text:line-break/>❶ Capabilities for </text:span><text:bookmark text:name="code155"/><text:span text:style-name="Source_20_Text"><text:span text:style-name="T2">6711': <text:line-break/><text:line-break/></text:span></text:span><text:span text:style-name="T2">10129′: = cap_chown,cap_dac_override,cap_dac_read_search,cap_fowner,cap_fsetid,cap_kill,cap_setgid,<text:line-break/>cap_setuid,cap_setpcap,cap_linux_immutable,cap_net_bind_service,cap_net_broadcast,cap_net_<text:line-break/>admin,cap_net_raw,cap_ipc_lock,cap_ipc_owner,cap_sys_module,cap_sys_rawio,cap_sys_chroot,<text:line-break/>cap_sys_ptrace,cap_sys_pacct,cap_sys_admin,cap_sys_boot,cap_sys_nice,cap_sys_resource,cap_<text:line-break/>sys_time,cap_sys_tty_config,cap_mknod,cap_lease,cap_audit_write,cap_audit_control,cap_<text:line-break/>setfcap,cap_mac_override,cap_mac_admin,cap_syslog,cap_wake_alarm,cap_block_suspend,<text:line-break/>cap_audit_read+ep<text:line-break/></text:span><text:soft-page-break/><text:span text:style-name="T2">❸ fitz@ubuntu:~$ getpcaps 646<text:line-break/>Capabilities for `646′: = cap_dac_override,cap_kill,cap_setgid,cap_setuid,cap_net_bind_service,cap_net_admin,<text:line-break/>cap_net_raw,cap_sys_module,cap_sys_chroot,cap_audit_write+ep</text:span></text:p>
          </table:table-cell>
        </table:table-row>
      </table:table>
      <text:p text:style-name="P20"><text:span text:style-name="T9">Danh sách dưới đây minh họa một trường hợp điển hình về việc sử dụng quyền hạn tinh vi (fine-grained privileges), trong khi cơ chế SUID/SGID truyền thống sẽ ngầm cấp cho chương trình toàn bộ quyền của siêu người dùng. Ví dụ, tiện ích </text:span><text:span text:style-name="Strong_20_Emphasis"><text:span text:style-name="T9">ping</text:span></text:span><text:span text:style-name="T9"> “bình thường” cần tạo một socket mạng thô (raw network socket) để thực hiện công việc của nó — một thao tác có đặc quyền từ quan điểm của kernel. Trên các hệ thống cũ hơn (điều này áp dụng cho Ubuntu đến phiên bản 18.10; bắt đầu từ 19.04, nó được cấu hình “đúng ngay từ đầu”), tệp nhị phân </text:span><text:span text:style-name="Strong_20_Emphasis"><text:span text:style-name="T9">/bin/ping</text:span></text:span><text:span text:style-name="T9"> có cờ </text:span><text:span text:style-name="Strong_20_Emphasis"><text:span text:style-name="T9">SUID</text:span></text:span><text:span text:style-name="T9"> được thiết lập ❶ và thuộc sở hữu của siêu người dùng </text:span><text:span text:style-name="Strong_20_Emphasis"><text:span text:style-name="T9">root</text:span></text:span><text:span text:style-name="T9">, với quyền hạn của root được thừa kế khi thực thi.</text:span></text:p>
      <text:p text:style-name="P9"><text:span text:style-name="T3">Từ góc độ bảo mật, điều này mâu thuẫn với lẽ thường, vì nguyên tắc chỉ cấp cho chương trình những quyền tối thiểu cần thiết để hoạt động. Để tạo các socket thô và socket gói tin (packet sockets), chỉ cần quyền </text:span><text:span text:style-name="Strong_20_Emphasis"><text:span text:style-name="T3">CAP_NET_RAW</text:span></text:span><text:span text:style-name="T3">; việc trao toàn bộ tập quyền của siêu người dùng là quá mức.</text:span></text:p>
      <text:h text:style-name="P23" text:outline-level="5"><text:bookmark text:name="h5-23"/>Delegating Privileges to the ping Program</text:h>
      <table:table table:name="Table23" table:style-name="Table23">
        <table:table-column table:style-name="Table23.A"/>
        <table:table-row>
          <table:table-cell table:style-name="Table23.A1" office:value-type="string">
            <text:p text:style-name="P20">fitz@ubuntu-1804:~$ ls -l /bin/ping<text:line-break/>❶ -rwsr-xr-x 1 root root 64424 Jun 28 11:05 /bin/ping</text:p>
            <text:p text:style-name="P20">fitz@ubuntu-1804:~$ ping ubuntu-1804<text:line-break/>PING ubuntu-1804 (127.0.1.1) 56(84) bytes of data.<text:line-break/>64 bytes from ubuntu-1804 (127.0.1.1): icmp_req=1 ttl=64 time=0.074 ms<text:line-break/>^C<text:line-break/>— ubuntu ping statistics —<text:line-break/>1 packets transmitted, 1 received, 0% packet loss, time 0ms<text:line-break/>rtt min/avg/max/mdev = 0.074/0.074/0.074/0.000 ms</text:p>
            <text:p text:style-name="P20">fitz@ubuntu-1804:~$ sudo chmod u-s /bin/ping</text:p>
            <text:p text:style-name="P20">fitz@ubuntu-1804:~$ ls -l /bin/ping<text:line-break/>-rwxr-xr-x 1 root root 64424 Jun 28 11:05 /bin/ping</text:p>
            <text:p text:style-name="P20">fitz@ubuntu-1804:~$ ping ubuntu-1804<text:line-break/>ping: icmp open socket: Operation not permitted</text:p>
            <text:p text:style-name="P20">❸ fitz@ubuntu-1804:~$ sudo setcap cap_net_raw+ep /bin/ping</text:p>
            <text:p text:style-name="P20">fitz@ubuntu-1804:~$ getcap /bin/ping<text:line-break/>/bin/ping = cap_net_raw+ep</text:p>
            <text:p text:style-name="P20">fitz@ubuntu-1804:~$ ping ubuntu-1804<text:line-break/>PING ubuntu (127.0.1.1) 56(84) bytes of data.<text:line-break/>64 bytes from ubuntu (127.0.1.1): icmp_req=1 ttl=64 time=0.142 ms<text:line-break/>^C<text:line-break/>— ubuntu ping statistics —<text:line-break/>1 packets transmitted, 1 received, 0% packet loss, time 0ms<text:line-break/><text:soft-page-break/>rtt min/avg/max/mdev = 0.142/0.142/0.142/0.000 ms</text:p>
          </table:table-cell>
        </table:table-row>
      </table:table>
      <text:p text:style-name="P20"/>
      <text:p text:style-name="P20">Khi cơ chế ủy quyền khả năng ❷ bị vô hiệu hóa, chương trình /bin/ping không thể thực hiện chức năng của nó nữa. Việc gán cho nó quyền “tập tin” CAP_NET_RAW bằng lệnh setcap ❸ sẽ khôi phục đầy đủ chức năng, vì điều này khiến chương trình khởi động với quyền “tiến trình” CAP_NET_RAW. Để kiểm tra các khả năng được ủy quyền khi khởi chạy chương trình, sử dụng lệnh getcap đi kèm.</text:p>
      <text:p text:style-name="P20">Tương tự, khi sử dụng các công cụ phân tích lưu lượng mạng tshark và/hoặc Wireshark, vốn gọi tiện ích dumpcap để bắt gói tin, chúng cần mở cả ổ cắm “raw” (raw socket) và “packet” (packet socket)—yêu cầu cùng quyền CAP_NET_RAW. Cách truyền thống để chạy các trình phân tích gói tin là khởi động chúng với toàn bộ quyền siêu người dùng (qua su hoặc sudo), điều này một lần nữa vi phạm nguyên tắc “ít quyền nhất” và vượt quá các quyền tối thiểu cần thiết cho phần mềm.</text:p>
      <text:p text:style-name="P20"/>
      <text:h text:style-name="P23" text:outline-level="5"><text:bookmark text:name="h5-24"/>Delegating Privileges to tshark</text:h>
      <table:table table:name="Table24" table:style-name="Table24">
        <table:table-column table:style-name="Table24.A"/>
        <table:table-row>
          <table:table-cell table:style-name="Table24.A1" office:value-type="string">
            <text:p text:style-name="P20">fitz@ubuntu:~$ tshark<text:line-break/>tshark: There are no interfaces on which a capture can be done</text:p>
            <text:p text:style-name="P33">fitz@ubuntu:~$ strace -fe execve tshark<text:line-break/>execve("/usr/bin/tshark", ["tshark"], [/* 23 vars */]) = 0<text:line-break/>Process 8951 attached<text:line-break/>[pid 8951] execve("/usr/bin/dumpcap", ["/usr/bin/dumpcap", "-D", "-Z", "none"], ...) = 0<text:line-break/>Process 8951 detached<text:line-break/>--- SIGCHLD (Child exited) @ 0 (0) ---<text:line-break/>tshark: There are no interfaces on which a capture can be done</text:p>
            <text:p text:style-name="P33">fitz@ubuntu:~$ ls -la /usr/bin/dumpcap<text:line-break/>-rwxr-xr-x 1 root root 104688 Sep 5 19:43 /usr/bin/dumpcap</text:p>
            <text:p text:style-name="P33">fitz@ubuntu:~$ getcap /usr/bin/dumpcap</text:p>
            <text:p text:style-name="P33">fitz@ubuntu:~$ sudo setcap cap_net_raw+ep /usr/bin/dumpcap</text:p>
            <text:p text:style-name="P33">fitz@ubuntu:~$ getcap /usr/bin/dumpcap<text:line-break/>/usr/bin/dumpcap = cap_net_raw+ep</text:p>
            <text:p text:style-name="P33">fitz@ubuntu:~$ tshark -i wlan0<text:line-break/>Capturing on wlan0<text:line-break/>0.307205 fe80::895d:9d7d:f0b3:a372 → ff02::1:ff96:2df6 ICMPv6 86 Neighbor Solicitation<text:line-break/>0.307460 SuperMic_74:0e:90 → Spanning-tree-(for-bridges)_00 STP 60 Conf. Root = 32768/0/00:25:90:74:0e:90 Cost = 0 Port = 0x8001<text:line-break/>…</text:p>
          </table:table-cell>
        </table:table-row>
      </table:table>
      <text:p text:style-name="P10"><text:span text:style-name="Strong_20_Emphasis"><text:span text:style-name="T3">Để cho phép người dùng không có quyền đặc biệt sử dụng hiệu quả các công cụ phân tích lưu lượng, chỉ cần cấp cho các tiến trình bắt gói tin của họ quyền CAP_NET_RAW bằng </text:span></text:span><text:soft-page-break/><text:span text:style-name="Strong_20_Emphasis"><text:span text:style-name="T3">cách thiết lập quyền tập tin trên chương trình bắt gói /usr/bin/dumpcap, như đã trình bày trong ví dụ trước.</text:span></text:span></text:p>
      <text:p text:style-name="P10"><text:span text:style-name="Strong_20_Emphasis"><text:span text:style-name="T5">Info:</text:span></text:span><text:span text:style-name="Strong_20_Emphasis"><text:span text:style-name="T3"> </text:span></text:span><text:span text:style-name="T3">Cần lưu ý rằng trình cài đặt đã có thể thực hiện tất cả điều này từ lâu khi cài gói wireshark-common (mà tshark và wireshark phụ thuộc), với điều kiện bạn trả lời Yes cho lời nhắc của trình cài đặt ‘Should non-superusers be able to capture packets?’. Tuy nhiên, công cụ tcpdump tối giản hơn thì không có tiện ích này ☺.</text:span></text:p>
      <text:p text:style-name="P20"><text:span text:style-name="Strong_20_Emphasis"><text:span text:style-name="T2"/></text:span></text:p>
      <text:h text:style-name="P21" text:outline-level="3"><text:bookmark text:name="h3-8"/><text:span text:style-name="Strong_20_Emphasis"><text:span text:style-name="T11">Other process attributes</text:span></text:span></text:h>
      <text:p text:style-name="P20"><text:span text:style-name="Strong_20_Emphasis"><text:span text:style-name="T9">Hóa ra các biến môi trường và thư mục làm việc hiện tại cũng là thuộc tính của tiến trình, mà bạn có thể truy xuất lần lượt bằng các lệnh ps và pwdx.</text:span></text:span></text:p>
      <text:h text:style-name="P23" text:outline-level="5"><text:bookmark text:name="h5-25"/><text:span text:style-name="Strong_20_Emphasis">Process Environment Variables</text:span></text:h>
      <table:table table:name="Table25" table:style-name="Table25">
        <table:table-column table:style-name="Table25.A"/>
        <table:table-row>
          <table:table-cell table:style-name="Table25.A1" office:value-type="string">
            <text:p text:style-name="P22">fitz@ubuntu:~$ ps fe<text:line-break/>PID TTY STAT TIME COMMAND<text:line-break/>21872 pts/2 S 0:00 -bash USER=fitz LOGNAME=fitz HOME=/home/fitz PATH=/usr/…<text:line-break/>22904 pts/2 R+ 0:00 _ ps fe LANGUAGE=ru:ko:en LC_ADDRESS=ru_RU.UTF-8 …</text:p>
          </table:table-cell>
        </table:table-row>
      </table:table>
      <text:p text:style-name="P29"/>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vi" fo:country="V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vi" fo:country="V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9T15:55:08.964292011</meta:creation-date>
    <dc:date>2026-03-20T13:50:29.642091096</dc:date>
    <meta:editing-duration>PT7H55M12S</meta:editing-duration>
    <meta:editing-cycles>273</meta:editing-cycles>
    <meta:generator>LibreOffice/24.2.7.2$Linux_X86_64 LibreOffice_project/420$Build-2</meta:generator>
    <meta:document-statistic meta:table-count="26" meta:image-count="2" meta:object-count="0" meta:page-count="26" meta:paragraph-count="292" meta:word-count="9793" meta:character-count="54580" meta:non-whitespace-character-count="44647"/>
  </office:meta>
</office:document-meta>
</file>