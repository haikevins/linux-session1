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153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3.181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6021in" table:align="left"/>
    </style:style>
    <style:style style:name="Table2.A" style:family="table-column">
      <style:table-column-properties style:column-width="0.5007in"/>
    </style:style>
    <style:style style:name="Table2.B" style:family="table-column">
      <style:table-column-properties style:column-width="0.4625in"/>
    </style:style>
    <style:style style:name="Table2.C" style:family="table-column">
      <style:table-column-properties style:column-width="0.638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line-height="100%" fo:text-align="justify" style:justify-single-word="false"/>
      <style:text-properties style:font-name="Liberation Serif" fo:font-size="13pt" fo:font-style="italic" fo:font-weight="bold" officeooo:rsid="000be33c" officeooo:paragraph-rsid="000be33c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Heading_20_2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" style:family="paragraph" style:parent-style-name="Preformatted_20_Text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erif" fo:font-size="13pt" fo:font-weight="bold" officeooo:rsid="00096be1" officeooo:paragraph-rsid="00096be1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erif" fo:font-size="13pt" fo:font-weight="normal" officeooo:rsid="00069008" officeooo:paragraph-rsid="00069008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erif" fo:font-size="13pt" fo:font-weight="normal" officeooo:rsid="0007909f" officeooo:paragraph-rsid="0007909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erif" fo:font-size="13pt" fo:font-weight="normal" officeooo:rsid="00096be1" officeooo:paragraph-rsid="00096be1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erif" fo:font-size="13pt" fo:font-style="italic" fo:font-weight="bold" officeooo:paragraph-rsid="00096be1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erif" fo:font-size="13pt" fo:font-style="italic" fo:font-weight="bold" officeooo:paragraph-rsid="000be33c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Table_20_Contents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line-height="100%" fo:text-align="justify" style:justify-single-word="false"/>
    </style:style>
    <style:style style:name="P13" style:family="paragraph" style:parent-style-name="Table_20_Heading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Liberation Serif" fo:font-size="13pt" fo:font-weight="bold" officeooo:rsid="00069008" officeooo:paragraph-rsid="00069008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6" style:family="paragraph" style:parent-style-name="Text_20_body" style:list-style-name="L4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7" style:family="paragraph" style:parent-style-name="Text_20_body" style:list-style-name="L5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8" style:family="paragraph" style:parent-style-name="Text_20_body" style:list-style-name="L7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9" style:family="paragraph" style:parent-style-name="Text_20_body" style:list-style-name="L8">
      <style:paragraph-properties fo:line-height="100%" fo:text-align="justify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Liberation Serif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21" style:family="paragraph" style:parent-style-name="Text_20_body">
      <style:paragraph-properties fo:line-height="100%" fo:text-align="justify" style:justify-single-word="false"/>
    </style:style>
    <style:style style:name="P22" style:family="paragraph" style:parent-style-name="Text_20_body" style:list-style-name="L1">
      <style:paragraph-properties fo:line-height="100%" fo:text-align="justify" style:justify-single-word="false"/>
    </style:style>
    <style:style style:name="P23" style:family="paragraph" style:parent-style-name="Text_20_body" style:list-style-name="L2">
      <style:paragraph-properties fo:line-height="100%" fo:text-align="justify" style:justify-single-word="false"/>
    </style:style>
    <style:style style:name="P24" style:family="paragraph" style:parent-style-name="Text_20_body" style:list-style-name="L3">
      <style:paragraph-properties fo:line-height="100%" fo:text-align="justify" style:justify-single-word="false"/>
    </style:style>
    <style:style style:name="P25" style:family="paragraph" style:parent-style-name="Text_20_body" style:list-style-name="L4">
      <style:paragraph-properties fo:line-height="100%" fo:text-align="justify" style:justify-single-word="false"/>
    </style:style>
    <style:style style:name="P26" style:family="paragraph" style:parent-style-name="Text_20_body" style:list-style-name="L5">
      <style:paragraph-properties fo:line-height="100%" fo:text-align="justify" style:justify-single-word="false"/>
    </style:style>
    <style:style style:name="P27" style:family="paragraph" style:parent-style-name="Text_20_body" style:list-style-name="L6">
      <style:paragraph-properties fo:line-height="100%" fo:text-align="justify" style:justify-single-word="false"/>
    </style:style>
    <style:style style:name="P28" style:family="paragraph" style:parent-style-name="Text_20_body">
      <style:paragraph-properties fo:line-height="100%" fo:text-align="justify" style:justify-single-word="false"/>
      <style:text-properties officeooo:paragraph-rsid="00158c5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style:font-size-asian="13pt" style:font-size-complex="13pt"/>
    </style:style>
    <style:style style:name="T3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font-weight="normal" officeooo:rsid="00096be1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font-weight="normal" officeooo:rsid="000be33c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96be1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be33c" style:font-size-asian="13pt" style:font-weight-asian="normal" style:font-size-complex="13pt" style:font-weight-complex="normal"/>
    </style:style>
    <style:style style:name="T12" style:family="text">
      <style:text-properties fo:font-weight="normal" officeooo:rsid="00096be1" style:font-weight-asian="normal" style:font-weight-complex="normal"/>
    </style:style>
    <style:style style:name="T13" style:family="text">
      <style:text-properties fo:font-weight="normal" officeooo:rsid="000be33c" style:font-weight-asian="normal" style:font-weight-complex="normal"/>
    </style:style>
    <style:style style:name="T14" style:family="text">
      <style:text-properties officeooo:rsid="00096be1"/>
    </style:style>
    <style:style style:name="T15" style:family="text">
      <style:text-properties officeooo:rsid="000be33c"/>
    </style:style>
    <style:style style:name="T16" style:family="text">
      <style:text-properties officeooo:rsid="000d7875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. Ví dụ khi bạn chạy:</text:p>
      <text:section text:style-name="Sect1" text:name="code-block-viewer">
        <text:p text:style-name="P3">sleep 100 &amp;</text:p>
        <text:p text:style-name="P4">sleep 200 &amp;</text:p>
        <text:p text:style-name="P4">sleep 300 &amp;</text:p>
      </text:section>
      <text:p text:style-name="P15">Sau đó kiểm tra:</text:p>
      <text:section text:style-name="Sect1" text:name="Section1">
        <text:p text:style-name="P3"><text:bookmark text:name="code-block-viewer"/>jobs</text:p>
      </text:section>
      <text:p text:style-name="P15">Có thể thấy:</text:p>
      <text:section text:style-name="Sect1" text:name="Section2">
        <text:p text:style-name="P3"><text:bookmark text:name="code-block-viewer Copy 1"/>[1] <text:s text:c="2"/>Running <text:s/>sleep 100 &amp;</text:p>
        <text:p text:style-name="P4">[2]- <text:s/>Running <text:s/>sleep 200 &amp;</text:p>
        <text:p text:style-name="P4">[3]+ <text:s/>Running <text:s/>sleep 300 &amp;</text:p>
      </text:section>
      <text:p text:style-name="P15">Giải thích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Ký hiệu</text:p>
            </table:table-cell>
            <table:table-cell table:style-name="Table1.A1" office:value-type="string">
              <text:p text:style-name="P13">Ý nghĩa</text:p>
            </table:table-cell>
          </table:table-row>
        </table:table-header-rows>
        <table:table-row>
          <table:table-cell table:style-name="Table1.A1" office:value-type="string">
            <text:p text:style-name="P12"><text:span text:style-name="Source_20_Text"><text:span text:style-name="T4">[3]+</text:span></text:span></text:p>
          </table:table-cell>
          <table:table-cell table:style-name="Table1.A1" office:value-type="string">
            <text:p text:style-name="P12"><text:span text:style-name="Strong_20_Emphasis"><text:span text:style-name="T4">Current job</text:span></text:span><text:span text:style-name="T4"> (job hiện tại / mặc định)</text:span></text:p>
          </table:table-cell>
        </table:table-row>
        <table:table-row>
          <table:table-cell table:style-name="Table1.A1" office:value-type="string">
            <text:p text:style-name="P12"><text:span text:style-name="Source_20_Text"><text:span text:style-name="T4">[2]-</text:span></text:span></text:p>
          </table:table-cell>
          <table:table-cell table:style-name="Table1.A1" office:value-type="string">
            <text:p text:style-name="P12"><text:span text:style-name="Strong_20_Emphasis"><text:span text:style-name="T4">Previous job</text:span></text:span><text:span text:style-name="T4"> (job trước đó)</text:span></text:p>
          </table:table-cell>
        </table:table-row>
        <table:table-row>
          <table:table-cell table:style-name="Table1.A1" office:value-type="string">
            <text:p text:style-name="P12"><text:span text:style-name="Source_20_Text"><text:span text:style-name="T4">[1]</text:span></text:span></text:p>
          </table:table-cell>
          <table:table-cell table:style-name="Table1.A1" office:value-type="string">
            <text:p text:style-name="P11">Job bình thường</text:p>
          </table:table-cell>
        </table:table-row>
      </table:table>
      <text:p text:style-name="P6"/>
      <text:p text:style-name="P6">Bạn có thể dùng trực tiếp:</text:p>
      <text:p text:style-name="P7">fg %+ <text:s text:c="4"/># foreground current job</text:p>
      <text:p text:style-name="P7">fg %- <text:s text:c="4"/># foreground previous job</text:p>
      <text:p text:style-name="P7">hoặc</text:p>
      <text:p text:style-name="P7">bg %+ </text:p>
      <text:p text:style-name="P7">bg %- </text:p>
      <text:p text:style-name="P7"/>
      <text:p text:style-name="P5">2. Các loại process</text:p>
      <text:p text:style-name="P9"><text:span text:style-name="T14">2.1. </text:span>Parent Process và Child Process</text:p>
      <text:p text:style-name="P21"><text:span text:style-name="T4"><text:s/>- Trong Linux, </text:span><text:span text:style-name="Strong_20_Emphasis"><text:span text:style-name="T4">mỗi process đều được tạo ra bởi một process khác</text:span></text:span><text:span text:style-name="T4">.</text:span></text:p>
      <text:list text:style-name="L1">
        <text:list-item>
          <text:p text:style-name="P22"><text:span text:style-name="T4">Process tạo ra process mới gọi là </text:span><text:span text:style-name="Strong_20_Emphasis"><text:span text:style-name="T4">parent process</text:span></text:span></text:p>
        </text:list-item>
        <text:list-item>
          <text:p text:style-name="P22"><text:span text:style-name="T4">Process mới được tạo gọi là </text:span><text:span text:style-name="Strong_20_Emphasis"><text:span text:style-name="T4">child process</text:span></text:span></text:p>
        </text:list-item>
      </text:list>
      <text:p text:style-name="P21"><text:span text:style-name="T4">Việc tạo process mới thường dùng system call </text:span><text:span text:style-name="Strong_20_Emphasis"><text:span text:style-name="Source_20_Text"><text:span text:style-name="T4">fork()</text:span></text:span></text:span><text:span text:style-name="T4">.</text:span></text:p>
      <text:p text:style-name="P20">Ví dụ cấu trúc:</text:p>
      <text:section text:style-name="Sect1" text:name="Section3">
        <text:p text:style-name="P3"><text:bookmark text:name="code-block-viewer Copy 6"/>bash</text:p>
        <text:p text:style-name="P4"><text:s/>└── sleep</text:p>
      </text:section>
      <text:list text:style-name="L2">
        <text:list-item>
          <text:p text:style-name="P23"><text:span text:style-name="Source_20_Text"><text:span text:style-name="T4">bash</text:span></text:span><text:span text:style-name="T4"> → parent</text:span></text:p>
        </text:list-item>
        <text:list-item>
          <text:p text:style-name="P23"><text:span text:style-name="Source_20_Text"><text:span text:style-name="T4">sleep</text:span></text:span><text:span text:style-name="T4"> → child</text:span></text:p>
        </text:list-item>
      </text:list>
      <text:p text:style-name="P15">Khi bạn chạy lệnh:</text:p>
      <text:section text:style-name="Sect1" text:name="Section4">
        <text:p text:style-name="P3"><text:bookmark text:name="code-block-viewer Copy 7"/>sleep 60</text:p>
      </text:section>
      <text:p text:style-name="P15">Shell như Bash sẽ:</text:p>
      <text:list text:style-name="L3">
        <text:list-item>
          <text:p text:style-name="P24"><text:span text:style-name="T4">gọi </text:span><text:span text:style-name="Source_20_Text"><text:span text:style-name="T4">fork()</text:span></text:span><text:span text:style-name="T4"> → tạo process mới</text:span></text:p>
        </text:list-item>
        <text:list-item>
          <text:p text:style-name="P24"><text:span text:style-name="T4">child process chạy chương trình </text:span><text:span text:style-name="Source_20_Text"><text:span text:style-name="T4">sleep</text:span></text:span></text:p>
        </text:list-item>
      </text:list>
      <text:h text:style-name="P2" text:outline-level="2"><text:soft-page-break/>- Xem Parent và Child</text:h>
      <text:p text:style-name="P15">Dùng lệnh:</text:p>
      <text:section text:style-name="Sect1" text:name="Section5">
        <text:p text:style-name="P3"><text:bookmark text:name="code-block-viewer Copy 8"/>ps -f</text:p>
      </text:section>
      <text:p text:style-name="P20">Ví dụ:</text:p>
      <text:section text:style-name="Sect1" text:name="Section6">
        <text:p text:style-name="P3"><text:bookmark text:name="code-block-viewer Copy 9"/>UID <text:s text:c="2"/>PID <text:s text:c="2"/>PPID CMD</text:p>
        <text:p text:style-name="P4">hai <text:s text:c="4"/>7412 <text:s text:c="2"/>7400 bash</text:p>
        <text:p text:style-name="P4">hai <text:s text:c="2"/>21056 <text:s text:c="2"/>7412 sleep</text:p>
      </text:section>
      <text:p text:style-name="P15">Giải thích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3">PID</text:p>
            </table:table-cell>
            <table:table-cell table:style-name="Table2.A1" office:value-type="string">
              <text:p text:style-name="P13">PPID</text:p>
            </table:table-cell>
            <table:table-cell table:style-name="Table2.A1" office:value-type="string">
              <text:p text:style-name="P13">Process</text:p>
            </table:table-cell>
          </table:table-row>
        </table:table-header-rows>
        <table:table-row>
          <table:table-cell table:style-name="Table2.A1" office:value-type="string">
            <text:p text:style-name="P11">7412</text:p>
          </table:table-cell>
          <table:table-cell table:style-name="Table2.A1" office:value-type="string">
            <text:p text:style-name="P11">7400</text:p>
          </table:table-cell>
          <table:table-cell table:style-name="Table2.A1" office:value-type="string">
            <text:p text:style-name="P11">bash</text:p>
          </table:table-cell>
        </table:table-row>
        <table:table-row>
          <table:table-cell table:style-name="Table2.A1" office:value-type="string">
            <text:p text:style-name="P11">21056</text:p>
          </table:table-cell>
          <table:table-cell table:style-name="Table2.A1" office:value-type="string">
            <text:p text:style-name="P11">7412</text:p>
          </table:table-cell>
          <table:table-cell table:style-name="Table2.A1" office:value-type="string">
            <text:p text:style-name="P11">sleep</text:p>
          </table:table-cell>
        </table:table-row>
      </table:table>
      <text:p text:style-name="P15">Ở đây:</text:p>
      <text:section text:style-name="Sect1" text:name="Section7">
        <text:p text:style-name="P3"><text:bookmark text:name="code-block-viewer Copy 10"/>bash (7412)</text:p>
        <text:p text:style-name="P4"><text:s/>└── sleep (21056)</text:p>
      </text:section>
      <text:p text:style-name="P8"/>
      <text:p text:style-name="P10"><text:span text:style-name="T15">2.2. </text:span>Zombie Process và Orphan Process</text:p>
      <text:p text:style-name="P28"><text:span text:style-name="T4">Hai loại này liên quan đến </text:span><text:span text:style-name="Strong_20_Emphasis"><text:span text:style-name="T4">process đã kết thúc hoặc mất parent</text:span></text:span><text:span text:style-name="T4">.</text:span></text:p>
      <text:p text:style-name="P28"><text:span text:style-name="T4">- Zombie Process:</text:span></text:p>
      <text:p text:style-name="P21"><text:span text:style-name="T4">Zombie là </text:span><text:span text:style-name="Strong_20_Emphasis"><text:span text:style-name="T4">process đã chết nhưng vẫn còn trong process table</text:span></text:span><text:span text:style-name="T4">.</text:span></text:p>
      <text:p text:style-name="P15">Quy trình:</text:p>
      <text:list text:style-name="L4">
        <text:list-item>
          <text:p text:style-name="P16">Child process kết thúc</text:p>
        </text:list-item>
        <text:list-item>
          <text:p text:style-name="P25"><text:span text:style-name="T4">Kernel gửi </text:span><text:span text:style-name="Strong_20_Emphasis"><text:span text:style-name="T4">SIGCHLD</text:span></text:span><text:span text:style-name="T4"> cho parent</text:span></text:p>
        </text:list-item>
        <text:list-item>
          <text:p text:style-name="P25"><text:span text:style-name="T4">Parent phải gọi </text:span><text:span text:style-name="Source_20_Text"><text:span text:style-name="T4">wait()</text:span></text:span><text:span text:style-name="T4"> để đọc </text:span><text:span text:style-name="Strong_20_Emphasis"><text:span text:style-name="T4">exit status</text:span></text:span></text:p>
        </text:list-item>
      </text:list>
      <text:p text:style-name="P21"><text:span text:style-name="T4">Nếu parent </text:span><text:span text:style-name="Strong_20_Emphasis"><text:span text:style-name="T4">chưa đọc exit status</text:span></text:span><text:span text:style-name="T4">, child sẽ trở thành </text:span><text:span text:style-name="Strong_20_Emphasis"><text:span text:style-name="T4">zombie</text:span></text:span><text:span text:style-name="T4">.</text:span></text:p>
      <text:p text:style-name="P15">Zombie:</text:p>
      <text:list text:style-name="L5">
        <text:list-item>
          <text:p text:style-name="P17">đã kết thúc</text:p>
        </text:list-item>
        <text:list-item>
          <text:p text:style-name="P17">không dùng CPU</text:p>
        </text:list-item>
        <text:list-item>
          <text:p text:style-name="P26"><text:span text:style-name="T4">chỉ giữ </text:span><text:span text:style-name="Strong_20_Emphasis"><text:span text:style-name="T4">PID trong process table</text:span></text:span></text:p>
        </text:list-item>
      </text:list>
      <text:p text:style-name="P21"><text:span text:style-name="T7">Ví dụ trong </text:span><text:span text:style-name="Source_20_Text"><text:span text:style-name="T7">ps</text:span></text:span><text:span text:style-name="T7">:</text:span></text:p>
      <text:section text:style-name="Sect1" text:name="Section8">
        <text:p text:style-name="P3"><text:bookmark text:name="code-block-viewer Copy 11"/>PID <text:s/>PPID STAT CMD</text:p>
        <text:p text:style-name="P4">1200 1100 Z <text:s text:c="3"/>sleep</text:p>
      </text:section>
      <text:p text:style-name="P21"><text:span text:style-name="Source_20_Text"><text:span text:style-name="T4">Z</text:span></text:span><text:span text:style-name="T4"> nghĩa là </text:span><text:span text:style-name="Strong_20_Emphasis"><text:span text:style-name="T4">Zombie</text:span></text:span><text:span text:style-name="T4">.</text:span></text:p>
      <text:h text:style-name="P2" text:outline-level="2">- Orphan Process:</text:h>
      <text:p text:style-name="P15">Orphan xảy ra khi:</text:p>
      <text:list text:style-name="L6">
        <text:list-item>
          <text:p text:style-name="P27"><text:span text:style-name="Strong_20_Emphasis"><text:span text:style-name="T4">parent chết trước child</text:span></text:span></text:p>
        </text:list-item>
      </text:list>
      <text:p text:style-name="P20">Ví dụ:</text:p>
      <text:section text:style-name="Sect1" text:name="Section9">
        <text:p text:style-name="P3"><text:bookmark text:name="code-block-viewer Copy 12"/><text:soft-page-break/>parent</text:p>
        <text:p text:style-name="P4"><text:s/>└── child</text:p>
      </text:section>
      <text:p text:style-name="P21"><text:span text:style-name="T4">Nếu </text:span><text:span text:style-name="Source_20_Text"><text:span text:style-name="T4">parent</text:span></text:span><text:span text:style-name="T4"> bị kill trước:</text:span></text:p>
      <text:section text:style-name="Sect1" text:name="Section10">
        <text:p text:style-name="P3"><text:bookmark text:name="code-block-viewer Copy 13"/>(child vẫn chạy)</text:p>
      </text:section>
      <text:p text:style-name="P21"><text:span text:style-name="T4">Child trở thành </text:span><text:span text:style-name="Strong_20_Emphasis"><text:span text:style-name="T4">orphan process</text:span></text:span><text:span text:style-name="T4">.</text:span></text:p>
      <text:p text:style-name="P21"><text:span text:style-name="T4">Linux sẽ giao process này cho </text:span><text:span text:style-name="Strong_20_Emphasis"><text:span text:style-name="T4">init process</text:span></text:span><text:span text:style-name="T4"> quản lý. Process này là systemd (trong Linux hiện đại) hoặc trước đây là init. Process này có </text:span><text:span text:style-name="Strong_20_Emphasis"><text:span text:style-name="T4">PID = 1</text:span></text:span><text:span text:style-name="T4">.</text:span></text:p>
      <text:p text:style-name="P15">Sau đó:</text:p>
      <text:section text:style-name="Sect1" text:name="Section11">
        <text:p text:style-name="P3"><text:bookmark text:name="code-block-viewer Copy 14"/>systemd (PID 1)</text:p>
        <text:p text:style-name="P4"><text:s text:c="3"/>└── orphan child</text:p>
      </text:section>
      <text:h text:style-name="P1" text:outline-level="1"><text:span text:style-name="T16">2.3 </text:span>Daemon Process</text:h>
      <text:p text:style-name="P21"><text:span text:style-name="Strong_20_Emphasis"><text:span text:style-name="T4">Daemon</text:span></text:span><text:span text:style-name="T4"> là process chạy </text:span><text:span text:style-name="Strong_20_Emphasis"><text:span text:style-name="T4">nền (background)</text:span></text:span><text:span text:style-name="T4"> để cung cấp </text:span><text:span text:style-name="Strong_20_Emphasis"><text:span text:style-name="T4">dịch vụ hệ thống</text:span></text:span><text:span text:style-name="T4">.</text:span></text:p>
      <text:p text:style-name="P15">Đặc điểm:</text:p>
      <text:list text:style-name="L7">
        <text:list-item>
          <text:p text:style-name="P18">chạy liên tục</text:p>
        </text:list-item>
        <text:list-item>
          <text:p text:style-name="P18">không gắn với terminal</text:p>
        </text:list-item>
        <text:list-item>
          <text:p text:style-name="P18">thường chạy với quyền root</text:p>
        </text:list-item>
        <text:list-item>
          <text:p text:style-name="P18">phục vụ các process khác</text:p>
        </text:list-item>
      </text:list>
      <text:p text:style-name="P20">Ví dụ daemon phổ biến:</text:p>
      <text:list text:style-name="L8">
        <text:list-item>
          <text:p text:style-name="P19">sshd → cho phép SSH</text:p>
        </text:list-item>
        <text:list-item>
          <text:p text:style-name="P19">cron → chạy task định kỳ</text:p>
        </text:list-item>
        <text:list-item>
          <text:p text:style-name="P19">cupsd → dịch vụ in</text:p>
        </text:list-item>
      </text:list>
      <text:h text:style-name="P2" text:outline-level="2">Daemon không có terminal</text:h>
      <text:p text:style-name="P15">Nếu chạy:</text:p>
      <text:section text:style-name="Sect1" text:name="Section12">
        <text:p text:style-name="P3"><text:bookmark text:name="code-block-viewer Copy 15"/>ps -ef</text:p>
      </text:section>
      <text:p text:style-name="P15">Bạn sẽ thấy:</text:p>
      <text:section text:style-name="Sect1" text:name="Section13">
        <text:p text:style-name="P3"><text:bookmark text:name="code-block-viewer Copy 16"/>UID <text:s text:c="2"/>PID <text:s/>TTY CMD</text:p>
        <text:p text:style-name="P4">root <text:s text:c="3"/>890 <text:s text:c="2"/>? <text:s text:c="5"/>sshd</text:p>
        <text:p text:style-name="P4">root <text:s text:c="3"/>700 <text:s text:c="2"/>? <text:s text:c="5"/>cron</text:p>
      </text:section>
      <text:p text:style-name="P21"><text:span text:style-name="T4">Cột </text:span><text:span text:style-name="Strong_20_Emphasis"><text:span text:style-name="T4">TTY = ?</text:span></text:span></text:p>
      <text:p text:style-name="P15">Nghĩa là:</text:p>
      <text:section text:style-name="Sect1" text:name="Section14">
        <text:p text:style-name="P3"><text:bookmark text:name="code-block-viewer Copy 17"/>process không gắn với terminal</text:p>
      </text:section>
      <text:p text:style-name="P21"><text:span text:style-name="T4">→ chính là </text:span><text:span text:style-name="Strong_20_Emphasis"><text:span text:style-name="T4">daemon proces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8:47:22.058679380</meta:creation-date>
    <dc:date>2026-03-15T19:34:08.989423120</dc:date>
    <meta:editing-duration>PT35M19S</meta:editing-duration>
    <meta:editing-cycles>22</meta:editing-cycles>
    <meta:generator>LibreOffice/24.2.7.2$Linux_X86_64 LibreOffice_project/420$Build-2</meta:generator>
    <meta:document-statistic meta:table-count="2" meta:image-count="0" meta:object-count="0" meta:page-count="3" meta:paragraph-count="113" meta:word-count="484" meta:character-count="2305" meta:non-whitespace-character-count="1889"/>
  </office:meta>
</office:document-meta>
</file>