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Preformatted_20_Text">
      <style:paragraph-properties fo:line-height="100%"/>
      <style:text-properties style:font-name="Liberation Serif" fo:font-size="13pt" style:font-size-asian="13pt" style:font-size-complex="13pt"/>
    </style:style>
    <style:style style:name="P2" style:family="paragraph" style:parent-style-name="Preformatted_20_Text">
      <style:paragraph-properties fo:line-height="100%"/>
      <style:text-properties style:font-name="Liberation Serif" fo:font-size="13pt" fo:font-style="italic" fo:font-weight="bold" style:font-size-asian="13pt" style:font-style-asian="italic" style:font-weight-asian="bold" style:font-size-complex="13pt" style:font-style-complex="italic" style:font-weight-complex="bold"/>
    </style:style>
    <style:style style:name="P3" style:family="paragraph" style:parent-style-name="Preformatted_20_Text">
      <style:paragraph-properties fo:line-height="100%"/>
      <style:text-properties style:font-name="Liberation Serif" fo:font-size="15pt" fo:font-weight="bold" style:font-size-asian="15pt" style:font-weight-asian="bold" style:font-size-complex="15pt"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 Môi trường hoạt động của một process</text:p>
      <text:p text:style-name="P1">Một process (tiến trình) không chỉ là chương trình đang chạy, mà nó còn tồn tại trong một môi trường hoạt động chứa tất cả thông tin mà process cần để thực thi. Môi trường này bao gồm:</text:p>
      <text:p text:style-name="P1"><text:s text:c="4"/>• Không gian địa chỉ (Address space): nơi chứa code, dữ liệu, stack và heap của process. </text:p>
      <text:p text:style-name="P1"><text:s text:c="4"/>• File descriptors: các mô tả file đang mở. </text:p>
      <text:p text:style-name="P1"><text:s text:c="4"/>• Các biến môi trường (environment variables): như PATH, HOME,… </text:p>
      <text:p text:style-name="P1"><text:s text:c="4"/>• Thông tin tiến trình: PID, PPID, quyền truy cập, signal handler… </text:p>
      <text:p text:style-name="P1"><text:s text:c="4"/>• Các tài nguyên hệ thống: semaphore, shared memory, mutex, v.v. </text:p>
      <text:p text:style-name="P1">Nói cách khác, môi trường hoạt động là “bộ sưu tập dữ liệu và tài nguyên” mà process cần để chạy một cách độc lập trong hệ điều hành.</text:p>
      <text:p text:style-name="P3">2. Các thông số môi trường quan trọng</text:p>
      <text:p text:style-name="P2">a) Hàm main</text:p>
      <text:p text:style-name="P1">Hàm main là điểm bắt đầu của một process trong C/C++. Cú pháp thông dụng:</text:p>
      <text:p text:style-name="P1">int main(int argc, char *argv[])</text:p>
      <text:p text:style-name="P1"><text:s text:c="4"/>• argc (argument count): số lượng tham số được truyền vào khi chạy chương trình, bao gồm cả tên chương trình. </text:p>
      <text:p text:style-name="P1"><text:s text:c="4"/>• argv (argument vector): mảng các chuỗi chứa các tham số đó. </text:p>
      <text:p text:style-name="P1">Ví dụ chạy chương trình:</text:p>
      <text:p text:style-name="P1">./myprogram param1 param2</text:p>
      <text:p text:style-name="P1"><text:s text:c="4"/>• argc = 3 </text:p>
      <text:p text:style-name="P1"><text:s text:c="4"/>• argv[0] = "./myprogram" </text:p>
      <text:p text:style-name="P1"><text:s text:c="4"/>• argv[1] = "param1" </text:p>
      <text:p text:style-name="P1"><text:s text:c="4"/>• argv[2] = "param2" </text:p>
      <text:p text:style-name="P2">b) Giá trị trả về khi terminate</text:p>
      <text:p text:style-name="P1">Hàm main trả về một giá trị số nguyên, được gọi là exit status:</text:p>
      <text:p text:style-name="P1"><text:s text:c="4"/>• return 0; → chương trình kết thúc thành công. </text:p>
      <text:p text:style-name="P1"><text:s text:c="4"/>• return non-zero; → chương trình gặp lỗi. </text:p>
      <text:p text:style-name="P1"><text:s text:c="4"/>• Hệ điều hành sử dụng giá trị này để biết tình trạng kết thúc của process (ví dụ trong shell: $?). </text:p>
      <text:p text:style-name="P2">c) Tham số truyền vào</text:p>
      <text:p text:style-name="P1">Như trên, tham số truyền vào được dùng để tùy biến hành vi của chương trình mà không cần chỉnh code. Đây là cách process tương tác với người dùng hoặc các script khác.</text:p>
      <text:p text:style-name="P2">d) Shared Library</text:p>
      <text:p text:style-name="P1"><text:s text:c="4"/>• Là các thư viện dùng chung (shared object .so) được load khi chương trình chạy. </text:p>
      <text:p text:style-name="P1"><text:s text:c="4"/>• Giúp tiết kiệm bộ nhớ, vì nhiều process có thể cùng dùng một bản copy trong RAM. </text:p>
      <text:p text:style-name="P1"><text:s text:c="4"/>• Ví dụ: libc.so chứa các hàm chuẩn C như printf, malloc… </text:p>
      <text:p text:style-name="P1">Các process cần biết đường dẫn và version của shared library để chạy đúng. Nếu thiếu thư viện, process sẽ không khởi chạy được.</text:p>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vi" fo:country="VN"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vi" fo:country="VN"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dc:date>2026-03-25T18:54:47.889120369</dc:date>
    <meta:editing-duration>PT1M4S</meta:editing-duration>
    <meta:editing-cycles>2</meta:editing-cycles>
    <meta:document-statistic meta:table-count="0" meta:image-count="0" meta:object-count="0" meta:page-count="1" meta:paragraph-count="32" meta:word-count="395" meta:character-count="2046" meta:non-whitespace-character-count="1598"/>
  </office:meta>
</office:document-meta>
</file>