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1" style:family="table-row">
      <style:table-row-properties style:min-row-height="0.9375in"/>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P1" style:family="paragraph" style:parent-style-name="Preformatted_20_Text">
      <style:paragraph-properties fo:margin-top="0.0598in" fo:margin-bottom="0.0598in" style:contextual-spacing="false" fo:line-height="100%" fo:text-align="justify" style:justify-single-word="false"/>
      <style:text-properties officeooo:paragraph-rsid="0003d78f"/>
    </style:style>
    <style:style style:name="P2" style:family="paragraph" style:parent-style-name="Preformatted_20_Text">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3" style:family="paragraph" style:parent-style-name="Table_20_Contents">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4" style:family="paragraph" style:parent-style-name="Standard">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5" style:family="paragraph" style:parent-style-name="Heading_20_3">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6" style:family="paragraph" style:parent-style-name="Text_20_body">
      <style:paragraph-properties fo:margin-top="0.0598in" fo:margin-bottom="0.0598in" style:contextual-spacing="false" fo:line-height="100%" fo:text-align="justify" style:justify-single-word="false"/>
    </style:style>
    <style:style style:name="P7" style:family="paragraph" style:parent-style-name="Text_20_body" style:list-style-name="L1">
      <style:paragraph-properties fo:margin-top="0.0598in" fo:margin-bottom="0.0598in" style:contextual-spacing="false" fo:line-height="100%" fo:text-align="justify" style:justify-single-word="false"/>
    </style:style>
    <style:style style:name="P8" style:family="paragraph" style:parent-style-name="Text_20_body" style:list-style-name="L5">
      <style:paragraph-properties fo:margin-top="0.0598in" fo:margin-bottom="0.0598in" style:contextual-spacing="false" fo:line-height="100%" fo:text-align="justify" style:justify-single-word="false"/>
    </style:style>
    <style:style style:name="P9" style:family="paragraph" style:parent-style-name="Text_20_body">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0" style:family="paragraph" style:parent-style-name="Text_20_body" style:list-style-name="L1">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1" style:family="paragraph" style:parent-style-name="Text_20_body" style:list-style-name="L2">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2" style:family="paragraph" style:parent-style-name="Text_20_body" style:list-style-name="L3">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3" style:family="paragraph" style:parent-style-name="Text_20_body" style:list-style-name="L4">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4" style:family="paragraph" style:parent-style-name="Text_20_body" style:list-style-name="L5">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Liberation Serif" fo:font-size="13pt" style:font-size-asian="13pt" style:font-size-complex="13pt"/>
    </style:style>
    <style:style style:name="T4" style:family="text">
      <style:text-properties style:font-name="Liberation Serif" fo:font-size="13pt" fo:font-weight="bold" style:font-size-asian="13pt" style:font-size-complex="13pt"/>
    </style:style>
    <style:style style:name="T5" style:family="text">
      <style:text-properties officeooo:rsid="000759b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guồn tham khảo: <text:a xlink:type="simple" xlink:href="https://aeb.win.tue.nl/linux/lk/lk-5.html?utm_source=chatgpt.com" text:style-name="Internet_20_link" text:visited-style-name="Visited_20_Internet_20_Link"><text:span text:style-name="T5">https://aeb.win.tue.nl/linux/lk/lk-5.html?utm_source=chatgpt.com</text:span></text:a><text:line-break/><text:span text:style-name="T2">5. Tín hiệu (Signals)</text:span></text:p>
      <text:p text:style-name="P9">Kênh giao tiếp phổ biến giữa chương trình ở không gian người dùng (<text:span text:style-name="T1">user space</text:span>) và nhân hệ điều hành (<text:span text:style-name="T1">kernel</text:span>) được thực hiện thông qua các lời gọi hệ thống (<text:span text:style-name="T1">system calls</text:span>). Tuy nhiên, còn có một kênh khác, đó là <text:span text:style-name="T1">tín hiệu (signals)</text:span>, được sử dụng để giao tiếp giữa các tiến trình người dùng với nhau, cũng như từ nhân hệ điều hành gửi đến tiến trình người dùng.</text:p>
      <text:h text:style-name="P5" text:outline-level="3">5.1 Gửi tín hiệu</text:h>
      <text:p text:style-name="P6"><text:span text:style-name="T3">Một chương trình có thể gửi tín hiệu cho một chương trình khác bằng cách sử dụng lời gọi hệ thống </text:span><text:span text:style-name="Source_20_Text"><text:span text:style-name="T3">kill()</text:span></text:span><text:span text:style-name="T3"> với nguyên mẫu:</text:span></text:p>
      <text:p text:style-name="P6"><text:span text:style-name="Source_20_Text"><text:span text:style-name="T3">int kill(pid_t pid, int sig);</text:span></text:span></text:p>
      <text:p text:style-name="P6"><text:span text:style-name="T3">Hàm này sẽ gửi tín hiệu có số hiệu </text:span><text:span text:style-name="Source_20_Text"><text:span text:style-name="T3">sig</text:span></text:span><text:span text:style-name="T3"> đến tiến trình có mã định danh (</text:span><text:span text:style-name="T4">PID</text:span><text:span text:style-name="T3">) là </text:span><text:span text:style-name="Source_20_Text"><text:span text:style-name="T3">pid</text:span></text:span><text:span text:style-name="T3">. Các số hiệu tín hiệu là các số nguyên dương nhỏ. (Để xem các định nghĩa trên máy của bạn, hãy kiểm tra tệp </text:span><text:span text:style-name="Source_20_Text"><text:span text:style-name="T3">/usr/include/bits/signum.h</text:span></text:span><text:span text:style-name="T3">. Lưu ý rằng các định nghĩa này phụ thuộc vào hệ điều hành và kiến trúc máy tính).</text:span></text:p>
      <text:p text:style-name="P6"><text:span text:style-name="T3">Người dùng có thể gửi tín hiệu từ dòng lệnh bằng lệnh </text:span><text:span text:style-name="Source_20_Text"><text:span text:style-name="T3">kill</text:span></text:span><text:span text:style-name="T3">. Các cách dùng phổ biến là </text:span><text:span text:style-name="Source_20_Text"><text:span text:style-name="T3">kill -9 N</text:span></text:span><text:span text:style-name="T3"> để buộc dừng tiến trình có PID là </text:span><text:span text:style-name="Source_20_Text"><text:span text:style-name="T3">N</text:span></text:span><text:span text:style-name="T3">, hoặc </text:span><text:span text:style-name="Source_20_Text"><text:span text:style-name="T3">kill -1 N</text:span></text:span><text:span text:style-name="T3"> để buộc tiến trình </text:span><text:span text:style-name="Source_20_Text"><text:span text:style-name="T3">N</text:span></text:span><text:span text:style-name="T3"> (có thể là </text:span><text:span text:style-name="Source_20_Text"><text:span text:style-name="T3">init</text:span></text:span><text:span text:style-name="T3"> hoặc </text:span><text:span text:style-name="Source_20_Text"><text:span text:style-name="T3">inetd</text:span></text:span><text:span text:style-name="T3">) đọc lại tệp cấu hình của nó.</text:span></text:p>
      <text:p text:style-name="P9">Một số hành động nhất định của người dùng sẽ khiến nhân hệ điều hành gửi tín hiệu đến một hoặc một nhóm tiến trình:</text:p>
      <text:list text:style-name="L1">
        <text:list-item>
          <text:p text:style-name="P7"><text:span text:style-name="T3">Nhấn phím ngắt - </text:span><text:span text:style-name="T4">interrupt</text:span><text:span text:style-name="T3"> (thường là </text:span><text:span text:style-name="Source_20_Text"><text:span text:style-name="T3">Ctrl-C</text:span></text:span><text:span text:style-name="T3">) sẽ gửi tín hiệu </text:span><text:span text:style-name="T4">SIGINT</text:span><text:span text:style-name="T3">.</text:span></text:p>
        </text:list-item>
        <text:list-item>
          <text:p text:style-name="P7"><text:span text:style-name="T3">Nhấn phím thoát - </text:span><text:span text:style-name="T4">quit</text:span><text:span text:style-name="T3"> (thường là </text:span><text:span text:style-name="Source_20_Text"><text:span text:style-name="T3">Ctrl-\</text:span></text:span><text:span text:style-name="T3">) sẽ gửi </text:span><text:span text:style-name="T4">SIGQUIT</text:span><text:span text:style-name="T3">.</text:span></text:p>
        </text:list-item>
        <text:list-item>
          <text:p text:style-name="P10">Ngắt kết nối vật lý (<text:span text:style-name="T1">hang up</text:span>) gửi <text:span text:style-name="T1">SIGHUP</text:span>.</text:p>
        </text:list-item>
        <text:list-item>
          <text:p text:style-name="P7"><text:span text:style-name="T3">Nhấn phím dừng - </text:span><text:span text:style-name="T4">stop</text:span><text:span text:style-name="T3"> (thường là </text:span><text:span text:style-name="Source_20_Text"><text:span text:style-name="T3">Ctrl-Z</text:span></text:span><text:span text:style-name="T3">) sẽ gửi </text:span><text:span text:style-name="T4">SIGSTOP</text:span><text:span text:style-name="T3">.</text:span></text:p>
        </text:list-item>
      </text:list>
      <text:p text:style-name="P9">Một số hành vi của chương trình cũng khiến nhân hệ điều hành gửi tín hiệu đến chính tiến trình đó:</text:p>
      <text:list text:style-name="L2">
        <text:list-item>
          <text:p text:style-name="P11">Thực thi chỉ thị không hợp lệ: nhận <text:span text:style-name="T1">SIGILL</text:span>.</text:p>
        </text:list-item>
        <text:list-item>
          <text:p text:style-name="P11">Truy cập vùng nhớ không tồn tại: nhận <text:span text:style-name="T1">SIGSEGV</text:span> (lỗi phân đoạn).</text:p>
        </text:list-item>
        <text:list-item>
          <text:p text:style-name="P11">Ghi vào một đường ống (<text:span text:style-name="T1">pipe</text:span>) trong khi không còn ai nhận dữ liệu ở đầu kia: nhận <text:span text:style-name="T1">SIGPIPE</text:span>.</text:p>
        </text:list-item>
        <text:list-item>
          <text:p text:style-name="P11">Đọc dữ liệu từ thiết bị đầu cuối (<text:span text:style-name="T1">terminal</text:span>) khi đang chạy nền: nhận <text:span text:style-name="T1">SIGTTIN</text:span>, v.v.</text:p>
        </text:list-item>
      </text:list>
      <text:p text:style-name="P6"><text:span text:style-name="T3">Các hình thức giao tiếp phức tạp hơn từ nhân hệ điều hành cũng có thể thực hiện được. Bạn có thể yêu cầu nhân hệ điều hành thông báo khi có sự kiện xảy ra trên một mô tả tệp (</text:span><text:span text:style-name="T4">file descriptor</text:span><text:span text:style-name="T3">) nhất định (xem </text:span><text:span text:style-name="Source_20_Text"><text:span text:style-name="T3">fcntl(2)</text:span></text:span><text:span text:style-name="T3">). Ngoài ra còn có </text:span><text:span text:style-name="Source_20_Text"><text:span text:style-name="T3">ptrace(2)</text:span></text:span><text:span text:style-name="T3"> (xem phần dưới). Một nhóm tín hiệu riêng biệt cũng được dành riêng cho các mục đích thời gian thực (</text:span><text:span text:style-name="T4">real-time</text:span><text:span text:style-name="T3">).</text:span></text:p>
      <text:h text:style-name="P5" text:outline-level="3"><text:soft-page-break/>5.2 Nhận tín hiệu</text:h>
      <text:p text:style-name="P6"><text:span text:style-name="T3">Khi một tiến trình nhận được một tín hiệu, một hành động mặc định sẽ xảy ra, trừ khi tiến trình đó đã thiết lập cơ chế để xử lý tín hiệu đó. Để xem danh sách các tín hiệu và các hành động mặc định tương ứng, hãy tham khảo </text:span><text:span text:style-name="Source_20_Text"><text:span text:style-name="T3">signal(7)</text:span></text:span><text:span text:style-name="T3">.</text:span></text:p>
      <text:p text:style-name="P9">Ví dụ, theo mặc định:</text:p>
      <text:list text:style-name="L3">
        <text:list-item>
          <text:p text:style-name="P12"><text:span text:style-name="T1">SIGHUP, SIGINT, SIGKILL</text:span>: Kết thúc tiến trình.</text:p>
        </text:list-item>
        <text:list-item>
          <text:p text:style-name="P12"><text:span text:style-name="T1">SIGQUIT</text:span>: Kết thúc tiến trình và tạo tệp sao lưu bộ nhớ (<text:span text:style-name="T1">core dump</text:span>).</text:p>
        </text:list-item>
        <text:list-item>
          <text:p text:style-name="P12"><text:span text:style-name="T1">SIGSTOP, SIGTTIN</text:span>: Tạm dừng tiến trình.</text:p>
        </text:list-item>
        <text:list-item>
          <text:p text:style-name="P12"><text:span text:style-name="T1">SIGCONT</text:span>: Tiếp tục một tiến trình đang bị tạm dừng.</text:p>
        </text:list-item>
        <text:list-item>
          <text:p text:style-name="P12"><text:span text:style-name="T1">SIGCHLD</text:span>: Bị bỏ qua (<text:span text:style-name="T1">ignored</text:span>).</text:p>
        </text:list-item>
      </text:list>
      <text:p text:style-name="P6"><text:span text:style-name="T3">Theo cách truyền thống, người ta thiết lập một trình xử lý tín hiệu (</text:span><text:span text:style-name="T4">signal handler</text:span><text:span text:style-name="T3">) bằng lời gọi hệ thống </text:span><text:span text:style-name="Source_20_Text"><text:span text:style-name="T3">signal</text:span></text:span><text:span text:style-name="T3"> với nguyên mẫu:</text:span></text:p>
      <text:p text:style-name="P6"><text:span text:style-name="Source_20_Text"><text:span text:style-name="T3">typedef void (*sighandler_t)(int);</text:span></text:span><text:span text:style-name="T3"> </text:span><text:span text:style-name="Source_20_Text"><text:span text:style-name="T3">sighandler_t signal(int sig, sighandler_t handler);</text:span></text:span></text:p>
      <text:p text:style-name="P6"><text:span text:style-name="T3">Lệnh này thiết lập hàm </text:span><text:span text:style-name="Source_20_Text"><text:span text:style-name="T3">handler()</text:span></text:span><text:span text:style-name="T3"> làm trình xử lý cho tín hiệu số </text:span><text:span text:style-name="Source_20_Text"><text:span text:style-name="T3">sig</text:span></text:span><text:span text:style-name="T3">. Giá trị trả về là địa chỉ của trình xử lý cũ. Các giá trị đặc biệt </text:span><text:span text:style-name="Source_20_Text"><text:span text:style-name="T3">SIG_DFL</text:span></text:span><text:span text:style-name="T3"> và </text:span><text:span text:style-name="Source_20_Text"><text:span text:style-name="T3">SIG_IGN</text:span></text:span><text:span text:style-name="T3"> lần lượt đại diện cho hành động mặc định và việc bỏ qua tín hiệu.</text:span></text:p>
      <text:p text:style-name="P9">Khi một tín hiệu đến, tiến trình sẽ bị ngắt, các thanh ghi hiện tại được lưu lại và trình xử lý tín hiệu được gọi. Khi trình xử lý tín hiệu kết thúc, hoạt động bị ngắt trước đó sẽ được tiếp tục.</text:p>
      <text:p text:style-name="P9">Rất khó để thực hiện các tác vụ phức tạp trong một trình xử lý tín hiệu vì tiến trình có thể bị ngắt ở bất kỳ vị trí nào, các cấu trúc dữ liệu có thể đang ở trạng thái không ổn định, v.v. Ba việc phổ biến nhất thường làm trong một trình xử lý tín hiệu là:</text:p>
      <text:list text:style-name="L4">
        <text:list-item>
          <text:p text:style-name="P13">Thiết lập một biến cờ (<text:span text:style-name="T1">flag</text:span>) và quay trở lại ngay lập tức.</text:p>
        </text:list-item>
        <text:list-item>
          <text:p text:style-name="P13">(Phức tạp) Hủy bỏ toàn bộ những gì chương trình đang làm và khởi động lại tại một thời điểm thuận tiện (ví dụ: vòng lặp lệnh chính).</text:p>
        </text:list-item>
        <text:list-item>
          <text:p text:style-name="P13">Dọn dẹp tài nguyên và thoát.</text:p>
        </text:list-item>
      </text:list>
      <text:p text:style-name="P9">Việc thiết lập trình xử lý cho một tín hiệu được gọi là "bắt tín hiệu" (<text:span text:style-name="T1">catching the signal</text:span>). Lưu ý rằng các tín hiệu <text:span text:style-name="T1">SIGKILL</text:span> và <text:span text:style-name="T1">SIGSTOP</text:span> không thể bị bắt, bị chặn (<text:span text:style-name="T1">blocked</text:span>) hay bị bỏ qua.</text:p>
      <text:h text:style-name="P5" text:outline-level="3">5.3 Ngữ nghĩa (Semantics)</text:h>
      <text:p text:style-name="P6"><text:span text:style-name="T3">Ngữ nghĩa truyền thống là: đặt lại hành vi của tín hiệu về mặc định (</text:span><text:span text:style-name="Source_20_Text"><text:span text:style-name="T3">SIG_DFL</text:span></text:span><text:span text:style-name="T3">) ngay khi trình xử lý tín hiệu (</text:span><text:span text:style-name="T4">signal handler</text:span><text:span text:style-name="T3">) được gọi. Điều này có lẽ nhằm tránh việc gọi đệ quy. Trình xử lý sẽ thực hiện công việc của nó và cuối cùng gọi lại hàm </text:span><text:span text:style-name="Source_20_Text"><text:span text:style-name="T3">signal()</text:span></text:span><text:span text:style-name="T3"> để thiết lập lại chính nó làm trình xử lý.</text:span></text:p>
      <text:p text:style-name="P6"><text:span text:style-name="T3">Cách tiếp cận này thực sự rất bất ổn. Khi hai tín hiệu gửi đến sát nhau, tín hiệu thứ hai sẽ bị mất nếu nó đến trước khi trình xử lý kịp được gọi — vì không có cơ chế đếm tín hiệu. Và nếu nó đến sau khi trình xử lý đã được gọi, hành động mặc định sẽ xảy ra — điều này rất có </text:span><text:soft-page-break/><text:span text:style-name="T3">thể sẽ làm tiến trình bị kết thúc (kill). Ngay cả khi trình xử lý gọi lại </text:span><text:span text:style-name="Source_20_Text"><text:span text:style-name="T3">signal()</text:span></text:span><text:span text:style-name="T3"> ngay ở dòng đầu tiên, việc đó vẫn có thể là quá muộn.</text:span></text:p>
      <text:p text:style-name="P6"><text:span text:style-name="T3">Các dòng Unix khác nhau đã thay đổi ngữ nghĩa đôi chút để cải thiện tình trạng này. Một số hệ thống chặn (</text:span><text:span text:style-name="T4">block</text:span><text:span text:style-name="T3">) các tín hiệu cho đến khi tiến trình thoát khỏi trình xử lý. Giải pháp của BSD là tạo ra một lời gọi hệ thống mới, </text:span><text:span text:style-name="Source_20_Text"><text:span text:style-name="T3">sigaction()</text:span></text:span><text:span text:style-name="T3">, cho phép chỉ định chính xác hành vi mong muốn. Ngày nay, </text:span><text:span text:style-name="Source_20_Text"><text:span text:style-name="T3">signal()</text:span></text:span><text:span text:style-name="T3"> bị coi là đã lỗi thời (</text:span><text:span text:style-name="T4">deprecated</text:span><text:span text:style-name="T3">) — không nên sử dụng trong các ứng dụng chuyên nghiệp.</text:span></text:p>
      <text:h text:style-name="P5" text:outline-level="3">5.4 Chặn tín hiệu (Blocking signals)</text:h>
      <text:p text:style-name="P9">Mỗi tiến trình có một danh sách (mặt nạ bit - <text:span text:style-name="T1">bitmask</text:span>) các tín hiệu hiện đang bị chặn. Khi một tín hiệu bị chặn, nó sẽ không được phân phát (nghĩa là không có trình xử lý nào được gọi), nhưng vẫn ở trạng thái chờ (<text:span text:style-name="T1">pending</text:span>).</text:p>
      <text:p text:style-name="P6"><text:span text:style-name="T3">Lời gọi hệ thống </text:span><text:span text:style-name="Source_20_Text"><text:span text:style-name="T3">sigprocmask()</text:span></text:span><text:span text:style-name="T3"> dùng để thay đổi danh sách các tín hiệu bị chặn (xem </text:span><text:span text:style-name="Source_20_Text"><text:span text:style-name="T3">sigprocmask(2)</text:span></text:span><text:span text:style-name="T3">). Lời gọi hệ thống </text:span><text:span text:style-name="Source_20_Text"><text:span text:style-name="T3">sigpending()</text:span></text:span><text:span text:style-name="T3"> cho biết những tín hiệu nào đang (bị chặn và) đang chờ. Lời gọi hệ thống </text:span><text:span text:style-name="Source_20_Text"><text:span text:style-name="T3">sigsuspend()</text:span></text:span><text:span text:style-name="T3"> tạm dừng tiến trình đang gọi cho đến khi nhận được một tín hiệu cụ thể. Khi một tín hiệu bị chặn, nó vẫn ở trạng thái chờ ngay cả khi trong điều kiện bình thường tiến trình sẽ bỏ qua nó.</text:span></text:p>
      <text:h text:style-name="P5" text:outline-level="3">5.5 "Voodoo": wait và SIGCHLD</text:h>
      <text:p text:style-name="P6"><text:span text:style-name="T3">Khi một tiến trình tạo ra tiến trình con bằng </text:span><text:span text:style-name="Source_20_Text"><text:span text:style-name="T3">fork()</text:span></text:span><text:span text:style-name="T3"> để thực hiện một tác vụ, nó thường quan tâm đến kết quả thực hiện. Khi thoát, tiến trình con để lại một mã trạng thái thoát (</text:span><text:span text:style-name="T4">exit status</text:span><text:span text:style-name="T3">) để trả về cho tiến trình cha.</text:span></text:p>
      <text:p text:style-name="P9">Vì vậy, khi tiến trình con kết thúc, nó trở thành một <text:span text:style-name="T1">tiến trình thây ma (zombie)</text:span> — một tiến trình đã chết nhưng chưa biến mất vì nó chưa báo cáo trạng thái thoát. Bất cứ khi nào có sự kiện quan trọng xảy ra với tiến trình con (thoát, bị lỗi/crash, dính bẫy/trap, dừng, hoặc tiếp tục), và đặc biệt là khi nó chết, tiến trình cha sẽ nhận được tín hiệu <text:span text:style-name="T1">SIGCHLD</text:span>.</text:p>
      <text:p text:style-name="P6"><text:span text:style-name="T3">Tiến trình cha có thể sử dụng lời gọi hệ thống </text:span><text:span text:style-name="Source_20_Text"><text:span text:style-name="T3">wait()</text:span></text:span><text:span text:style-name="T3">, </text:span><text:span text:style-name="Source_20_Text"><text:span text:style-name="T3">waitpid()</text:span></text:span><text:span text:style-name="T3"> hoặc các biến thể tương tự để biết trạng thái của các tiến trình con đã dừng hoặc đã chết. Trong trường hợp tiến trình con đã chết, ngay sau khi trạng thái được báo cáo, tiến trình thây ma sẽ biến mất. Nếu tiến trình cha không quan tâm, nó có thể khai báo rõ ràng (trước khi </text:span><text:span text:style-name="Source_20_Text"><text:span text:style-name="T3">fork</text:span></text:span><text:span text:style-name="T3">) bằng cách sử dụng:</text:span></text:p>
      <text:p text:style-name="P6"><text:span text:style-name="Source_20_Text"><text:span text:style-name="T3">signal(SIGCHLD, SIG_IGN);</text:span></text:span></text:p>
      <text:p text:style-name="P9">hoặc:</text:p>
      <table:table table:name="Table1" table:style-name="Table1">
        <table:table-column table:style-name="Table1.A"/>
        <table:table-row table:style-name="Table1.1">
          <table:table-cell table:style-name="Table1.A1" office:value-type="string">
            <text:p text:style-name="P1"><text:span text:style-name="Source_20_Text"><text:span text:style-name="T3">struct sigaction act;</text:span></text:span></text:p>
            <text:p text:style-name="P1"><text:span text:style-name="Source_20_Text"><text:span text:style-name="T3">act.sa_handler = something;</text:span></text:span></text:p>
            <text:p text:style-name="P1"><text:span text:style-name="Source_20_Text"><text:span text:style-name="T3">act.sa_flags = SA_NOCLDWAIT;</text:span></text:span></text:p>
            <text:p text:style-name="P1"><text:span text:style-name="Source_20_Text"><text:span text:style-name="T3">sigaction (SIGCHLD, &amp;act, NULL);</text:span></text:span></text:p>
          </table:table-cell>
        </table:table-row>
      </table:table>
      <text:p text:style-name="P6"><text:span text:style-name="T3">Kết quả là nó sẽ không nhận thông tin về các tiến trình con đã chết, và các tiến trình con sẽ không bị biến thành thây ma. Lưu ý rằng hành động mặc định của </text:span><text:span text:style-name="Source_20_Text"><text:span text:style-name="T3">SIGCHLD</text:span></text:span><text:span text:style-name="T3"> là bỏ qua tín hiệu này; tuy nhiên, việc gọi </text:span><text:span text:style-name="Source_20_Text"><text:span text:style-name="T3">signal(SIGCHLD, SIG_IGN)</text:span></text:span><text:span text:style-name="T3"> vẫn có tác dụng riêng biệt, đó là ngăn chặn việc tạo ra tiến trình thây ma. Trong tình huống này, nếu cha thực hiện lệnh </text:span><text:soft-page-break/><text:span text:style-name="Source_20_Text"><text:span text:style-name="T3">wait()</text:span></text:span><text:span text:style-name="T3">, lệnh này sẽ chỉ trả về khi tất cả các tiến trình con đã thoát, và sau đó trả về -1 với mã lỗi </text:span><text:span text:style-name="Source_20_Text"><text:span text:style-name="T3">errno</text:span></text:span><text:span text:style-name="T3"> là </text:span><text:span text:style-name="Source_20_Text"><text:span text:style-name="T3">ECHILD</text:span></text:span><text:span text:style-name="T3">.</text:span></text:p>
      <text:p text:style-name="P6"><text:span text:style-name="T3">Tùy thuộc vào dòng Unix mà tín hiệu </text:span><text:span text:style-name="Source_20_Text"><text:span text:style-name="T3">SIGCHLD</text:span></text:span><text:span text:style-name="T3"> có được gửi hay không khi cờ </text:span><text:span text:style-name="Source_20_Text"><text:span text:style-name="T3">SA_NOCLDWAIT</text:span></text:span><text:span text:style-name="T3"> được thiết lập. Sau khi thiết lập </text:span><text:span text:style-name="Source_20_Text"><text:span text:style-name="T3">act.sa_flags = SA_NOCLDSTOP</text:span></text:span><text:span text:style-name="T3">, sẽ không có tín hiệu </text:span><text:span text:style-name="Source_20_Text"><text:span text:style-name="T3">SIGCHLD</text:span></text:span><text:span text:style-name="T3"> nào được gửi khi tiến trình con dừng hoặc tiến trình con đang dừng được tiếp tục. Nếu tiến trình cha thoát trước tiến trình con, thì tiến trình con sẽ được "nhận nuôi" bởi tiến trình </text:span><text:span text:style-name="Source_20_Text"><text:span text:style-name="T3">init</text:span></text:span><text:span text:style-name="T3"> (PID 1), và tiến trình này sẽ chịu trách nhiệm thu dọn trạng thái của nó.</text:span></text:p>
      <text:h text:style-name="P5" text:outline-level="3">5.6 Quay trở lại từ trình xử lý tín hiệu</text:h>
      <text:p text:style-name="P9">Khi chương trình bị ngắt bởi một tín hiệu, trạng thái của nó (bao gồm tất cả các thanh ghi số nguyên và số dấu phẩy động) đã được lưu lại để phục hồi ngay trước khi tiếp tục thực thi tại điểm bị ngắt.</text:p>
      <text:p text:style-name="P6"><text:span text:style-name="T3">Điều này có nghĩa là việc quay trở lại từ trình xử lý tín hiệu phức tạp hơn so với việc trả về từ một hàm thông thường — trạng thái đã lưu phải được phục hồi. Để thực hiện việc này, nhân hệ điều hành sắp xếp sao cho việc thoát khỏi trình xử lý tín hiệu sẽ gây ra một bước nhảy đến một đoạn mã ngắn (đôi khi được gọi là </text:span><text:span text:style-name="T4">trampoline</text:span><text:span text:style-name="T3">) thực thi lời gọi hệ thống </text:span><text:span text:style-name="Source_20_Text"><text:span text:style-name="T3">sigreturn()</text:span></text:span><text:span text:style-name="T3">. Lời gọi hệ thống này sẽ xử lý mọi việc còn lại.</text:span></text:p>
      <text:p text:style-name="P9">Trước đây, đoạn mã trampoline này nằm trên ngăn xếp (<text:span text:style-name="T1">stack</text:span>), nhưng ngày nay (kể từ phiên bản 2.5.69), chúng ta có trampoline trong trang <text:span text:style-name="T1">vsyscall</text:span>, nhờ đó nó không còn là rào cản nếu người dùng muốn sử dụng ngăn xếp không có quyền thực thi (<text:span text:style-name="T1">non-executable stack</text:span>).</text:p>
      <text:h text:style-name="P5" text:outline-level="3">5.7 ptrace</text:h>
      <text:p text:style-name="P6"><text:span text:style-name="T3">Để phục vụ mục đích gỡ lỗi, lời gọi hệ thống </text:span><text:span text:style-name="Source_20_Text"><text:span text:style-name="T3">ptrace()</text:span></text:span><text:span text:style-name="T3"> đã được giới thiệu. Một tiến trình có thể theo dấu (</text:span><text:span text:style-name="T4">trace</text:span><text:span text:style-name="T3">) một tiến trình khác, kiểm tra hoặc thay đổi bộ nhớ của nó, xem các lời gọi hệ thống được thực hiện hoặc thay đổi chúng, v.v.</text:span></text:p>
      <text:p text:style-name="P9">Cơ chế thực hiện là tiến trình theo dấu (<text:span text:style-name="T1">tracing process</text:span>) sẽ được thông báo mỗi khi tiến trình bị theo dấu (<text:span text:style-name="T1">traced process</text:span>) thực hiện một hành động quan trọng. Việc nhận tín hiệu luôn là một sự kiện quan trọng. Nếu tiến trình theo dấu chỉ định, việc thực thi các lời gọi hệ thống hoặc thực thi bất kỳ chỉ thị nào cũng trở thành sự kiện quan trọng.</text:p>
      <text:p text:style-name="P6"><text:span text:style-name="T3">Nhờ đó, chúng ta có các trình gỡ lỗi tương tác như </text:span><text:span text:style-name="Source_20_Text"><text:span text:style-name="T3">gdb</text:span></text:span><text:span text:style-name="T3">, và các công cụ theo dấu như </text:span><text:span text:style-name="Source_20_Text"><text:span text:style-name="T3">strace</text:span></text:span><text:span text:style-name="T3">. Lời gọi này cũng rất hữu ích cho các mục đích can thiệp hệ thống (</text:span><text:span text:style-name="T4">hacking</text:span><text:span text:style-name="T3">). Người ta có thể tạo một chương trình tự đính kèm (</text:span><text:span text:style-name="T4">attach</text:span><text:span text:style-name="T3">) vào một tiện ích nào đó và thay đổi ngầm hoạt động của nó, trong khi tệp nhị phân của tiện ích đó vẫn không thay đổi, vẫn giữ nguyên dấu thời gian và mã băm MD5 chính xác.</text:span></text:p>
      <text:list text:style-name="L5">
        <text:list-item>
          <text:p text:style-name="P8"><text:span text:style-name="T4">Bài tập:</text:span><text:span text:style-name="T3"> Viết một chương trình tự đính kèm vào một tiến trình có PID xác định và theo dõi các lệnh gọi </text:span><text:span text:style-name="Source_20_Text"><text:span text:style-name="T3">read()</text:span></text:span><text:span text:style-name="T3"> của nó; bất khi nào xuất hiện một chuỗi ký tự chỉ định, hãy đổi nó thành một chuỗi khác. Phải đảm bảo tính "vô hình".</text:span></text:p>
        </text:list-item>
        <text:list-item>
          <text:p text:style-name="P14"><text:span text:style-name="T1">Bài tập:</text:span> Viết một chương trình tự đính kèm vào một trình vỏ (<text:span text:style-name="T1">shell</text:span>) và theo dõi các lệnh được đưa vào. Bất khi nào một tệp nhị phân chỉ định được thực thi, hãy thực thi một tệp nhị phân khác thay thế. Phải đảm bảo tính "vô hình".</text:p>
        </text:list-item>
      </text:list>
      <text:p text:style-name="P6"><text:span text:style-name="T3">Dưới đây là một ví dụ đơn giản về cách sử dụng </text:span><text:span text:style-name="Source_20_Text"><text:span text:style-name="T3">ptrace</text:span></text:span><text:span text:style-name="T3">. Chương trình này sẽ liệt kê các lời gọi hệ thống được thực hiện bởi một tiến trình đang tồn tại (gọi </text:span><text:span text:style-name="Source_20_Text"><text:span text:style-name="T3">./ptrace -p N</text:span></text:span><text:span text:style-name="T3">) hoặc một tiến </text:span><text:soft-page-break/><text:span text:style-name="T3">trình con (gọi </text:span><text:span text:style-name="Source_20_Text"><text:span text:style-name="T3">./ptrace lệnh_cần_chạy</text:span></text:span><text:span text:style-name="T3">, ví dụ: </text:span><text:span text:style-name="Source_20_Text"><text:span text:style-name="T3">./ptrace /bin/ls -l</text:span></text:span><text:span text:style-name="T3">). Phiên bản dưới đây chỉ hoạt động trên kiến trúc i386 và với các nhân hệ điều hành tương đối gần đây.</text:span></text:p>
      <table:table table:name="Table2" table:style-name="Table2">
        <table:table-column table:style-name="Table2.A"/>
        <table:table-row>
          <table:table-cell table:style-name="Table2.A1" office:value-type="string">
            <text:p text:style-name="P2">/*</text:p>
            <text:p text:style-name="P2"><text:s/>* ptrace a child - baby demo example - i386 only</text:p>
            <text:p text:style-name="P2"><text:s/>*</text:p>
            <text:p text:style-name="P2"><text:s/>* call: "ptrace command args" to trace command</text:p>
            <text:p text:style-name="P2"><text:s/>* <text:s text:c="6"/>"ptrace -p N" to trace process with pid N</text:p>
            <text:p text:style-name="P2"><text:s/>*/</text:p>
            <text:p text:style-name="P2">#include &lt;errno.h&gt;</text:p>
            <text:p text:style-name="P2">#include &lt;stdio.h&gt;</text:p>
            <text:p text:style-name="P2">#include &lt;string.h&gt;</text:p>
            <text:p text:style-name="P2">#include &lt;stdlib.h&gt;</text:p>
            <text:p text:style-name="P2">#include &lt;unistd.h&gt;</text:p>
            <text:p text:style-name="P2">#include &lt;signal.h&gt;</text:p>
            <text:p text:style-name="P2">#include &lt;sys/wait.h&gt;</text:p>
            <text:p text:style-name="P2">#include &lt;sys/types.h&gt;</text:p>
            <text:p text:style-name="P2">#include &lt;sys/ptrace.h&gt;</text:p>
            <text:p text:style-name="P2">#include &lt;linux/user.h&gt; <text:s text:c="5"/>/* user_regs_struct */</text:p>
            <text:p text:style-name="P2">#include &lt;linux/unistd.h&gt; <text:s text:c="3"/>/* __NR_exit */</text:p>
            <text:p text:style-name="P2">#include &lt;linux/ptrace.h&gt; <text:s text:c="3"/>/* EAX */</text:p>
            <text:p text:style-name="P2"/>
            <text:p text:style-name="P2">#define SIZE(a) (sizeof(a)/sizeof((a)[0]))</text:p>
            <text:p text:style-name="P2"/>
            <text:p text:style-name="P2">/*</text:p>
            <text:p text:style-name="P2"><text:s/>* syscall names for i386 under 2.5.51, taken from &lt;asm/unistd.h&gt;</text:p>
            <text:p text:style-name="P2"><text:s/>*/</text:p>
            <text:p text:style-name="P2">char *(syscall_names[256]) = {</text:p>
            <text:p text:style-name="P2">"exit", "fork", "read", "write", "open", "close", "waitpid", "creat",</text:p>
            <text:p text:style-name="P2">"link", "unlink", "execve", "chdir", "time", "mknod", "chmod",</text:p>
            <text:p text:style-name="P2">"lchown", "break", "oldstat", "lseek", "getpid", "mount", "umount",</text:p>
            <text:p text:style-name="P2">"setuid", "getuid", "stime", "ptrace", "alarm", "oldfstat", "pause",</text:p>
            <text:p text:style-name="P2"><text:soft-page-break/>"utime", "stty", "gtty", "access", "nice", "ftime", "sync", "kill",</text:p>
            <text:p text:style-name="P2">"rename", "mkdir", "rmdir", "dup", "pipe", "times", "prof", "brk",</text:p>
            <text:p text:style-name="P2">"setgid", "getgid", "signal", "geteuid", "getegid", "acct", "umount2",</text:p>
            <text:p text:style-name="P2">"lock", "ioctl", "fcntl", "mpx", "setpgid", "ulimit", "oldolduname",</text:p>
            <text:p text:style-name="P2">"umask", "chroot", "ustat", "dup2", "getppid", "getpgrp", "setsid",</text:p>
            <text:p text:style-name="P2">"sigaction", "sgetmask", "ssetmask", "setreuid", "setregid",</text:p>
            <text:p text:style-name="P2">"sigsuspend", "sigpending", "sethostname", "setrlimit", "getrlimit",</text:p>
            <text:p text:style-name="P2">"getrusage", "gettimeofday", "settimeofday", "getgroups", "setgroups",</text:p>
            <text:p text:style-name="P2">"select", "symlink", "oldlstat", "readlink", "uselib", "swapon",</text:p>
            <text:p text:style-name="P2">"reboot", "readdir", "mmap", "munmap", "truncate", "ftruncate",</text:p>
            <text:p text:style-name="P2">"fchmod", "fchown", "getpriority", "setpriority", "profil", "statfs",</text:p>
            <text:p text:style-name="P2">"fstatfs", "ioperm", "socketcall", "syslog", "setitimer", "getitimer",</text:p>
            <text:p text:style-name="P2">"stat", "lstat", "fstat", "olduname", "iopl", "vhangup", "idle",</text:p>
            <text:p text:style-name="P2">"vm86old", "wait4", "swapoff", "sysinfo", "ipc", "fsync", "sigreturn",</text:p>
            <text:p text:style-name="P2">"clone", "setdomainname", "uname", "modify_ldt", "adjtimex",</text:p>
            <text:p text:style-name="P2">"mprotect", "sigprocmask", "create_module", "init_module",</text:p>
            <text:p text:style-name="P2">"delete_module", "get_kernel_syms", "quotactl", "getpgid", "fchdir",</text:p>
            <text:p text:style-name="P2">"bdflush", "sysfs", "personality", "afs_syscall", "setfsuid",</text:p>
            <text:p text:style-name="P2">"setfsgid", "_llseek", "getdents", "_newselect", "flock", "msync",</text:p>
            <text:p text:style-name="P2">"readv", "writev", "getsid", "fdatasync", "_sysctl", "mlock",</text:p>
            <text:p text:style-name="P2">"munlock", "mlockall", "munlockall", "sched_setparam",</text:p>
            <text:p text:style-name="P2">"sched_getparam", "sched_setscheduler", "sched_getscheduler",</text:p>
            <text:p text:style-name="P2">"sched_yield", "sched_get_priority_max", "sched_get_priority_min",</text:p>
            <text:p text:style-name="P2">"sched_rr_get_interval", "nanosleep", "mremap", "setresuid",</text:p>
            <text:p text:style-name="P2">"getresuid", "vm86", "query_module", "poll", "nfsservctl",</text:p>
            <text:p text:style-name="P2">"setresgid", "getresgid", "prctl","rt_sigreturn","rt_sigaction",</text:p>
            <text:p text:style-name="P2">"rt_sigprocmask", "rt_sigpending", "rt_sigtimedwait",</text:p>
            <text:p text:style-name="P2">"rt_sigqueueinfo", "rt_sigsuspend", "pread", "pwrite", "chown",</text:p>
            <text:p text:style-name="P2">"getcwd", "capget", "capset", "sigaltstack", "sendfile", "getpmsg",</text:p>
            <text:p text:style-name="P2">"putpmsg", "vfork", "ugetrlimit", "mmap2", "truncate64",</text:p>
            <text:p text:style-name="P2"><text:soft-page-break/>"ftruncate64", "stat64", "lstat64", "fstat64", "lchown32", "getuid32",</text:p>
            <text:p text:style-name="P2">"getgid32", "geteuid32", "getegid32", "setreuid32", "setregid32",</text:p>
            <text:p text:style-name="P2">"getgroups32", "setgroups32", "fchown32", "setresuid32",</text:p>
            <text:p text:style-name="P2">"getresuid32", "setresgid32", "getresgid32", "chown32", "setuid32",</text:p>
            <text:p text:style-name="P2">"setgid32", "setfsuid32", "setfsgid32", "pivot_root", "mincore",</text:p>
            <text:p text:style-name="P2">"madvise", "getdents64", "fcntl64", 0, "security", "gettid",</text:p>
            <text:p text:style-name="P2">"readahead", "setxattr", "lsetxattr", "fsetxattr", "getxattr",</text:p>
            <text:p text:style-name="P2">"lgetxattr", "fgetxattr", "listxattr", "llistxattr", "flistxattr",</text:p>
            <text:p text:style-name="P2">"removexattr", "lremovexattr", "fremovexattr", "tkill", "sendfile64",</text:p>
            <text:p text:style-name="P2">"futex", "sched_setaffinity", "sched_getaffinity",</text:p>
            <text:p text:style-name="P2">};</text:p>
            <text:p text:style-name="P2"/>
            <text:p text:style-name="P2">void my_ptrace_void(int request, pid_t pid, void *addr, void *data) {</text:p>
            <text:p text:style-name="P2"><text:s text:c="8"/>int i = ptrace(request, pid, addr, data);</text:p>
            <text:p text:style-name="P2"><text:s text:c="8"/>if (i) {</text:p>
            <text:p text:style-name="P2"><text:s text:c="16"/>perror("ptrace");</text:p>
            <text:p text:style-name="P2"><text:s text:c="16"/>exit(1);</text:p>
            <text:p text:style-name="P2"><text:s text:c="8"/>}</text:p>
            <text:p text:style-name="P2">}</text:p>
            <text:p text:style-name="P2"/>
            <text:p text:style-name="P2">/*</text:p>
            <text:p text:style-name="P2"><text:s/>* Since -1 may be valid data, we have to check errno.</text:p>
            <text:p text:style-name="P2"><text:s/>*/</text:p>
            <text:p text:style-name="P2">int my_ptrace_read(int request, pid_t pid, void *addr, void *data) {</text:p>
            <text:p text:style-name="P2"><text:s text:c="8"/>int i;</text:p>
            <text:p text:style-name="P2"/>
            <text:p text:style-name="P2"><text:s text:c="8"/>errno = 0;</text:p>
            <text:p text:style-name="P2"><text:s text:c="8"/>i = ptrace(request, pid, addr, data);</text:p>
            <text:p text:style-name="P2"><text:s text:c="8"/>if (i == -1 &amp;&amp; errno) {</text:p>
            <text:p text:style-name="P2"><text:s text:c="16"/>perror("ptrace");</text:p>
            <text:p text:style-name="P2"><text:soft-page-break/><text:s text:c="16"/>exit(1);</text:p>
            <text:p text:style-name="P2"><text:s text:c="8"/>}</text:p>
            <text:p text:style-name="P2"><text:s text:c="8"/>return i;</text:p>
            <text:p text:style-name="P2">}</text:p>
            <text:p text:style-name="P2"/>
            <text:p text:style-name="P2">pid_t pid; <text:s text:c="5"/>/* the traced program */</text:p>
            <text:p text:style-name="P2"/>
            <text:p text:style-name="P2">/* detach from traced program when interrupted */</text:p>
            <text:p text:style-name="P2">void interrupt(int dummy) {</text:p>
            <text:p text:style-name="P2"><text:s text:c="8"/>ptrace(PTRACE_DETACH, pid, 0, 0);</text:p>
            <text:p text:style-name="P2"><text:s text:c="8"/>exit(-1);</text:p>
            <text:p text:style-name="P2">}</text:p>
            <text:p text:style-name="P2"/>
            <text:p text:style-name="P2">int got_sig = 0;</text:p>
            <text:p text:style-name="P2"/>
            <text:p text:style-name="P2">void sigusr1(int dummy) {</text:p>
            <text:p text:style-name="P2"><text:s text:c="8"/>got_sig = 1;</text:p>
            <text:p text:style-name="P2">}</text:p>
            <text:p text:style-name="P2"/>
            <text:p text:style-name="P2">void my_kill(pid_t pid, int sig) {</text:p>
            <text:p text:style-name="P2"><text:s text:c="8"/>int i = kill(pid, sig);</text:p>
            <text:p text:style-name="P2"><text:s text:c="8"/>if (i) {</text:p>
            <text:p text:style-name="P2"><text:s text:c="16"/>perror("kill");</text:p>
            <text:p text:style-name="P2"><text:s text:c="16"/>exit(1);</text:p>
            <text:p text:style-name="P2"><text:s text:c="8"/>}</text:p>
            <text:p text:style-name="P2">}</text:p>
            <text:p text:style-name="P2"/>
            <text:p text:style-name="P2">/*</text:p>
            <text:p text:style-name="P2"><text:s/>* A child stopped at a syscall has status as if it received SIGTRAP.</text:p>
            <text:p text:style-name="P2"><text:s/>* In order to distinguish between SIGTRAP and syscall, some kernel</text:p>
            <text:p text:style-name="P2"><text:soft-page-break/><text:s/>* versions have the PTRACE_O_TRACESYSGOOD option, that sets an extra</text:p>
            <text:p text:style-name="P2"><text:s/>* bit 0x80 in the syscall case.</text:p>
            <text:p text:style-name="P2"><text:s/>*/</text:p>
            <text:p text:style-name="P2">#define SIGSYSTRAP <text:s text:c="5"/>(SIGTRAP | sysgood_bit)</text:p>
            <text:p text:style-name="P2"/>
            <text:p text:style-name="P2">int sysgood_bit = 0;</text:p>
            <text:p text:style-name="P2"/>
            <text:p text:style-name="P2">void set_sysgood(pid_t p) {</text:p>
            <text:p text:style-name="P2">#ifdef PTRACE_O_TRACESYSGOOD</text:p>
            <text:p text:style-name="P2"><text:s text:c="8"/>int i = ptrace(PTRACE_SETOPTIONS, p, 0, (void*) PTRACE_O_TRACESYSGOOD);</text:p>
            <text:p text:style-name="P2"><text:s text:c="8"/>if (i == 0)</text:p>
            <text:p text:style-name="P2"><text:s text:c="16"/>sysgood_bit = 0x80;</text:p>
            <text:p text:style-name="P2"><text:s text:c="8"/>else</text:p>
            <text:p text:style-name="P2"><text:s text:c="16"/>perror("PTRACE_O_TRACESYSGOOD");</text:p>
            <text:p text:style-name="P2">#endif</text:p>
            <text:p text:style-name="P2">}</text:p>
            <text:p text:style-name="P2"/>
            <text:p text:style-name="P2">#define EXPECT_EXITED <text:s text:c="2"/>1</text:p>
            <text:p text:style-name="P2">#define EXPECT_SIGNALED 2</text:p>
            <text:p text:style-name="P2">#define EXPECT_STOPPED <text:s/>4</text:p>
            <text:p text:style-name="P2"/>
            <text:p text:style-name="P2">void my_wait(pid_t p, int report, int stopsig) {</text:p>
            <text:p text:style-name="P2"><text:s text:c="8"/>int status;</text:p>
            <text:p text:style-name="P2"><text:s text:c="8"/>pid_t pw = wait(&amp;status);</text:p>
            <text:p text:style-name="P2"/>
            <text:p text:style-name="P2"><text:s text:c="8"/>if (pw == (pid_t) -1) {</text:p>
            <text:p text:style-name="P2"><text:s text:c="16"/>perror("wait");</text:p>
            <text:p text:style-name="P2"><text:s text:c="16"/>exit(1);</text:p>
            <text:p text:style-name="P2"><text:s text:c="8"/>}</text:p>
            <text:p text:style-name="P2"/>
            <text:p text:style-name="P2"><text:soft-page-break/><text:s text:c="8"/>/*</text:p>
            <text:p text:style-name="P2"><text:s text:c="9"/>* Report only unexpected things.</text:p>
            <text:p text:style-name="P2"><text:s text:c="9"/>*</text:p>
            <text:p text:style-name="P2"><text:s text:c="9"/>* The conditions WIFEXITED, WIFSIGNALED, WIFSTOPPED</text:p>
            <text:p text:style-name="P2"><text:s text:c="9"/>* are mutually exclusive:</text:p>
            <text:p text:style-name="P2"><text:s text:c="9"/>* WIFEXITED: <text:s/>(status &amp; 0x7f) == 0, WEXITSTATUS: top 8 bits</text:p>
            <text:p text:style-name="P2"><text:s text:c="9"/>* and now WCOREDUMP: <text:s/>(status &amp; 0x80) != 0</text:p>
            <text:p text:style-name="P2"><text:s text:c="9"/>* WIFSTOPPED: (status &amp; 0xff) == 0x7f, WSTOPSIG: top 8 bits</text:p>
            <text:p text:style-name="P2"><text:s text:c="9"/>* WIFSIGNALED: all other cases, (status &amp; 0x7f) is signal.</text:p>
            <text:p text:style-name="P2"><text:s text:c="9"/>*/</text:p>
            <text:p text:style-name="P2"><text:s text:c="8"/>if (WIFEXITED(status) &amp;&amp; !(report &amp; EXPECT_EXITED))</text:p>
            <text:p text:style-name="P2"><text:s text:c="16"/>fprintf(stderr, "child exited%s with status %d\n",</text:p>
            <text:p text:style-name="P2"><text:s text:c="24"/>WCOREDUMP(status) ? " and dumped core" : "",</text:p>
            <text:p text:style-name="P2"><text:s text:c="24"/>WEXITSTATUS(status));</text:p>
            <text:p text:style-name="P2"><text:s text:c="8"/>if (WIFSTOPPED(status) &amp;&amp; !(report &amp; EXPECT_STOPPED))</text:p>
            <text:p text:style-name="P2"><text:s text:c="16"/>fprintf(stderr, "child stopped by signal %d\n",</text:p>
            <text:p text:style-name="P2"><text:s text:c="24"/>WSTOPSIG(status));</text:p>
            <text:p text:style-name="P2"><text:s text:c="8"/>if (WIFSIGNALED(status) &amp;&amp; !(report &amp; EXPECT_SIGNALED))</text:p>
            <text:p text:style-name="P2"><text:s text:c="16"/>fprintf(stderr, "child signalled by signal %d\n",</text:p>
            <text:p text:style-name="P2"><text:s text:c="24"/>WTERMSIG(status));</text:p>
            <text:p text:style-name="P2"/>
            <text:p text:style-name="P2"><text:s text:c="8"/>if (WIFSTOPPED(status) &amp;&amp; WSTOPSIG(status) != stopsig) {</text:p>
            <text:p text:style-name="P2"><text:s text:c="16"/>/* a different signal - send it on and wait */</text:p>
            <text:p text:style-name="P2"><text:s text:c="16"/>fprintf(stderr, "Waited for signal %d, got %d\n",</text:p>
            <text:p text:style-name="P2"><text:s text:c="24"/>stopsig, WSTOPSIG(status));</text:p>
            <text:p text:style-name="P2"><text:s text:c="16"/>if ((WSTOPSIG(status) &amp; 0x7f) == (stopsig &amp; 0x7f))</text:p>
            <text:p text:style-name="P2"><text:s text:c="24"/>return;</text:p>
            <text:p text:style-name="P2"><text:s text:c="16"/>my_ptrace_void(PTRACE_SYSCALL, p, 0, (void*) WSTOPSIG(status));</text:p>
            <text:p text:style-name="P2"><text:s text:c="16"/>return my_wait(p, report, stopsig);</text:p>
            <text:p text:style-name="P2"><text:s text:c="8"/>}</text:p>
            <text:p text:style-name="P2"><text:soft-page-break/></text:p>
            <text:p text:style-name="P2"><text:s text:c="8"/>if ((report &amp; EXPECT_STOPPED) &amp;&amp; !WIFSTOPPED(status)) {</text:p>
            <text:p text:style-name="P2"><text:s text:c="16"/>fprintf(stderr, "Not stopped?\n");</text:p>
            <text:p text:style-name="P2"><text:s text:c="16"/>exit(1);</text:p>
            <text:p text:style-name="P2"><text:s text:c="8"/>}</text:p>
            <text:p text:style-name="P2">}</text:p>
            <text:p text:style-name="P2"/>
            <text:p text:style-name="P2">/*</text:p>
            <text:p text:style-name="P2"><text:s/>* print value when changed</text:p>
            <text:p text:style-name="P2"><text:s/>*/</text:p>
            <text:p text:style-name="P2">void outlonghex(unsigned long old, unsigned long new) {</text:p>
            <text:p text:style-name="P2"><text:s text:c="8"/>if (old == new)</text:p>
            <text:p text:style-name="P2"><text:s text:c="16"/>fprintf(stderr, " <text:s text:c="8"/>");</text:p>
            <text:p text:style-name="P2"><text:s text:c="8"/>else</text:p>
            <text:p text:style-name="P2"><text:s text:c="16"/>fprintf(stderr, " %08lx", new);</text:p>
            <text:p text:style-name="P2">}</text:p>
            <text:p text:style-name="P2"/>
            <text:p text:style-name="P2">int</text:p>
            <text:p text:style-name="P2">main(int argc, char **argv, char **envp){</text:p>
            <text:p text:style-name="P2"><text:s text:c="8"/>pid_t p0, p;</text:p>
            <text:p text:style-name="P2"/>
            <text:p text:style-name="P2"><text:s text:c="8"/>if (argc &lt;= 1) {</text:p>
            <text:p text:style-name="P2"><text:s text:c="16"/>fprintf(stderr, "Usage: %s command args -or- %s -p pid\n",</text:p>
            <text:p text:style-name="P2"><text:s text:c="24"/>argv[0], argv[0]);</text:p>
            <text:p text:style-name="P2"><text:s text:c="16"/>exit(1);</text:p>
            <text:p text:style-name="P2"><text:s text:c="8"/>}</text:p>
            <text:p text:style-name="P2"/>
            <text:p text:style-name="P2"><text:s text:c="8"/>if (argc &gt;= 3 &amp;&amp; !strcmp(argv[1], "-p")) {</text:p>
            <text:p text:style-name="P2"><text:s text:c="16"/>pid = p = atoi(argv[2]);</text:p>
            <text:p text:style-name="P2"/>
            <text:p text:style-name="P2"><text:soft-page-break/><text:s text:c="16"/>signal(SIGINT, interrupt);</text:p>
            <text:p text:style-name="P2"/>
            <text:p text:style-name="P2"><text:s text:c="16"/>/*</text:p>
            <text:p text:style-name="P2"><text:s text:c="17"/>* attach to specified process</text:p>
            <text:p text:style-name="P2"><text:s text:c="17"/>*/</text:p>
            <text:p text:style-name="P2"><text:s text:c="16"/>my_ptrace_void(PTRACE_ATTACH, p, 0, 0);</text:p>
            <text:p text:style-name="P2"><text:s text:c="16"/>my_wait(p, EXPECT_STOPPED, SIGSTOP);</text:p>
            <text:p text:style-name="P2"><text:s text:c="16"/>set_sysgood(p);</text:p>
            <text:p text:style-name="P2"/>
            <text:p text:style-name="P2"><text:s text:c="16"/>/*</text:p>
            <text:p text:style-name="P2"><text:s text:c="17"/>* we stopped the program in the middle of what it was doing</text:p>
            <text:p text:style-name="P2"><text:s text:c="17"/>* continue it, and make it stop at the next syscall</text:p>
            <text:p text:style-name="P2"><text:s text:c="17"/>*/</text:p>
            <text:p text:style-name="P2"><text:s text:c="16"/>my_ptrace_void(PTRACE_SYSCALL, p, 0, 0);</text:p>
            <text:p text:style-name="P2"><text:s text:c="8"/>} else {</text:p>
            <text:p text:style-name="P2"><text:s text:c="16"/>void (*oldsig)(int);</text:p>
            <text:p text:style-name="P2"/>
            <text:p text:style-name="P2"><text:s text:c="16"/>/*</text:p>
            <text:p text:style-name="P2"><text:s text:c="17"/>* fork off a child that executes the specified command</text:p>
            <text:p text:style-name="P2"><text:s text:c="17"/>*/</text:p>
            <text:p text:style-name="P2"/>
            <text:p text:style-name="P2"><text:s text:c="16"/>/*</text:p>
            <text:p text:style-name="P2"><text:s text:c="17"/>* The parent process will send a signal to the child</text:p>
            <text:p text:style-name="P2"><text:s text:c="17"/>* and do a wait() to wait until the child stops.</text:p>
            <text:p text:style-name="P2"><text:s text:c="17"/>* If the signal arrives before the child has said</text:p>
            <text:p text:style-name="P2"><text:s text:c="17"/>* PTRACE_TRACEME, then maybe the child is killed, or</text:p>
            <text:p text:style-name="P2"><text:s text:c="17"/>* maybe the signal is ignored and we wait forever, or</text:p>
            <text:p text:style-name="P2"><text:s text:c="17"/>* maybe the child is stopped but we are not tracing.</text:p>
            <text:p text:style-name="P2"><text:s text:c="17"/>* So, let us arrange for the child to signal the parent</text:p>
            <text:p text:style-name="P2"><text:s text:c="17"/>* when it has done the PTRACE_TRACEME.</text:p>
            <text:p text:style-name="P2"><text:soft-page-break/><text:s text:c="17"/>*/</text:p>
            <text:p text:style-name="P2"/>
            <text:p text:style-name="P2"><text:s text:c="16"/>/* prepare both parent and child for signal */</text:p>
            <text:p text:style-name="P2"><text:s text:c="16"/>oldsig = signal(SIGUSR1, sigusr1);</text:p>
            <text:p text:style-name="P2"><text:s text:c="16"/>if (oldsig == SIG_ERR) {</text:p>
            <text:p text:style-name="P2"><text:s text:c="24"/>perror("signal");</text:p>
            <text:p text:style-name="P2"><text:s text:c="24"/>exit(1);</text:p>
            <text:p text:style-name="P2"><text:s text:c="16"/>}</text:p>
            <text:p text:style-name="P2"/>
            <text:p text:style-name="P2"><text:s text:c="16"/>/* child needs parent pid */</text:p>
            <text:p text:style-name="P2"><text:s text:c="16"/>p0 = getpid();</text:p>
            <text:p text:style-name="P2"/>
            <text:p text:style-name="P2"><text:s text:c="16"/>p = fork();</text:p>
            <text:p text:style-name="P2"><text:s text:c="16"/>if (p == (pid_t) -1) {</text:p>
            <text:p text:style-name="P2"><text:s text:c="24"/>perror("fork");</text:p>
            <text:p text:style-name="P2"><text:s text:c="24"/>exit(1);</text:p>
            <text:p text:style-name="P2"><text:s text:c="16"/>}</text:p>
            <text:p text:style-name="P2"/>
            <text:p text:style-name="P2"><text:s text:c="16"/>if (p == 0) { <text:s text:c="2"/>/* child */</text:p>
            <text:p text:style-name="P2"><text:s text:c="24"/>my_ptrace_void(PTRACE_TRACEME, 0, 0, 0);</text:p>
            <text:p text:style-name="P2"/>
            <text:p text:style-name="P2"><text:s text:c="24"/>/* tell parent that we are ready */</text:p>
            <text:p text:style-name="P2"><text:s text:c="24"/>my_kill(p0, SIGUSR1);</text:p>
            <text:p text:style-name="P2"/>
            <text:p text:style-name="P2"><text:s text:c="24"/>/* wait for parent to start tracing us */</text:p>
            <text:p text:style-name="P2"><text:s text:c="24"/>while (!got_sig) ;</text:p>
            <text:p text:style-name="P2"/>
            <text:p text:style-name="P2"><text:s text:c="24"/>/*</text:p>
            <text:p text:style-name="P2"><text:s text:c="25"/>* the first thing the parent will see is</text:p>
            <text:p text:style-name="P2"><text:s text:c="25"/>* <text:s/>119: sigreturn - the return from the signal handler</text:p>
            <text:p text:style-name="P2"><text:soft-page-break/><text:s text:c="25"/>*/</text:p>
            <text:p text:style-name="P2"/>
            <text:p text:style-name="P2"><text:s text:c="24"/>/* exec the given process */</text:p>
            <text:p text:style-name="P2"><text:s text:c="24"/>argv[argc] = 0;</text:p>
            <text:p text:style-name="P2"><text:s text:c="24"/>execve(argv[1], argv+1, envp);</text:p>
            <text:p text:style-name="P2"><text:s text:c="24"/>_exit(1);</text:p>
            <text:p text:style-name="P2"><text:s text:c="16"/>}</text:p>
            <text:p text:style-name="P2"/>
            <text:p text:style-name="P2"><text:s text:c="16"/>/* wait for child to get ready */</text:p>
            <text:p text:style-name="P2"><text:s text:c="16"/>while (!got_sig) ;</text:p>
            <text:p text:style-name="P2"/>
            <text:p text:style-name="P2"><text:s text:c="16"/>/*</text:p>
            <text:p text:style-name="P2"><text:s text:c="17"/>* tell child that we got the signal</text:p>
            <text:p text:style-name="P2"><text:s text:c="17"/>* this kill() will stop the child</text:p>
            <text:p text:style-name="P2"><text:s text:c="17"/>*/</text:p>
            <text:p text:style-name="P2"><text:s text:c="16"/>my_kill(p, SIGUSR1);</text:p>
            <text:p text:style-name="P2"><text:s text:c="16"/>my_wait(p, EXPECT_STOPPED, SIGUSR1);</text:p>
            <text:p text:style-name="P2"><text:s text:c="16"/>set_sysgood(p);</text:p>
            <text:p text:style-name="P2"/>
            <text:p text:style-name="P2"><text:s text:c="16"/>my_ptrace_void(PTRACE_SYSCALL, p, 0, (void *) SIGUSR1);</text:p>
            <text:p text:style-name="P2"><text:s text:c="8"/>}</text:p>
            <text:p text:style-name="P2"/>
            <text:p text:style-name="P2"><text:s text:c="8"/>/*</text:p>
            <text:p text:style-name="P2"><text:s text:c="9"/>* trace the victim's syscalls</text:p>
            <text:p text:style-name="P2"><text:s text:c="9"/>*/</text:p>
            <text:p text:style-name="P2"><text:s text:c="8"/>while (1) {</text:p>
            <text:p text:style-name="P2"><text:s text:c="16"/>int syscall;</text:p>
            <text:p text:style-name="P2"><text:s text:c="16"/>struct user_regs_struct u_in, u_out;</text:p>
            <text:p text:style-name="P2"/>
            <text:p text:style-name="P2"><text:s text:c="16"/>my_wait(p, EXPECT_STOPPED, SIGSYSTRAP);</text:p>
            <text:p text:style-name="P2"><text:soft-page-break/></text:p>
            <text:p text:style-name="P2"><text:s text:c="16"/>my_ptrace_void(PTRACE_GETREGS, p, 0, &amp;u_in);</text:p>
            <text:p text:style-name="P2"><text:s text:c="16"/>syscall = u_in.orig_eax;</text:p>
            <text:p text:style-name="P2"/>
            <text:p text:style-name="P2"><text:s text:c="16"/>fprintf(stderr, "SYSCALL %3d:", syscall);</text:p>
            <text:p text:style-name="P2"><text:s text:c="16"/>outlonghex(-38, u_in.eax); <text:s text:c="5"/>/* seems constant */</text:p>
            <text:p text:style-name="P2"><text:s text:c="16"/>fprintf(stderr, " %08lx %08lx %08lx",</text:p>
            <text:p text:style-name="P2"><text:s text:c="24"/>u_in.ebx, u_in.ecx, u_in.edx);</text:p>
            <text:p text:style-name="P2"><text:s text:c="16"/>if (syscall-1 &gt;= 0 &amp;&amp; syscall-1 &lt; SIZE(syscall_names) &amp;&amp;</text:p>
            <text:p text:style-name="P2"><text:s text:c="20"/>syscall_names[syscall-1])</text:p>
            <text:p text:style-name="P2"><text:s text:c="24"/>fprintf(stderr, " /%s", syscall_names[syscall-1]);</text:p>
            <text:p text:style-name="P2"><text:s text:c="16"/>fprintf(stderr, "\n");</text:p>
            <text:p text:style-name="P2"/>
            <text:p text:style-name="P2"><text:s text:c="16"/>if (syscall == __NR_execve) {</text:p>
            <text:p text:style-name="P2"><text:s text:c="24"/>long *regs = 0; /* relative address 0 in user area */</text:p>
            <text:p text:style-name="P2"><text:s text:c="24"/>long eax;</text:p>
            <text:p text:style-name="P2"/>
            <text:p text:style-name="P2"><text:s text:c="24"/>my_ptrace_void(PTRACE_SYSCALL, p, 0, 0);</text:p>
            <text:p text:style-name="P2"><text:s text:c="24"/>my_wait(p, EXPECT_STOPPED, SIGSYSTRAP);</text:p>
            <text:p text:style-name="P2"/>
            <text:p text:style-name="P2"><text:s text:c="24"/>/*</text:p>
            <text:p text:style-name="P2"><text:s text:c="25"/>* For a successful execve we get one more trap</text:p>
            <text:p text:style-name="P2"><text:s text:c="25"/>* But was this call successful?</text:p>
            <text:p text:style-name="P2"><text:s text:c="25"/>*/</text:p>
            <text:p text:style-name="P2"><text:s text:c="24"/>eax = my_ptrace_read(PTRACE_PEEKUSER, p, &amp;regs[EAX],0);</text:p>
            <text:p text:style-name="P2"><text:s text:c="24"/>if (eax == 0) {</text:p>
            <text:p text:style-name="P2"><text:s text:c="32"/>fprintf(stderr, "SYSCALL execve, once more\n");</text:p>
            <text:p text:style-name="P2"/>
            <text:p text:style-name="P2"><text:s text:c="32"/>/* the syscall return - no "good" bit */</text:p>
            <text:p text:style-name="P2"><text:s text:c="32"/>my_ptrace_void(PTRACE_SYSCALL, p, 0, 0);</text:p>
            <text:p text:style-name="P2"><text:soft-page-break/><text:s text:c="32"/>my_wait(p, EXPECT_STOPPED, SIGTRAP);</text:p>
            <text:p text:style-name="P2"><text:s text:c="24"/>}</text:p>
            <text:p text:style-name="P2"><text:s text:c="16"/>} else {</text:p>
            <text:p text:style-name="P2"><text:s text:c="24"/>/* wait for syscall return */</text:p>
            <text:p text:style-name="P2"><text:s text:c="24"/>my_ptrace_void(PTRACE_SYSCALL, p, 0, 0);</text:p>
            <text:p text:style-name="P2"><text:s text:c="24"/>if (syscall == __NR_exit ||</text:p>
            <text:p text:style-name="P2"><text:s text:c="28"/>syscall == __NR_exit_group) {</text:p>
            <text:p text:style-name="P2"><text:s text:c="32"/>my_wait(p, EXPECT_EXITED, 0);</text:p>
            <text:p text:style-name="P2"><text:s text:c="32"/>exit(0);</text:p>
            <text:p text:style-name="P2"><text:s text:c="24"/>}</text:p>
            <text:p text:style-name="P2"><text:s text:c="24"/>my_wait(p, EXPECT_STOPPED, SIGSYSTRAP);</text:p>
            <text:p text:style-name="P2"><text:s text:c="16"/>}</text:p>
            <text:p text:style-name="P2"/>
            <text:p text:style-name="P2"><text:s text:c="16"/>my_ptrace_void(PTRACE_GETREGS, p, 0, &amp;u_out);</text:p>
            <text:p text:style-name="P2"><text:s text:c="16"/>fprintf(stderr, " RETURN %3d:", syscall);</text:p>
            <text:p text:style-name="P2"><text:s text:c="16"/>outlonghex(u_in.eax, u_out.eax);</text:p>
            <text:p text:style-name="P2"><text:s text:c="16"/>outlonghex(u_in.ebx, u_out.ebx);</text:p>
            <text:p text:style-name="P2"><text:s text:c="16"/>outlonghex(u_in.ecx, u_out.ecx);</text:p>
            <text:p text:style-name="P2"><text:s text:c="16"/>outlonghex(u_in.edx, u_out.edx);</text:p>
            <text:p text:style-name="P2"><text:s text:c="16"/>fprintf(stderr, "\n");</text:p>
            <text:p text:style-name="P2"/>
            <text:p text:style-name="P2"><text:s text:c="16"/>my_ptrace_void(PTRACE_SYSCALL, p, 0, 0);</text:p>
            <text:p text:style-name="P2"><text:s text:c="8"/>}</text:p>
            <text:p text:style-name="P2"><text:s text:c="8"/>return 0;</text:p>
            <text:p text:style-name="P2">}</text:p>
          </table:table-cell>
        </table:table-row>
      </table:table>
      <text:p text:style-name="P6"><text:span text:style-name="T3">Một tiến trình bị theo dấu (</text:span><text:span text:style-name="T4">tracee</text:span><text:span text:style-name="T3">) sẽ nhận được tín hiệu </text:span><text:span text:style-name="Source_20_Text"><text:span text:style-name="T3">SIGTRAP</text:span></text:span><text:span text:style-name="T3"> (và tạm dừng) ngay sau khi nó thực hiện thành công lời gọi hệ thống </text:span><text:span text:style-name="Source_20_Text"><text:span text:style-name="T3">execve</text:span></text:span><text:span text:style-name="T3">. Điều này có nghĩa là chúng ta sẽ thấy </text:span><text:span text:style-name="Source_20_Text"><text:span text:style-name="T3">execve</text:span></text:span><text:span text:style-name="T3"> xuất hiện ba lần (lúc bắt đầu gọi - </text:span><text:span text:style-name="T4">exit</text:span><text:span text:style-name="T3"> khỏi chương trình cũ, lúc trả về - </text:span><text:span text:style-name="T4">return</text:span><text:span text:style-name="T3">, và khi nhận </text:span><text:span text:style-name="T4">SIGTRAP</text:span><text:span text:style-name="T3">). Tín hiệu này có thể được sử dụng để đồng bộ hóa, thay thế cho cấu trúc </text:span><text:span text:style-name="Source_20_Text"><text:span text:style-name="T3">SIGUSR1</text:span></text:span><text:span text:style-name="T3"> phức tạp đã đề cập trước đó.</text:span></text:p>
      <text:h text:style-name="P5" text:outline-level="3"><text:soft-page-break/>5.8 Tín hiệu "cha chết" (parent death signal) trong Linux</text:h>
      <text:p text:style-name="P6"><text:span text:style-name="T3">Đối với mỗi tiến trình, có một biến gọi là </text:span><text:span text:style-name="Source_20_Text"><text:span text:style-name="T3">pdeath_signal</text:span></text:span><text:span text:style-name="T3">, biến này được khởi tạo bằng 0 sau khi thực hiện </text:span><text:span text:style-name="Source_20_Text"><text:span text:style-name="T3">fork()</text:span></text:span><text:span text:style-name="T3"> hoặc </text:span><text:span text:style-name="Source_20_Text"><text:span text:style-name="T3">clone()</text:span></text:span><text:span text:style-name="T3">. Nó xác định tín hiệu mà tiến trình con sẽ nhận được khi tiến trình cha của nó kết thúc (chết).</text:span></text:p>
      <text:p text:style-name="P6"><text:span text:style-name="T3">Biến này có thể được thiết lập bằng lệnh: </text:span><text:span text:style-name="Source_20_Text"><text:span text:style-name="T3">prctl(PR_SET_PDEATHSIG, sig);</text:span></text:span></text:p>
      <text:p text:style-name="P6"><text:span text:style-name="T3">Và có thể đọc giá trị ra bằng lệnh: </text:span><text:span text:style-name="Source_20_Text"><text:span text:style-name="T3">prctl(PR_GET_PDEATHSIG, &amp;sig);</text:span></text:span></text:p>
      <text:p text:style-name="P9">Cấu trúc này thường được sử dụng trong các thư viện luồng (<text:span text:style-name="T1">thread libraries</text:span>): khi luồng quản lý (<text:span text:style-name="T1">manager thread</text:span>) kết thúc, tất cả các luồng do nó quản lý nên dọn dẹp và thoát. Ví dụ:</text:p>
      <table:table table:name="Table3" table:style-name="Table3">
        <table:table-column table:style-name="Table3.A"/>
        <table:table-row>
          <table:table-cell table:style-name="Table3.A1" office:value-type="string">
            <text:p text:style-name="P3">prctl(PR_SET_PDEATHSIG, SIGHUP); <text:s text:c="7"/>/* Thiết lập tín hiệu khi cha chết là SIGHUP */</text:p>
            <text:p text:style-name="P3">if (getppid() == 1) <text:s text:c="20"/>/* Kiểm tra xem cha đã chết trước đó chưa? */</text:p>
            <text:p text:style-name="P3"><text:s text:c="8"/>kill(getpid(), SIGHUP); <text:s text:c="8"/>/* Nếu cha đã chết (con bị nhận nuôi bởi init), tự gửi SIGHUP */</text:p>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7T08:56:16.309592087</meta:creation-date>
    <dc:date>2026-04-08T06:42:45.561614705</dc:date>
    <meta:editing-duration>PT11M53S</meta:editing-duration>
    <meta:editing-cycles>10</meta:editing-cycles>
    <meta:generator>LibreOffice/24.2.7.2$Linux_X86_64 LibreOffice_project/420$Build-2</meta:generator>
    <meta:document-statistic meta:table-count="3" meta:image-count="0" meta:object-count="0" meta:page-count="17" meta:paragraph-count="379" meta:word-count="3754" meta:character-count="24528" meta:non-whitespace-character-count="17863"/>
  </office:meta>
</office:document-meta>
</file>