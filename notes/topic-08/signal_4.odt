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1" style:family="table-row">
      <style:table-row-properties style:min-row-height="2.2264in"/>
    </style:style>
    <style:style style:name="Table4.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P1" style:family="paragraph" style:parent-style-name="Standard">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 style:family="paragraph" style:parent-style-name="Heading_20_3">
      <style:paragraph-properties fo:margin-top="0.0598in" fo:margin-bottom="0.0598in" style:contextual-spacing="false" fo:line-height="100%" fo:text-align="start" style:justify-single-word="false"/>
    </style:style>
    <style:style style:name="P3" style:family="paragraph" style:parent-style-name="Heading_20_3">
      <style:paragraph-properties fo:margin-top="0.0598in" fo:margin-bottom="0.0598in" style:contextual-spacing="false" fo:line-height="100%" fo:text-align="justify" style:justify-single-word="false"/>
      <style:text-properties style:font-name="Liberation Serif" fo:font-size="13pt" officeooo:paragraph-rsid="000dff96" style:font-size-asian="13pt" style:font-size-complex="13pt"/>
    </style:style>
    <style:style style:name="P4" style:family="paragraph" style:parent-style-name="Heading_20_3">
      <style:paragraph-properties fo:margin-left="0in" fo:margin-right="0in" fo:margin-top="0.0598in" fo:margin-bottom="0.0598in" style:contextual-spacing="false" fo:line-height="100%" fo:text-align="justify" style:justify-single-word="false" fo:text-indent="0in" style:auto-text-indent="false"/>
      <style:text-properties style:font-name="Liberation Serif" fo:font-size="13pt" style:font-size-asian="13pt" style:font-size-complex="13pt"/>
    </style:style>
    <style:style style:name="P5" style:family="paragraph" style:parent-style-name="Heading_20_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6" style:family="paragraph" style:parent-style-name="Heading_20_2">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7" style:family="paragraph" style:parent-style-name="Heading_20_2">
      <style:paragraph-properties fo:margin-top="0.0598in" fo:margin-bottom="0.0598in" style:contextual-spacing="false" fo:line-height="100%" fo:text-align="justify" style:justify-single-word="false"/>
    </style:style>
    <style:style style:name="P8" style:family="paragraph" style:parent-style-name="Table_20_Contents">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9" style:family="paragraph" style:parent-style-name="Quotations">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0" style:family="paragraph" style:parent-style-name="Quotations">
      <style:paragraph-properties fo:margin-top="0.0598in" fo:margin-bottom="0.0598in" style:contextual-spacing="false" fo:line-height="100%" fo:text-align="justify" style:justify-single-word="false"/>
    </style:style>
    <style:style style:name="P11" style:family="paragraph" style:parent-style-name="Preformatted_20_Text">
      <style:paragraph-properties fo:margin-top="0.0598in" fo:margin-bottom="0.0598in" style:contextual-spacing="false" fo:line-height="100%" fo:text-align="justify" style:justify-single-word="false"/>
      <style:text-properties officeooo:paragraph-rsid="000ea2ed"/>
    </style:style>
    <style:style style:name="P12" style:family="paragraph" style:parent-style-name="Preformatted_20_Text">
      <style:paragraph-properties fo:margin-top="0.0598in" fo:margin-bottom="0.0598in" style:contextual-spacing="false" fo:line-height="100%" fo:text-align="justify" style:justify-single-word="false"/>
      <style:text-properties officeooo:paragraph-rsid="00101225"/>
    </style:style>
    <style:style style:name="P13" style:family="paragraph" style:parent-style-name="Preformatted_20_Text">
      <style:paragraph-properties fo:margin-top="0.0598in" fo:margin-bottom="0.0598in" style:contextual-spacing="false" fo:line-height="100%" fo:text-align="justify" style:justify-single-word="false"/>
      <style:text-properties officeooo:paragraph-rsid="00107771"/>
    </style:style>
    <style:style style:name="P14" style:family="paragraph" style:parent-style-name="Preformatted_20_Text">
      <style:paragraph-properties fo:margin-top="0.0598in" fo:margin-bottom="0.0598in" style:contextual-spacing="false" fo:line-height="100%" fo:text-align="justify" style:justify-single-word="false"/>
      <style:text-properties officeooo:paragraph-rsid="0011612a"/>
    </style:style>
    <style:style style:name="P15" style:family="paragraph" style:parent-style-name="Preformatted_20_Text">
      <style:paragraph-properties fo:margin-top="0.0598in" fo:margin-bottom="0.0598in" style:contextual-spacing="false" fo:line-height="100%" fo:text-align="justify" style:justify-single-word="false"/>
      <style:text-properties officeooo:paragraph-rsid="00115e8a"/>
    </style:style>
    <style:style style:name="P16" style:family="paragraph" style:parent-style-name="Preformatted_20_Text">
      <style:paragraph-properties fo:margin-top="0.0598in" fo:margin-bottom="0.0598in" style:contextual-spacing="false" fo:line-height="100%" fo:text-align="justify" style:justify-single-word="false"/>
    </style:style>
    <style:style style:name="P17" style:family="paragraph" style:parent-style-name="Preformatted_20_Text">
      <style:paragraph-properties fo:margin-top="0.0598in" fo:margin-bottom="0.0598in" style:contextual-spacing="false" fo:line-height="100%" fo:text-align="justify" style:justify-single-word="false"/>
      <style:text-properties style:font-name="Liberation Serif" fo:font-size="13pt" officeooo:paragraph-rsid="000ea2ed" style:font-size-asian="13pt" style:font-size-complex="13pt"/>
    </style:style>
    <style:style style:name="P18" style:family="paragraph" style:parent-style-name="Preformatted_20_Text">
      <style:paragraph-properties fo:margin-top="0.0598in" fo:margin-bottom="0.0598in" style:contextual-spacing="false" fo:line-height="100%" fo:text-align="justify" style:justify-single-word="false"/>
      <style:text-properties style:font-name="Liberation Serif" fo:font-size="13pt" officeooo:paragraph-rsid="00107771" style:font-size-asian="13pt" style:font-size-complex="13pt"/>
    </style:style>
    <style:style style:name="P19" style:family="paragraph" style:parent-style-name="Preformatted_20_Text">
      <style:paragraph-properties fo:margin-top="0.0598in" fo:margin-bottom="0.0598in" style:contextual-spacing="false" fo:line-height="100%" fo:text-align="justify" style:justify-single-word="false"/>
      <style:text-properties style:font-name="Liberation Serif" fo:font-size="13pt" officeooo:paragraph-rsid="0011612a" style:font-size-asian="13pt" style:font-size-complex="13pt"/>
    </style:style>
    <style:style style:name="P20" style:family="paragraph" style:parent-style-name="Preformatted_20_Text">
      <style:paragraph-properties fo:margin-top="0.0598in" fo:margin-bottom="0.0598in" style:contextual-spacing="false" fo:line-height="100%" fo:text-align="justify" style:justify-single-word="false"/>
      <style:text-properties style:font-name="Liberation Serif" fo:font-size="13pt" officeooo:paragraph-rsid="00115e8a" style:font-size-asian="13pt" style:font-size-complex="13pt"/>
    </style:style>
    <style:style style:name="P21" style:family="paragraph" style:parent-style-name="Text_20_body" style:list-style-name="L1">
      <style:paragraph-properties fo:margin-top="0.0598in" fo:margin-bottom="0.0598in" style:contextual-spacing="false" fo:line-height="100%" fo:text-align="justify" style:justify-single-word="false"/>
    </style:style>
    <style:style style:name="P22" style:family="paragraph" style:parent-style-name="Text_20_body" style:list-style-name="L2">
      <style:paragraph-properties fo:margin-top="0.0598in" fo:margin-bottom="0.0598in" style:contextual-spacing="false" fo:line-height="100%" fo:text-align="justify" style:justify-single-word="false"/>
    </style:style>
    <style:style style:name="P23" style:family="paragraph" style:parent-style-name="Text_20_body" style:list-style-name="L4">
      <style:paragraph-properties fo:margin-top="0.0598in" fo:margin-bottom="0.0598in" style:contextual-spacing="false" fo:line-height="100%" fo:text-align="justify" style:justify-single-word="false"/>
    </style:style>
    <style:style style:name="P24" style:family="paragraph" style:parent-style-name="Text_20_body" style:list-style-name="L5">
      <style:paragraph-properties fo:margin-top="0.0598in" fo:margin-bottom="0.0598in" style:contextual-spacing="false" fo:line-height="100%" fo:text-align="justify" style:justify-single-word="false"/>
    </style:style>
    <style:style style:name="P25" style:family="paragraph" style:parent-style-name="Text_20_body" style:list-style-name="L6">
      <style:paragraph-properties fo:margin-top="0.0598in" fo:margin-bottom="0.0598in" style:contextual-spacing="false" fo:line-height="100%" fo:text-align="justify" style:justify-single-word="false"/>
    </style:style>
    <style:style style:name="P26" style:family="paragraph" style:parent-style-name="Text_20_body" style:list-style-name="L7">
      <style:paragraph-properties fo:margin-top="0.0598in" fo:margin-bottom="0.0598in" style:contextual-spacing="false" fo:line-height="100%" fo:text-align="justify" style:justify-single-word="false"/>
    </style:style>
    <style:style style:name="P27" style:family="paragraph" style:parent-style-name="Text_20_body" style:list-style-name="L8">
      <style:paragraph-properties fo:margin-top="0.0598in" fo:margin-bottom="0.0598in" style:contextual-spacing="false" fo:line-height="100%" fo:text-align="justify" style:justify-single-word="false"/>
    </style:style>
    <style:style style:name="P28" style:family="paragraph" style:parent-style-name="Text_20_body">
      <style:paragraph-properties fo:margin-left="0in" fo:margin-right="0in" fo:margin-top="0.0598in" fo:margin-bottom="0.0598in" style:contextual-spacing="false" fo:line-height="100%" fo:text-align="justify" style:justify-single-word="false" fo:text-indent="0in" style:auto-text-indent="false"/>
    </style:style>
    <style:style style:name="P29" style:family="paragraph" style:parent-style-name="Text_20_body">
      <style:paragraph-properties fo:margin-top="0.0598in" fo:margin-bottom="0.0598in" style:contextual-spacing="false" fo:line-height="100%" fo:text-align="justify" style:justify-single-word="false"/>
    </style:style>
    <style:style style:name="P30" style:family="paragraph" style:parent-style-name="Text_20_body" style:list-style-name="L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1" style:family="paragraph" style:parent-style-name="Text_20_body" style:list-style-name="L5">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2" style:family="paragraph" style:parent-style-name="Text_20_body" style:list-style-name="L7">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3" style:family="paragraph" style:parent-style-name="Text_20_body" style:list-style-name="L8">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4" style:family="paragraph" style:parent-style-name="Text_20_body">
      <style:paragraph-properties fo:margin-top="0.0598in" fo:margin-bottom="0.0598in" style:contextual-spacing="false" fo:line-height="100%" fo:text-align="justify" style:justify-single-word="false"/>
      <style:text-properties style:font-name="Liberation Serif" fo:font-size="13pt" officeooo:paragraph-rsid="000dff96" style:font-size-asian="13pt" style:font-size-complex="13pt"/>
    </style:style>
    <style:style style:name="P35" style:family="paragraph" style:parent-style-name="Text_20_body">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36"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bold" style:font-size-asian="13pt" style:font-size-complex="13pt"/>
    </style:style>
    <style:style style:name="T1" style:family="text">
      <style:text-properties fo:font-weight="bold"/>
    </style:style>
    <style:style style:name="T2" style:family="text">
      <style:text-properties style:font-name="Liberation Serif" fo:font-size="13pt" style:font-size-asian="13pt" style:font-size-complex="13pt"/>
    </style:style>
    <style:style style:name="T3" style:family="text">
      <style:text-properties style:font-name="Liberation Serif" fo:font-size="13pt" fo:font-weight="bold" style:font-size-asian="13pt" style:font-size-complex="13pt"/>
    </style:style>
    <style:style style:name="T4" style:family="text">
      <style:text-properties style:font-name="Liberation Serif" fo:font-size="13pt" fo:font-style="italic" style:font-size-asian="13pt" style:font-size-complex="13pt"/>
    </style:style>
    <style:style style:name="T5" style:family="text">
      <style:text-properties style:font-name="Liberation Serif" fo:font-size="13pt" fo:font-weight="normal" style:font-size-asian="13pt" style:font-weight-asian="normal" style:font-size-complex="13pt" style:font-weight-complex="normal"/>
    </style:style>
    <style:style style:name="T6" style:family="text">
      <style:text-properties style:font-name="Liberation Serif" fo:font-size="13pt" fo:font-weight="normal" officeooo:rsid="000be0ae" style:font-size-asian="13pt" style:font-weight-asian="normal" style:font-size-complex="13pt" style:font-weight-complex="normal"/>
    </style:style>
    <style:style style:name="T7"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T5">Nguồn tham khảo: </text:span><text:a xlink:type="simple" xlink:href="https://www.cs.kent.edu/~ruttan/sysprog/lectures/signals.html?utm_source=chatgpt.com" text:style-name="Internet_20_link" text:visited-style-name="Visited_20_Internet_20_Link"><text:span text:style-name="T6">https://www.cs.kent.edu/~ruttan/sysprog/lectures/signals.html?utm_source=chatgpt.com</text:span></text:a><text:span text:style-name="T2"><text:line-break/>Tín hiệu (Signals) là gì?</text:span></text:h>
      <text:p text:style-name="P29"><text:span text:style-name="T2">Nói một cách ngắn gọn, </text:span><text:span text:style-name="T3">Signals</text:span><text:span text:style-name="T2"> là các thông báo được gửi đến một tiến trình (process) nhằm xác nhận các sự kiện "quan trọng" vừa xảy ra. Về bản chất, chúng sẽ ngắt quãng bất kỳ tác vụ nào mà tiến trình đang thực hiện tại thời điểm đó và buộc tiến trình phải xử lý chúng ngay lập tức. Mỗi tín hiệu được đại diện bởi một số nguyên (1, 2,...) cũng như một tên định danh (symbolic name) thường được định nghĩa trong tệp </text:span><text:span text:style-name="Source_20_Text"><text:span text:style-name="T2">/usr/include/signal.h</text:span></text:span><text:span text:style-name="T2"> hoặc các tệp liên quan (ví dụ: </text:span><text:span text:style-name="Source_20_Text"><text:span text:style-name="T2">HUP</text:span></text:span><text:span text:style-name="T2">, </text:span><text:span text:style-name="Source_20_Text"><text:span text:style-name="T2">INT</text:span></text:span><text:span text:style-name="T2">,... Bạn có thể sử dụng lệnh </text:span><text:span text:style-name="Source_20_Text"><text:span text:style-name="T2">kill -l</text:span></text:span><text:span text:style-name="T2"> để xem danh sách các tín hiệu mà hệ thống hỗ trợ).</text:span></text:p>
      <text:p text:style-name="P35">Mỗi tín hiệu có thể đi kèm với một <text:span text:style-name="T1">trình xử lý tín hiệu (signal handler)</text:span>. Đây là một hàm được gọi khi tiến trình nhận được tín hiệu tương ứng. Hàm này được thực thi ở "chế độ bất đồng bộ" (asynchronous mode), nghĩa là không có bất kỳ dòng mã nào trong chương trình trực tiếp gọi hàm này. Thay vào đó, khi tín hiệu được gửi tới, hệ điều hành sẽ tạm dừng việc thực thi của tiến trình và "ép" nó phải gọi hàm xử lý tín hiệu. Sau khi hàm xử lý kết thúc, tiến trình sẽ tiếp tục thực hiện tại đúng vị trí mà nó đã tạm dừng trước đó, như thể chưa từng có sự gián đoạn nào xảy ra.</text:p>
      <text:p text:style-name="P35"><text:span text:style-name="T1">Lưu ý cho các chuyên gia phần cứng:</text:span> Nếu bạn đã quen thuộc với khái niệm <text:span text:style-name="T1">ngắt (interrupts)</text:span>, thì tín hiệu có hành vi rất tương đồng. Sự khác biệt nằm ở chỗ: trong khi ngắt được gửi từ phần cứng tới hệ điều hành, thì tín hiệu được gửi tới tiến trình bởi hệ điều hành hoặc bởi các tiến trình khác. Lưu ý rằng tín hiệu không liên quan đến <text:span text:style-name="T1">ngắt phần mềm (software interrupts)</text:span> – vốn vẫn được gửi bởi phần cứng (cụ thể trong trường hợp này là CPU).</text:p>
      <text:h text:style-name="P6" text:outline-level="2">Gửi tín hiệu đến tiến trình (Sending Signals To Processes)</text:h>
      <text:h text:style-name="P5" text:outline-level="3">Gửi tín hiệu bằng bàn phím</text:h>
      <text:p text:style-name="P35">Cách phổ biến nhất để gửi tín hiệu đến các tiến trình là sử dụng bàn phím. Có một số tổ hợp phím nhất định được hệ thống diễn giải thành các yêu cầu gửi tín hiệu đến tiến trình mà chúng ta đang tương tác:</text:p>
      <text:list text:style-name="L1">
        <text:list-item>
          <text:p text:style-name="P21"><text:span text:style-name="T3">Ctrl-C</text:span><text:span text:style-name="T2">: Nhấn tổ hợp phím này khiến hệ thống gửi một tín hiệu </text:span><text:span text:style-name="T3">INT</text:span><text:span text:style-name="T2"> (</text:span><text:span text:style-name="Source_20_Text"><text:span text:style-name="T2">SIGINT</text:span></text:span><text:span text:style-name="T2">) đến tiến trình đang chạy. Theo mặc định, tín hiệu này sẽ khiến tiến trình chấm dứt ngay lập tức.</text:span></text:p>
        </text:list-item>
        <text:list-item>
          <text:p text:style-name="P21"><text:span text:style-name="T3">Ctrl-Z</text:span><text:span text:style-name="T2">: Nhấn tổ hợp phím này khiến hệ thống gửi một tín hiệu </text:span><text:span text:style-name="T3">TSTP</text:span><text:span text:style-name="T2"> (</text:span><text:span text:style-name="Source_20_Text"><text:span text:style-name="T2">SIGTSTP</text:span></text:span><text:span text:style-name="T2">) đến tiến trình đang chạy. Theo mặc định, tín hiệu này sẽ khiến tiến trình tạm dừng thực thi (</text:span><text:span text:style-name="T3">suspend</text:span><text:span text:style-name="T2">).</text:span></text:p>
        </text:list-item>
        <text:list-item>
          <text:p text:style-name="P21"><text:span text:style-name="T3">Ctrl-\</text:span><text:span text:style-name="T2">: Nhấn tổ hợp phím này khiến hệ thống gửi một tín hiệu </text:span><text:span text:style-name="T3">ABRT</text:span><text:span text:style-name="T2"> (</text:span><text:span text:style-name="Source_20_Text"><text:span text:style-name="T2">SIGABRT</text:span></text:span><text:span text:style-name="T2">) đến tiến trình đang chạy. Theo mặc định, nó cũng khiến tiến trình chấm dứt ngay lập tức. Sự dư thừa này (Ctrl-\ làm điều tương tự như Ctrl-C) mang lại cho chúng ta sự linh hoạt hơn, điều này sẽ được giải thích sau.</text:span></text:p>
        </text:list-item>
      </text:list>
      <text:h text:style-name="P5" text:outline-level="3">Gửi tín hiệu từ dòng lệnh (Command Line)</text:h>
      <text:p text:style-name="P35">Một cách khác để gửi tín hiệu đến tiến trình là sử dụng các lệnh khác nhau, thường là các lệnh nội trú (internal commands) của shell:</text:p>
      <text:list text:style-name="L2">
        <text:list-item>
          <text:p text:style-name="P22"><text:soft-page-break/><text:span text:style-name="T3">kill</text:span><text:span text:style-name="T2">: Lệnh </text:span><text:span text:style-name="Source_20_Text"><text:span text:style-name="T2">kill</text:span></text:span><text:span text:style-name="T2"> nhận hai tham số: tên (hoặc số) hiệu tín hiệu và </text:span><text:span text:style-name="T3">ID tiến trình (PID)</text:span><text:span text:style-name="T2">. Cú pháp thông thường như sau: </text:span><text:span text:style-name="Source_20_Text"><text:span text:style-name="T2">kill -&lt;tín_hiệu&gt; &lt;PID&gt;</text:span></text:span><text:span text:style-name="T2"> Ví dụ: Để gửi tín hiệu </text:span><text:span text:style-name="T3">INT</text:span><text:span text:style-name="T2"> đến tiến trình có PID là 5342, hãy nhập: </text:span><text:span text:style-name="Source_20_Text"><text:span text:style-name="T2">kill -INT 5342</text:span></text:span><text:span text:style-name="T2"> Lệnh này có tác dụng tương tự như việc nhấn </text:span><text:span text:style-name="T3">Ctrl-C</text:span><text:span text:style-name="T2"> trong shell đang chạy tiến trình đó. Nếu không chỉ định tên hoặc số hiệu tín hiệu, mặc định lệnh sẽ gửi tín hiệu </text:span><text:span text:style-name="T3">TERM</text:span><text:span text:style-name="T2"> để chấm dứt tiến trình (đó là lý do lệnh này có tên là "kill").</text:span></text:p>
        </text:list-item>
        <text:list-item>
          <text:p text:style-name="P22"><text:span text:style-name="T3">fg</text:span><text:span text:style-name="T2">: Trên hầu hết các shell, sử dụng lệnh </text:span><text:span text:style-name="Source_20_Text"><text:span text:style-name="T2">fg</text:span></text:span><text:span text:style-name="T2"> sẽ tiếp tục thực thi tiến trình (vốn đã bị tạm dừng bằng Ctrl-Z) bằng cách gửi cho nó một tín hiệu </text:span><text:span text:style-name="T3">CONT</text:span><text:span text:style-name="T2"> (</text:span><text:span text:style-name="Source_20_Text"><text:span text:style-name="T2">SIGCONT</text:span></text:span><text:span text:style-name="T2">).</text:span></text:p>
        </text:list-item>
      </text:list>
      <text:h text:style-name="P5" text:outline-level="3">Các loại tín hiệu</text:h>
      <text:p text:style-name="P29"><text:span text:style-name="T2">Bạn có thể xem chi tiết bằng lệnh: </text:span><text:span text:style-name="Source_20_Text"><text:span text:style-name="T2">man 7 signals</text:span></text:span></text:p>
      <text:h text:style-name="P5" text:outline-level="3">Gửi tín hiệu bằng lời gọi hệ thống (System Calls)</text:h>
      <text:p text:style-name="P29"><text:span text:style-name="T2">Cách thứ ba để gửi tín hiệu là sử dụng lời gọi hệ thống </text:span><text:span text:style-name="Source_20_Text"><text:span text:style-name="T2">kill()</text:span></text:span><text:span text:style-name="T2">. Đây là cách thông thường để gửi tín hiệu từ tiến trình này sang tiến trình khác. Lời gọi hệ thống này cũng được sử dụng bởi lệnh </text:span><text:span text:style-name="Source_20_Text"><text:span text:style-name="T2">kill</text:span></text:span><text:span text:style-name="T2"> hoặc lệnh </text:span><text:span text:style-name="Source_20_Text"><text:span text:style-name="T2">fg</text:span></text:span><text:span text:style-name="T2">.</text:span></text:p>
      <text:p text:style-name="P35">Dưới đây là ví dụ về đoạn mã khiến một tiến trình tự tạm dừng thực thi bằng cách gửi tín hiệu <text:span text:style-name="T1">STOP</text:span> cho chính nó:</text:p>
      <table:table table:name="Table1" table:style-name="Table1">
        <table:table-column table:style-name="Table1.A"/>
        <table:table-row>
          <table:table-cell table:style-name="Table1.A1" office:value-type="string">
            <text:p text:style-name="P8">#include &lt;unistd.h&gt; <text:s text:c="4"/>/* Các hàm Unix tiêu chuẩn, như getpid() <text:s text:c="6"/>*/</text:p>
            <text:p text:style-name="P8">#include &lt;sys/types.h&gt; <text:s/>/* Định nghĩa các kiểu dữ liệu, như pid_t <text:s text:c="5"/>*/</text:p>
            <text:p text:style-name="P8">#include &lt;signal.h&gt; <text:s text:c="4"/>/* Các macro tên tín hiệu và prototype kill() <text:s/>*/</text:p>
            <text:p text:style-name="P8"/>
            <text:p text:style-name="P8">/* Đầu tiên, lấy ID của chính tiến trình này */</text:p>
            <text:p text:style-name="P8">pid_t my_pid = getpid();</text:p>
            <text:p text:style-name="P8"/>
            <text:p text:style-name="P8">/* Sau khi có PID, gửi tín hiệu STOP cho chính mình */</text:p>
            <text:p text:style-name="P8">kill(my_pid, SIGSTOP);</text:p>
          </table:table-cell>
        </table:table-row>
      </table:table>
      <text:p text:style-name="P1">Một ví dụ về tình huống mà đoạn mã này hữu ích là nằm bên trong một <text:span text:style-name="T1">trình xử lý tín hiệu (signal handler)</text:span> dùng để bắt tín hiệu <text:span text:style-name="T1">TSTP</text:span> (Ctrl-Z) nhằm thực hiện một số tác vụ nhất định trước khi thực sự tạm dừng tiến trình. Chúng ta sẽ xem ví dụ về điều này ở phần sau.</text:p>
      <text:h text:style-name="P6" text:outline-level="2">Bắt tín hiệu - Trình xử lý tín hiệu (Catching Signals - Signal Handlers)</text:h>
      <text:h text:style-name="P5" text:outline-level="3">Tín hiệu có thể bắt và không thể bắt (Catchable And Non-Catchable Signals)</text:h>
      <text:p text:style-name="P29"><text:span text:style-name="T2">Hầu hết các tín hiệu đều có thể được tiến trình "bắt" (catch), nhưng có một vài tín hiệu ngoại lệ mà tiến trình không thể can thiệp và chúng sẽ buộc tiến trình phải kết thúc. Ví dụ, tín hiệu </text:span><text:span text:style-name="T3">KILL</text:span><text:span text:style-name="T2"> (thường là </text:span><text:span text:style-name="Source_20_Text"><text:span text:style-name="T2">-9</text:span></text:span><text:span text:style-name="T2"> trên tất cả các hệ điều hành họ Unix) là một loại tín hiệu như vậy. Đây là lý do tại sao bạn thường thấy một tiến trình bị đóng bằng tín hiệu này nếu nó trở nên "mất kiểm soát" (wild).</text:span></text:p>
      <text:p text:style-name="P35"><text:soft-page-break/>Một tiến trình thường xuyên sử dụng tín hiệu này là tiến trình tắt hệ thống (system shutdown). Ban đầu, nó sẽ gửi tín hiệu <text:span text:style-name="T1">TERM</text:span> đến tất cả các tiến trình, đợi một lúc để dành cho chúng một "khoảng thời gian ân hạn" (grace period) để đóng lại một cách sạch sẽ, sau đó nó sẽ tiêu diệt bất kỳ tiến trình nào còn sót lại bằng tín hiệu <text:span text:style-name="T1">KILL</text:span>.</text:p>
      <text:p text:style-name="P35"><text:span text:style-name="T1">STOP</text:span> cũng là một tín hiệu mà tiến trình không thể bắt, nó buộc tiến trình phải tạm dừng thực thi ngay lập tức. Điều này rất hữu ích khi gỡ lỗi (debug) các chương trình có hành vi phụ thuộc vào thời gian (timing).</text:p>
      <text:p text:style-name="P9"><text:span text:style-name="T1">Ví dụ:</text:span> Giả sử tiến trình A cần gửi dữ liệu cho tiến trình B và bạn muốn kiểm tra một số tham số hệ thống sau khi thông điệp đã được gửi nhưng trước khi tiến trình B nhận và xử lý nó. Một cách để thực hiện là gửi tín hiệu <text:span text:style-name="T1">STOP</text:span> đến tiến trình B để tạm dừng nó, sau đó chạy tiến trình A và đợi cho đến khi nó gửi thông điệp quan trọng đó. Lúc này, bạn có thể kiểm tra bất cứ điều gì mình muốn, sau đó sử dụng tín hiệu <text:span text:style-name="T1">CONT</text:span> để tiếp tục việc thực thi của tiến trình B, giúp nó nhận và xử lý thông điệp từ tiến trình A.</text:p>
      <text:p text:style-name="P35">Mặt khác, nhiều tín hiệu khác là có thể bắt được, bao gồm cả các tín hiệu nổi tiếng như <text:span text:style-name="T1">SEGV</text:span> và <text:span text:style-name="T1">BUS</text:span>. Chắc hẳn bạn đã nhiều lần thấy một chương trình thoát kèm theo thông báo như <text:span text:style-name="T7">'Segmentation Violation - Core Dumped'</text:span> hoặc <text:span text:style-name="T7">'Bus Error - core dumped'</text:span>.</text:p>
      <text:list text:style-name="L3">
        <text:list-item>
          <text:p text:style-name="P30">Trong trường hợp đầu tiên, tín hiệu <text:span text:style-name="T1">SEGV</text:span> đã được gửi đến chương trình của bạn do truy cập vào một địa chỉ bộ nhớ không hợp lệ.</text:p>
        </text:list-item>
        <text:list-item>
          <text:p text:style-name="P30">Trong trường hợp thứ hai, tín hiệu <text:span text:style-name="T1">BUS</text:span> được gửi do truy cập địa chỉ bộ nhớ với sự căn chỉnh (alignment) không hợp lệ.</text:p>
        </text:list-item>
      </text:list>
      <text:p text:style-name="P34">Trong cả hai trường hợp, bạn hoàn toàn có thể bắt các tín hiệu này để thực hiện dọn dẹp (cleanup) – như tiêu diệt các tiến trình con, xóa các tệp tạm thời, v.v. Mặc dù khi đó bộ nhớ của tiến trình rất có thể đã bị hỏng (corrupt), nhưng thường chỉ một phần nhỏ bị ảnh hưởng, nên việc dọn dẹp vẫn khả thi.</text:p>
      <text:h text:style-name="P3" text:outline-level="3">Trình xử lý tín hiệu mặc định (Default Signal Handlers)</text:h>
      <text:p text:style-name="P35">Nếu bạn không thiết lập trình xử lý tín hiệu riêng (bạn còn nhớ trình xử lý tín hiệu là gì chứ? Đúng vậy, đó là hàm xử lý tín hiệu), môi trường thực thi (runtime environment) sẽ thiết lập một bộ các trình xử lý mặc định cho chương trình của bạn.</text:p>
      <text:list text:style-name="L4">
        <text:list-item>
          <text:p text:style-name="P23"><text:span text:style-name="T2">Ví dụ: Trình xử lý mặc định cho tín hiệu </text:span><text:span text:style-name="T3">TERM</text:span><text:span text:style-name="T2"> sẽ gọi lời gọi hệ thống </text:span><text:span text:style-name="Source_20_Text"><text:span text:style-name="T2">exit()</text:span></text:span><text:span text:style-name="T2">.</text:span></text:p>
        </text:list-item>
        <text:list-item>
          <text:p text:style-name="P23"><text:span text:style-name="T2">Trình xử lý mặc định cho tín hiệu </text:span><text:span text:style-name="T3">ABRT</text:span><text:span text:style-name="T2"> sẽ gọi lời gọi hệ thống </text:span><text:span text:style-name="Source_20_Text"><text:span text:style-name="T2">abort()</text:span></text:span><text:span text:style-name="T2">, khiến hình ảnh bộ nhớ (memory image) của tiến trình được kết xuất (dump) vào một tệp tên là </text:span><text:span text:style-name="T3">'core'</text:span><text:span text:style-name="T2"> trong thư mục hiện tại của tiến trình, sau đó mới thoát.</text:span></text:p>
        </text:list-item>
      </text:list>
      <text:h text:style-name="P6" text:outline-level="2">Thiết lập trình xử lý tín hiệu (Installing Signal Handlers)</text:h>
      <text:p text:style-name="P29"><text:span text:style-name="T2">Có nhiều cách để thiết lập các trình xử lý tín hiệu. Ở đây chúng ta sẽ sử dụng phương thức cơ bản nhất, và bạn có thể tham khảo thêm trong các trang hướng dẫn (</text:span><text:span text:style-name="Source_20_Text"><text:span text:style-name="T2">man pages</text:span></text:span><text:span text:style-name="T2">) để biết thêm chi tiết.</text:span></text:p>
      <text:h text:style-name="P5" text:outline-level="3"><text:soft-page-break/>Lời gọi hệ thống signal()</text:h>
      <text:p text:style-name="P29"><text:span text:style-name="T2">Lời gọi hệ thống </text:span><text:span text:style-name="Source_20_Text"><text:span text:style-name="T2">signal()</text:span></text:span><text:span text:style-name="T2"> được sử dụng để thiết lập một trình xử lý cho một loại tín hiệu duy nhất. Hàm </text:span><text:span text:style-name="Source_20_Text"><text:span text:style-name="T2">signal()</text:span></text:span><text:span text:style-name="T2"> nhận vào một số hiệu tín hiệu và một </text:span><text:span text:style-name="T3">con trỏ hàm</text:span><text:span text:style-name="T2"> dẫn đến trình xử lý tín hiệu, sau đó gán trình xử lý đó cho tín hiệu được chỉ định.</text:span></text:p>
      <text:p text:style-name="P35">Ví dụ, đoạn mã dưới đây sẽ in ra chuỗi "Don't do that" khi người dùng nhấn <text:span text:style-name="T1">Ctrl-C</text:span>:</text:p>
      <table:table table:name="Table2" table:style-name="Table2">
        <table:table-column table:style-name="Table2.A"/>
        <table:table-row>
          <table:table-cell table:style-name="Table2.A1" office:value-type="string">
            <text:p text:style-name="P11"><text:span text:style-name="Source_20_Text"><text:span text:style-name="T2">#include &lt;stdio.h&gt; <text:s text:c="4"/>/* Các hàm I/O tiêu chuẩn <text:s text:c="24"/>*/</text:span></text:span></text:p>
            <text:p text:style-name="P11"><text:span text:style-name="Source_20_Text"><text:span text:style-name="T2">#include &lt;unistd.h&gt; <text:s text:c="3"/>/* Các hàm Unix tiêu chuẩn, như getpid() <text:s text:c="8"/>*/</text:span></text:span></text:p>
            <text:p text:style-name="P11"><text:span text:style-name="Source_20_Text"><text:span text:style-name="T2">#include &lt;sys/types.h&gt; /* Các định nghĩa kiểu dữ liệu, như pid_t <text:s text:c="8"/>*/</text:span></text:span></text:p>
            <text:p text:style-name="P11"><text:span text:style-name="Source_20_Text"><text:span text:style-name="T2">#include &lt;signal.h&gt; <text:s text:c="3"/>/* Các macro tên tín hiệu và prototype của signal() */</text:span></text:span></text:p>
            <text:p text:style-name="P17"/>
            <text:p text:style-name="P11"><text:span text:style-name="Source_20_Text"><text:span text:style-name="T2">/* Đầu tiên là trình xử lý tín hiệu */</text:span></text:span></text:p>
            <text:p text:style-name="P11"><text:span text:style-name="Source_20_Text"><text:span text:style-name="T2">void catch_int(int sig_num)</text:span></text:span></text:p>
            <text:p text:style-name="P11"><text:span text:style-name="Source_20_Text"><text:span text:style-name="T2">{</text:span></text:span></text:p>
            <text:p text:style-name="P11"><text:span text:style-name="Source_20_Text"><text:span text:style-name="T2"><text:s text:c="4"/>/* Thiết lập lại trình xử lý là catch_int cho lần kế tiếp */</text:span></text:span></text:p>
            <text:p text:style-name="P11"><text:span text:style-name="Source_20_Text"><text:span text:style-name="T2"><text:s text:c="4"/>signal(SIGINT, catch_int);</text:span></text:span></text:p>
            <text:p text:style-name="P11"><text:span text:style-name="Source_20_Text"><text:span text:style-name="T2"><text:s text:c="4"/>/* In thông báo */</text:span></text:span></text:p>
            <text:p text:style-name="P11"><text:span text:style-name="Source_20_Text"><text:span text:style-name="T2"><text:s text:c="4"/>printf("Don't do that");</text:span></text:span></text:p>
            <text:p text:style-name="P11"><text:span text:style-name="Source_20_Text"><text:span text:style-name="T2"><text:s text:c="4"/>fflush(stdout);</text:span></text:span></text:p>
            <text:p text:style-name="P11"><text:span text:style-name="Source_20_Text"><text:span text:style-name="T2">}</text:span></text:span></text:p>
            <text:p text:style-name="P17"/>
            <text:p text:style-name="P11"><text:span text:style-name="Source_20_Text"><text:span text:style-name="T2">/* ... đoạn mã khác ... */</text:span></text:span></text:p>
            <text:p text:style-name="P17"/>
            <text:p text:style-name="P11"><text:span text:style-name="Source_20_Text"><text:span text:style-name="T2">/* Thiết lập trình xử lý tín hiệu INT (Ctrl-C) là 'catch_int' */</text:span></text:span></text:p>
            <text:p text:style-name="P11"><text:span text:style-name="Source_20_Text"><text:span text:style-name="T2">signal(SIGINT, catch_int);</text:span></text:span></text:p>
            <text:p text:style-name="P17"/>
            <text:p text:style-name="P11"><text:span text:style-name="Source_20_Text"><text:span text:style-name="T2">/* Bây giờ, đi vào một vòng lặp vô tận không làm gì cả. */</text:span></text:span></text:p>
            <text:p text:style-name="P11"><text:span text:style-name="Source_20_Text"><text:span text:style-name="T2">for ( ;; )</text:span></text:span></text:p>
            <text:p text:style-name="P11"><text:span text:style-name="Source_20_Text"><text:span text:style-name="T2"><text:s text:c="4"/>pause();</text:span></text:span></text:p>
          </table:table-cell>
        </table:table-row>
      </table:table>
      <text:p text:style-name="P16"><text:span text:style-name="Source_20_Text"><text:span text:style-name="T2"/></text:span></text:p>
      <text:p text:style-name="P29"><text:span text:style-name="T2">Mã nguồn đầy đủ của chương trình này có thể tìm thấy trong tệp </text:span><text:span text:style-name="Source_20_Text"><text:span text:style-name="T2">catch-ctrl-c.c</text:span></text:span><text:span text:style-name="T2">.</text:span></text:p>
      <text:p text:style-name="P36">Lưu ý:</text:p>
      <text:list text:style-name="L5">
        <text:list-item>
          <text:p text:style-name="P24"><text:soft-page-break/><text:span text:style-name="T2">Lời gọi hệ thống </text:span><text:span text:style-name="Source_20_Text"><text:span text:style-name="T2">pause()</text:span></text:span><text:span text:style-name="T2"> khiến tiến trình tạm dừng thực thi cho đến khi nhận được một tín hiệu. Cách này tốt hơn nhiều so với việc sử dụng vòng lặp vô tận gây tiêu tốn CPU (</text:span><text:span text:style-name="T3">busy wait</text:span><text:span text:style-name="T2">).</text:span></text:p>
        </text:list-item>
        <text:list-item>
          <text:p text:style-name="P31">Trong C/C++, tên của một hàm thực chất là một con trỏ dẫn đến hàm đó, vì vậy khi bạn cần cung cấp một con trỏ hàm, bạn chỉ cần ghi tên hàm.</text:p>
        </text:list-item>
        <text:list-item>
          <text:p text:style-name="P24"><text:span text:style-name="T2">Trên một số hệ thống (như HP-UX), khi một trình xử lý tín hiệu được gọi, hệ thống sẽ tự động đặt lại trình xử lý của tín hiệu đó về mặc định. Do đó, chúng ta cần tái thiết lập trình xử lý ngay khi bắt đầu hàm xử lý. Nếu không, ở lần tiếp theo nhận được tín hiệu này, tiến trình sẽ thoát (hành vi mặc định của tín hiệu </text:span><text:span text:style-name="Source_20_Text"><text:span text:style-name="T2">INT</text:span></text:span><text:span text:style-name="T2">). Ngay cả trên các hệ thống không hoạt động theo cách này, việc thêm dòng đó cũng không gây hại gì, vì vậy đây luôn là một thói quen tốt.</text:span></text:p>
        </text:list-item>
      </text:list>
      <text:h text:style-name="P5" text:outline-level="3">Các trình xử lý tín hiệu được định nghĩa sẵn (Pre-defined Signal Handlers)</text:h>
      <text:p text:style-name="P29"><text:span text:style-name="T2">Để thuận tiện, có hai trình xử lý tín hiệu được định nghĩa sẵn mà chúng ta có thể sử dụng thay vì tự viết: </text:span><text:span text:style-name="Source_20_Text"><text:span text:style-name="T2">SIG_IGN</text:span></text:span><text:span text:style-name="T2"> và </text:span><text:span text:style-name="Source_20_Text"><text:span text:style-name="T2">SIG_DFL</text:span></text:span><text:span text:style-name="T2">.</text:span></text:p>
      <text:list text:style-name="L6">
        <text:list-item>
          <text:p text:style-name="P25"><text:span text:style-name="T3">SIG_IGN:</text:span><text:span text:style-name="T2"> Khiến tiến trình bỏ qua (</text:span><text:span text:style-name="T3">ignore</text:span><text:span text:style-name="T2">) tín hiệu đã chỉ định. Ví dụ, để bỏ qua hoàn toàn Ctrl-C (hữu ích cho các chương trình không được phép bị ngắt quãng giữa chừng hoặc trong các </text:span><text:span text:style-name="T3">miền găng - critical sections</text:span><text:span text:style-name="T2">), hãy viết: </text:span><text:span text:style-name="Source_20_Text"><text:span text:style-name="T2">signal(SIGINT, SIG_IGN);</text:span></text:span></text:p>
        </text:list-item>
        <text:list-item>
          <text:p text:style-name="P25"><text:span text:style-name="T3">SIG_DFL:</text:span><text:span text:style-name="T2"> Khiến hệ thống thiết lập trình xử lý mặc định cho tín hiệu đã cho (tương tự như trình xử lý mà hệ thống gán khi tiến trình bắt đầu chạy): </text:span><text:span text:style-name="Source_20_Text"><text:span text:style-name="T2">signal(SIGTSTP, SIG_DFL);</text:span></text:span></text:p>
        </text:list-item>
      </text:list>
      <text:h text:style-name="P7" text:outline-level="2"><text:span text:style-name="Source_20_Text"><text:span text:style-name="T2">Tín hiệu chờ (Pending Signals)</text:span></text:span></text:h>
      <text:p text:style-name="P35">Có một khoảng thời gian ngắn giữa lúc một tín hiệu được tạo ra (generated) và lúc nó được chuyển phát (delivered) — tức là thời điểm hành động ứng với tín hiệu đó được thực hiện. Nếu một tín hiệu khác được tạo ra trong khoảng thời gian này, các vấn đề có thể phát sinh. Ví dụ: bạn muốn thiết lập lại trình xử lý tín hiệu, nhưng trước khi việc thiết lập lại hoàn tất, một tín hiệu khác đã ập đến.</text:p>
      <text:h text:style-name="P6" text:outline-level="2">Tránh tranh chấp tín hiệu - Che chắn tín hiệu (Masking Signals)</text:h>
      <text:p text:style-name="P35">Một trong những vấn đề hóc búa khi xử lý tín hiệu là việc xuất hiện tín hiệu thứ hai trong khi hàm xử lý tín hiệu (signal handler) đầu tiên đang thực thi. Tín hiệu này có thể khác loại hoặc cùng loại với tín hiệu đang được xử lý. Do đó, chúng ta cần thực hiện các biện pháp phòng ngừa bên trong hàm xử lý để tránh tình trạng <text:span text:style-name="T1">tranh chấp (races)</text:span>.</text:p>
      <text:p text:style-name="P35">May mắn thay, hệ thống cung cấp các tính năng cho phép <text:span text:style-name="T1">chặn (block)</text:span> các tín hiệu không cho xử lý. Chúng có thể được dùng trong hai ngữ cảnh: ngữ cảnh toàn cục (ảnh hưởng đến mọi trình xử lý) hoặc ngữ cảnh theo từng loại tín hiệu (chỉ ảnh hưởng đến trình xử lý của một loại tín hiệu cụ thể).</text:p>
      <text:h text:style-name="P5" text:outline-level="3">Che chắn tín hiệu với sigprocmask()</text:h>
      <text:p text:style-name="P29"><text:span text:style-name="T2">Trong chuẩn POSIX hiện đại, hàm được dùng để che chắn tín hiệu trong ngữ cảnh toàn cục là lời gọi hệ thống </text:span><text:span text:style-name="Source_20_Text"><text:span text:style-name="T2">sigprocmask()</text:span></text:span><text:span text:style-name="T2">. nó cho phép chúng ta chỉ định một tập hợp các tín hiệu cần chặn và trả về danh sách các tín hiệu đã bị chặn trước đó. Điều này hữu ích khi chúng ta </text:span><text:soft-page-break/><text:span text:style-name="T2">muốn khôi phục trạng thái mặt nạ (masking state) cũ sau khi kết thúc </text:span><text:span text:style-name="T3">miền găng (critical section)</text:span><text:span text:style-name="T2">.</text:span></text:p>
      <text:p text:style-name="P29"><text:span text:style-name="Source_20_Text"><text:span text:style-name="T2">sigprocmask()</text:span></text:span><text:span text:style-name="T2"> nhận 3 tham số:</text:span></text:p>
      <text:list text:style-name="L7">
        <text:list-item>
          <text:p text:style-name="P26"><text:span text:style-name="T3">int how</text:span><text:span text:style-name="T2">: Xác định cách thay đổi mặt nạ: thêm tín hiệu vào mặt nạ hiện tại (</text:span><text:span text:style-name="Source_20_Text"><text:span text:style-name="T2">SIG_BLOCK</text:span></text:span><text:span text:style-name="T2">), loại bỏ chúng (</text:span><text:span text:style-name="Source_20_Text"><text:span text:style-name="T2">SIG_UNBLOCK</text:span></text:span><text:span text:style-name="T2">), hoặc thay thế hoàn toàn mặt nạ hiện tại bằng mặt nạ mới (</text:span><text:span text:style-name="Source_20_Text"><text:span text:style-name="T2">SIG_SETMASK</text:span></text:span><text:span text:style-name="T2">).</text:span></text:p>
        </text:list-item>
        <text:list-item>
          <text:p text:style-name="P26"><text:span text:style-name="T2">*</text:span><text:span text:style-name="T4">const sigset_t set</text:span><text:span text:style-name="T2">: Tập hợp các tín hiệu cần chặn, thêm vào hoặc loại bỏ (tùy thuộc vào tham số </text:span><text:span text:style-name="Source_20_Text"><text:span text:style-name="T2">how</text:span></text:span><text:span text:style-name="T2">).</text:span></text:p>
        </text:list-item>
        <text:list-item>
          <text:p text:style-name="P32">*<text:span text:style-name="T7">sigset_t oldset</text:span>: Nếu tham số này khác NULL, nó sẽ chứa mặt nạ trước đó. Chúng ta có thể dùng nó để khôi phục trạng thái ban đầu.</text:p>
        </text:list-item>
      </text:list>
      <text:p text:style-name="P10"><text:span text:style-name="T3">Lưu ý:</text:span><text:span text:style-name="T2"> Các hệ thống cũ không hỗ trợ </text:span><text:span text:style-name="Source_20_Text"><text:span text:style-name="T2">sigprocmask()</text:span></text:span><text:span text:style-name="T2">. Thay vào đó, người ta sử dụng </text:span><text:span text:style-name="Source_20_Text"><text:span text:style-name="T2">sigmask()</text:span></text:span><text:span text:style-name="T2"> và </text:span><text:span text:style-name="Source_20_Text"><text:span text:style-name="T2">sigsetmask()</text:span></text:span><text:span text:style-name="T2">.</text:span></text:p>
      <text:h text:style-name="P5" text:outline-level="3">Thao tác với tập hợp tín hiệu (sigset_t)</text:h>
      <text:p text:style-name="P29"><text:span text:style-name="T2">Có nhiều hàm để xử lý các tập hợp </text:span><text:span text:style-name="Source_20_Text"><text:span text:style-name="T2">sigset_t</text:span></text:span><text:span text:style-name="T2">:</text:span></text:p>
      <table:table table:name="Table3" table:style-name="Table3">
        <table:table-column table:style-name="Table3.A"/>
        <table:table-row>
          <table:table-cell table:style-name="Table3.A1" office:value-type="string">
            <text:p text:style-name="P12"><text:span text:style-name="Source_20_Text"><text:span text:style-name="T2">sigset_t mask_set; <text:s text:c="9"/>/* Định nghĩa một tập hợp mặt nạ mới */</text:span></text:span></text:p>
            <text:p text:style-name="P12"><text:span text:style-name="Source_20_Text"><text:span text:style-name="T2">sigemptyset(&amp;mask_set); <text:s text:c="4"/>/* Xóa rỗng tập hợp */</text:span></text:span></text:p>
            <text:p text:style-name="P12"><text:span text:style-name="Source_20_Text"><text:span text:style-name="T2">sigaddset(&amp;mask_set, SIGINT); <text:s/>/* Thêm tín hiệu INT vào tập hợp */</text:span></text:span></text:p>
            <text:p text:style-name="P12"><text:span text:style-name="Source_20_Text"><text:span text:style-name="T2">sigdelset(&amp;mask_set, SIGTSTP); /* Xóa tín hiệu TSTP khỏi tập hợp */</text:span></text:span></text:p>
            <text:p text:style-name="P12"><text:span text:style-name="Source_20_Text"><text:span text:style-name="T2">sigismember(&amp;mask_set, SIGINT);/* Kiểm tra xem INT có nằm trong tập hợp không */</text:span></text:span></text:p>
            <text:p text:style-name="P12"><text:span text:style-name="Source_20_Text"><text:span text:style-name="T2">sigfillset(&amp;mask_set); <text:s text:c="5"/>/* Lấp đầy tập hợp với TẤT CẢ các tín hiệu hệ thống hỗ trợ */</text:span></text:span></text:p>
          </table:table-cell>
        </table:table-row>
      </table:table>
      <text:p text:style-name="P16"><text:span text:style-name="Source_20_Text"><text:span text:style-name="T2"/></text:span></text:p>
      <text:h text:style-name="P5" text:outline-level="3">Ví dụ mã nguồn: Đếm số lần nhấn Ctrl-C</text:h>
      <text:p text:style-name="P35">Dưới đây là ví dụ đếm số lần người dùng nhấn <text:span text:style-name="T1">Ctrl-C</text:span>. Đến lần thứ 5, chương trình sẽ hỏi người dùng có thực sự muốn thoát không. Nếu nhấn <text:span text:style-name="T1">Ctrl-Z</text:span>, số lần nhấn Ctrl-C sẽ được in ra màn hình.</text:p>
      <table:table table:name="Table4" table:style-name="Table4">
        <table:table-column table:style-name="Table4.A"/>
        <table:table-row table:style-name="Table4.1">
          <table:table-cell table:style-name="Table4.A1" office:value-type="string">
            <text:p text:style-name="P13"><text:span text:style-name="Source_20_Text"><text:span text:style-name="T2">int ctrl_c_count = 0;</text:span></text:span></text:p>
            <text:p text:style-name="P13"><text:span text:style-name="Source_20_Text"><text:span text:style-name="T2">#define CTRL_C_THRESHOLD 5</text:span></text:span></text:p>
            <text:p text:style-name="P18"/>
            <text:p text:style-name="P13"><text:span text:style-name="Source_20_Text"><text:span text:style-name="T2">/* Trình xử lý tín hiệu Ctrl-C */</text:span></text:span></text:p>
            <text:p text:style-name="P13"><text:span text:style-name="Source_20_Text"><text:span text:style-name="T2">void catch_int(int sig_num) {</text:span></text:span></text:p>
            <text:p text:style-name="P13"><text:span text:style-name="Source_20_Text"><text:span text:style-name="T2"><text:s text:c="4"/>sigset_t mask_set, old_set;</text:span></text:span></text:p>
            <text:p text:style-name="P18"/>
            <text:p text:style-name="P13"><text:span text:style-name="Source_20_Text"><text:span text:style-name="T2"><text:s text:c="4"/>signal(SIGINT, catch_int); /* Thiết lập lại trình xử lý */</text:span></text:span></text:p>
            <text:p text:style-name="P13"><text:soft-page-break/><text:span text:style-name="Source_20_Text"><text:span text:style-name="T2"><text:s text:c="4"/></text:span></text:span></text:p>
            <text:p text:style-name="P13"><text:span text:style-name="Source_20_Text"><text:span text:style-name="T2"><text:s text:c="4"/>/* Chặn tất cả các tín hiệu khi đang ở trong trình xử lý */</text:span></text:span></text:p>
            <text:p text:style-name="P13"><text:span text:style-name="Source_20_Text"><text:span text:style-name="T2"><text:s text:c="4"/>sigfillset(&amp;mask_set);</text:span></text:span></text:p>
            <text:p text:style-name="P13"><text:span text:style-name="Source_20_Text"><text:span text:style-name="T2"><text:s text:c="4"/>sigprocmask(SIG_SETMASK, &amp;mask_set, &amp;old_set);</text:span></text:span></text:p>
            <text:p text:style-name="P13"><text:span text:style-name="Source_20_Text"><text:span text:style-name="T2"><text:s text:c="4"/></text:span></text:span></text:p>
            <text:p text:style-name="P13"><text:span text:style-name="Source_20_Text"><text:span text:style-name="T2"><text:s text:c="4"/>ctrl_c_count++;</text:span></text:span></text:p>
            <text:p text:style-name="P13"><text:span text:style-name="Source_20_Text"><text:span text:style-name="T2"><text:s text:c="4"/>if (ctrl_c_count &gt;= CTRL_C_THRESHOLD) {</text:span></text:span></text:p>
            <text:p text:style-name="P13"><text:span text:style-name="Source_20_Text"><text:span text:style-name="T2"><text:s text:c="8"/>char answer[30];</text:span></text:span></text:p>
            <text:p text:style-name="P13"><text:span text:style-name="Source_20_Text"><text:span text:style-name="T2"><text:s text:c="8"/>printf("\nRealy Exit? [y/N]: ");</text:span></text:span></text:p>
            <text:p text:style-name="P13"><text:span text:style-name="Source_20_Text"><text:span text:style-name="T2"><text:s text:c="8"/>fflush(stdout);</text:span></text:span></text:p>
            <text:p text:style-name="P13"><text:span text:style-name="Source_20_Text"><text:span text:style-name="T2"><text:s text:c="8"/>gets(answer); /* Lưu ý: Trong thực tế nên dùng fgets để an toàn hơn */</text:span></text:span></text:p>
            <text:p text:style-name="P13"><text:span text:style-name="Source_20_Text"><text:span text:style-name="T2"><text:s text:c="8"/>if (answer[0] == 'y' || answer[0] == 'Y') {</text:span></text:span></text:p>
            <text:p text:style-name="P13"><text:span text:style-name="Source_20_Text"><text:span text:style-name="T2"><text:s text:c="12"/>exit(0);</text:span></text:span></text:p>
            <text:p text:style-name="P13"><text:span text:style-name="Source_20_Text"><text:span text:style-name="T2"><text:s text:c="8"/>} else {</text:span></text:span></text:p>
            <text:p text:style-name="P13"><text:span text:style-name="Source_20_Text"><text:span text:style-name="T2"><text:s text:c="12"/>printf("\nContinuing\n");</text:span></text:span></text:p>
            <text:p text:style-name="P13"><text:span text:style-name="Source_20_Text"><text:span text:style-name="T2"><text:s text:c="12"/>ctrl_c_count = 0;</text:span></text:span></text:p>
            <text:p text:style-name="P13"><text:span text:style-name="Source_20_Text"><text:span text:style-name="T2"><text:s text:c="8"/>}</text:span></text:span></text:p>
            <text:p text:style-name="P13"><text:span text:style-name="Source_20_Text"><text:span text:style-name="T2"><text:s text:c="4"/>}</text:span></text:span></text:p>
            <text:p text:style-name="P13"><text:span text:style-name="Source_20_Text"><text:span text:style-name="T2"><text:s text:c="4"/>/* Khôi phục mặt nạ tín hiệu cũ */</text:span></text:span></text:p>
            <text:p text:style-name="P13"><text:span text:style-name="Source_20_Text"><text:span text:style-name="T2"><text:s text:c="4"/>sigprocmask(SIG_SETMASK, &amp;old_set, NULL);</text:span></text:span></text:p>
            <text:p text:style-name="P13"><text:span text:style-name="Source_20_Text"><text:span text:style-name="T2">}</text:span></text:span></text:p>
            <text:p text:style-name="P18"/>
            <text:p text:style-name="P13"><text:span text:style-name="Source_20_Text"><text:span text:style-name="T2">/* Trình xử lý tín hiệu Ctrl-Z */</text:span></text:span></text:p>
            <text:p text:style-name="P13"><text:span text:style-name="Source_20_Text"><text:span text:style-name="T2">void catch_suspend(int sig_num) {</text:span></text:span></text:p>
            <text:p text:style-name="P13"><text:span text:style-name="Source_20_Text"><text:span text:style-name="T2"><text:s text:c="4"/>sigset_t mask_set, old_set;</text:span></text:span></text:p>
            <text:p text:style-name="P13"><text:span text:style-name="Source_20_Text"><text:span text:style-name="T2"><text:s text:c="4"/>signal(SIGTSTP, catch_suspend);</text:span></text:span></text:p>
            <text:p text:style-name="P18"/>
            <text:p text:style-name="P13"><text:span text:style-name="Source_20_Text"><text:span text:style-name="T2"><text:s text:c="4"/>sigfillset(&amp;mask_set);</text:span></text:span></text:p>
            <text:p text:style-name="P13"><text:span text:style-name="Source_20_Text"><text:span text:style-name="T2"><text:s text:c="4"/>sigprocmask(SIG_SETMASK, &amp;mask_set, &amp;old_set);</text:span></text:span></text:p>
            <text:p text:style-name="P18"/>
            <text:p text:style-name="P13"><text:soft-page-break/><text:span text:style-name="Source_20_Text"><text:span text:style-name="T2"><text:s text:c="4"/>printf("\n\nSo far, '%d' Ctrl-C presses were counted\n\n", ctrl_c_count);</text:span></text:span></text:p>
            <text:p text:style-name="P13"><text:span text:style-name="Source_20_Text"><text:span text:style-name="T2"><text:s text:c="4"/>fflush(stdout);</text:span></text:span></text:p>
            <text:p text:style-name="P18"/>
            <text:p text:style-name="P13"><text:span text:style-name="Source_20_Text"><text:span text:style-name="T2"><text:s text:c="4"/>sigprocmask(SIG_SETMASK, &amp;old_set, NULL);</text:span></text:span></text:p>
            <text:p text:style-name="P13"><text:span text:style-name="Source_20_Text"><text:span text:style-name="T2">}</text:span></text:span></text:p>
          </table:table-cell>
        </table:table-row>
      </table:table>
      <text:p text:style-name="P16"><text:span text:style-name="Source_20_Text"><text:span text:style-name="T2"/></text:span></text:p>
      <text:h text:style-name="P4" text:outline-level="3">Giải quyết triệt để tranh chấp với sigaction()</text:h>
      <text:p text:style-name="P28"><text:bookmark text:name="p-rc_bf62a91dd0099546-19"/><text:span text:style-name="T2">Cách sử dụng </text:span><text:span text:style-name="Source_20_Text"><text:span text:style-name="T2">sigprocmask()</text:span></text:span><text:span text:style-name="T2"> như trên không giải quyết được hoàn toàn mọi tình trạng tranh chấp. Có khả năng sau khi vào trình xử lý nhưng </text:span><text:span text:style-name="T3">trước khi</text:span><text:span text:style-name="T2"> kịp gọi </text:span><text:span text:style-name="Source_20_Text"><text:span text:style-name="T2">sigprocmask()</text:span></text:span><text:span text:style-name="T2">, một tín hiệu khác ập đến và vẫn được thực thi.</text:span></text:p>
      <text:p text:style-name="P29"><text:span text:style-name="T2">Để đảm bảo tuyệt đối không có tranh chấp, chúng ta nên để hệ thống tự động thiết lập mặt nạ tín hiệu </text:span><text:span text:style-name="T3">trước khi</text:span><text:span text:style-name="T2"> gọi trình xử lý. Điều này được thực hiện thông qua lời gọi hệ thống </text:span><text:span text:style-name="Source_20_Text"><text:span text:style-name="T2">sigaction()</text:span></text:span><text:span text:style-name="T2">. Nó cho phép định nghĩa đồng thời cả hàm xử lý lẫn mặt nạ tín hiệu sẽ được áp dụng trong suốt thời gian hàm đó thực thi. Trên các hệ thống cũ không có </text:span><text:span text:style-name="Source_20_Text"><text:span text:style-name="T2">sigaction()</text:span></text:span><text:span text:style-name="T2">, bạn có thể tìm thấy hàm tương đương là </text:span><text:span text:style-name="Source_20_Text"><text:span text:style-name="T2">sigvec()</text:span></text:span><text:span text:style-name="T2">.</text:span></text:p>
      <text:h text:style-name="P7" text:outline-level="2"><text:span text:style-name="Source_20_Text"><text:span text:style-name="T2">Triển khai Bộ định thời bằng Tín hiệu (Implementing Timers Using Signals)</text:span></text:span></text:h>
      <text:p text:style-name="P29"><text:span text:style-name="T2">Bộ định thời (Timers) đóng vai trò quan trọng trong việc xử lý </text:span><text:span text:style-name="T3">thời gian chờ (timeout)</text:span><text:span text:style-name="T2"> (ví dụ: đợi người dùng nhập liệu trong 30 giây, nếu không sẽ thoát), hoặc kiểm tra các điều kiện định kỳ (ví dụ: cứ mỗi 30 giây kiểm tra xem máy chủ phản hồi còn hoạt động hay không). Có nhiều cách để giải quyết vấn đề này đối với các chương trình sử dụng "vòng lặp sự kiện" (event loop) dựa trên lời gọi hệ thống </text:span><text:span text:style-name="Source_20_Text"><text:span text:style-name="T2">select()</text:span></text:span><text:span text:style-name="T2"> hoặc </text:span><text:span text:style-name="Source_20_Text"><text:span text:style-name="T2">poll()</text:span></text:span><text:span text:style-name="T2">, nhưng phương pháp đó thường quá phức tạp cho các chương trình nhỏ và đơn giản.</text:span></text:p>
      <text:p text:style-name="P35">Hệ điều hành Unix cung cấp một cách đơn giản để thiết lập bộ định thời bằng các tín hiệu báo động (alarm signals) đặc biệt. Thông thường, chúng bị giới hạn ở mức chỉ có một bộ định thời hoạt động tại một thời điểm, nhưng điều này là đủ cho các trường hợp đơn giản.</text:p>
      <text:h text:style-name="P5" text:outline-level="3">Lời gọi hệ thống alarm()</text:h>
      <text:p text:style-name="P29"><text:span text:style-name="T2">Lời gọi hệ thống </text:span><text:span text:style-name="Source_20_Text"><text:span text:style-name="T2">alarm()</text:span></text:span><text:span text:style-name="T2"> được sử dụng để yêu cầu hệ thống gửi một tín hiệu đặc biệt tên là </text:span><text:span text:style-name="T3">ALRM</text:span><text:span text:style-name="T2"> (</text:span><text:span text:style-name="Source_20_Text"><text:span text:style-name="T2">SIGALRM</text:span></text:span><text:span text:style-name="T2">) đến tiến trình sau một số giây nhất định. Vì các hệ thống họ Unix không hoạt động như các hệ thống thời gian thực (real-time systems), tiến trình của bạn có thể nhận được tín hiệu này muộn hơn một chút so với thời gian yêu cầu.</text:span></text:p>
      <text:p text:style-name="P35">Việc kết hợp lời gọi hệ thống này với một trình xử lý tín hiệu phù hợp cho phép chúng ta thực hiện một số thủ thuật đơn giản. Hãy xem ví dụ về một chương trình đợi người dùng nhập liệu, nhưng sẽ thoát nếu không có dữ liệu sau một khoảng thời gian chờ:</text:p>
      <table:table table:name="Table6" table:style-name="Table6">
        <table:table-column table:style-name="Table6.A"/>
        <table:table-row>
          <table:table-cell table:style-name="Table6.A1" office:value-type="string">
            <text:p text:style-name="P14"><text:span text:style-name="Source_20_Text"><text:span text:style-name="T2">#include &lt;unistd.h&gt; <text:s text:c="3"/>/* Các hàm Unix tiêu chuẩn, như alarm() <text:s text:c="9"/>*/</text:span></text:span></text:p>
            <text:p text:style-name="P14"><text:span text:style-name="Source_20_Text"><text:span text:style-name="T2">#include &lt;signal.h&gt; <text:s text:c="3"/>/* Các macro tên tín hiệu và prototype signal() <text:s/>*/</text:span></text:span></text:p>
            <text:p text:style-name="P19"/>
            <text:p text:style-name="P14"><text:soft-page-break/><text:span text:style-name="Source_20_Text"><text:span text:style-name="T2">char user[40]; <text:s text:c="7"/>/* Bộ đệm để đọc tên người dùng */</text:span></text:span></text:p>
            <text:p text:style-name="P19"/>
            <text:p text:style-name="P14"><text:span text:style-name="Source_20_Text"><text:span text:style-name="T2">/* Định nghĩa trình xử lý tín hiệu báo động */</text:span></text:span></text:p>
            <text:p text:style-name="P14"><text:span text:style-name="Source_20_Text"><text:span text:style-name="T2">void catch_alarm(int sig_num)</text:span></text:span></text:p>
            <text:p text:style-name="P14"><text:span text:style-name="Source_20_Text"><text:span text:style-name="T2">{</text:span></text:span></text:p>
            <text:p text:style-name="P14"><text:span text:style-name="Source_20_Text"><text:span text:style-name="T2"><text:s text:c="4"/>printf("Operation timed out. Exiting...\n\n");</text:span></text:span></text:p>
            <text:p text:style-name="P14"><text:span text:style-name="Source_20_Text"><text:span text:style-name="T2"><text:s text:c="4"/>exit(0);</text:span></text:span></text:p>
            <text:p text:style-name="P14"><text:span text:style-name="Source_20_Text"><text:span text:style-name="T2">}</text:span></text:span></text:p>
            <text:p text:style-name="P19"/>
            <text:p text:style-name="P14"><text:span text:style-name="Source_20_Text"><text:span text:style-name="T2">/* ... bên trong hàm main ... */</text:span></text:span></text:p>
            <text:p text:style-name="P19"/>
            <text:p text:style-name="P14"><text:span text:style-name="Source_20_Text"><text:span text:style-name="T2">/* Thiết lập trình xử lý cho tín hiệu ALRM */</text:span></text:span></text:p>
            <text:p text:style-name="P14"><text:span text:style-name="Source_20_Text"><text:span text:style-name="T2">signal(SIGALRM, catch_alarm);</text:span></text:span></text:p>
            <text:p text:style-name="P19"/>
            <text:p text:style-name="P14"><text:span text:style-name="Source_20_Text"><text:span text:style-name="T2">/* Nhắc người dùng nhập liệu */</text:span></text:span></text:p>
            <text:p text:style-name="P14"><text:span text:style-name="Source_20_Text"><text:span text:style-name="T2">printf("Username: ");</text:span></text:span></text:p>
            <text:p text:style-name="P14"><text:span text:style-name="Source_20_Text"><text:span text:style-name="T2">fflush(stdout);</text:span></text:span></text:p>
            <text:p text:style-name="P19"/>
            <text:p text:style-name="P14"><text:span text:style-name="Source_20_Text"><text:span text:style-name="T2">/* Bắt đầu đếm ngược báo động 30 giây */</text:span></text:span></text:p>
            <text:p text:style-name="P14"><text:span text:style-name="Source_20_Text"><text:span text:style-name="T2">alarm(30);</text:span></text:span></text:p>
            <text:p text:style-name="P19"/>
            <text:p text:style-name="P14"><text:span text:style-name="Source_20_Text"><text:span text:style-name="T2">/* Đợi người dùng nhập liệu */</text:span></text:span></text:p>
            <text:p text:style-name="P14"><text:span text:style-name="Source_20_Text"><text:span text:style-name="T2">gets(user);</text:span></text:span></text:p>
            <text:p text:style-name="P19"/>
            <text:p text:style-name="P14"><text:span text:style-name="Source_20_Text"><text:span text:style-name="T2">/* Hủy bộ định thời sau khi đã nhận được dữ liệu nhập */</text:span></text:span></text:p>
            <text:p text:style-name="P14"><text:span text:style-name="Source_20_Text"><text:span text:style-name="T2">alarm(0);</text:span></text:span></text:p>
            <text:p text:style-name="P19"/>
            <text:p text:style-name="P14"><text:span text:style-name="Source_20_Text"><text:span text:style-name="T2">/* ... tiếp tục xử lý với tên người dùng nhận được ... */</text:span></text:span></text:p>
          </table:table-cell>
        </table:table-row>
      </table:table>
      <text:p text:style-name="P16"><text:span text:style-name="Source_20_Text"><text:span text:style-name="T2"/></text:span></text:p>
      <text:p text:style-name="P29"><text:span text:style-name="T2">Như bạn thấy, chúng ta bắt đầu bộ định thời ngay trước khi đợi người dùng nhập liệu. Chúng ta cũng dừng bộ định thời (</text:span><text:span text:style-name="Source_20_Text"><text:span text:style-name="T2">alarm(0)</text:span></text:span><text:span text:style-name="T2">) ngay sau khi nhận được dữ liệu để tránh việc bộ </text:span><text:soft-page-break/><text:span text:style-name="T2">định thời kích hoạt ngẫu nhiên do quá trình xử lý dữ liệu sau đó bị chậm. Nhiều lỗi khi sử dụng </text:span><text:span text:style-name="Source_20_Text"><text:span text:style-name="T2">alarm()</text:span></text:span><text:span text:style-name="T2"> xảy ra do quên tắt bộ định thời ở các nhánh rẽ nhánh phức tạp của mã nguồn.</text:span></text:p>
      <text:p text:style-name="P29"><text:span text:style-name="T2">Để có các bộ định thời chính xác hơn, bạn có thể sử dụng </text:span><text:span text:style-name="Source_20_Text"><text:span text:style-name="T2">setitimer</text:span></text:span><text:span text:style-name="T2">.</text:span></text:p>
      <text:h text:style-name="P6" text:outline-level="2">POSIX sigaction</text:h>
      <text:p text:style-name="P29"><text:span text:style-name="T2">Cấu trúc </text:span><text:span text:style-name="Source_20_Text"><text:span text:style-name="T2">sigaction</text:span></text:span><text:span text:style-name="T2"> hiện đại cho phép kiểm soát tín hiệu chi tiết hơn. Trình xử lý của nó có thể nhận ba tham số để lấy thêm thông tin về sự kiện.</text:span></text:p>
      <table:table table:name="Table5" table:style-name="Table5">
        <table:table-column table:style-name="Table5.A"/>
        <table:table-row>
          <table:table-cell table:style-name="Table5.A1" office:value-type="string">
            <text:p text:style-name="P15"><text:span text:style-name="Source_20_Text"><text:span text:style-name="T2">/* Lưu ý trình xử lý có ba tham số */</text:span></text:span></text:p>
            <text:p text:style-name="P15"><text:span text:style-name="Source_20_Text"><text:span text:style-name="T2">void myusr1(int sig, siginfo_t *theinfo, void *foo);</text:span></text:span></text:p>
            <text:p text:style-name="P20"/>
            <text:p text:style-name="P15"><text:span text:style-name="Source_20_Text"><text:span text:style-name="T2">main () {</text:span></text:span></text:p>
            <text:p text:style-name="P15"><text:span text:style-name="Source_20_Text"><text:span text:style-name="T2"><text:s text:c="3"/>struct sigaction myaction;</text:span></text:span></text:p>
            <text:p text:style-name="P15"><text:span text:style-name="Source_20_Text"><text:span text:style-name="T2"><text:s text:c="3"/>/* sigaction ít nhất bao gồm:</text:span></text:span></text:p>
            <text:p text:style-name="P15"><text:span text:style-name="Source_20_Text"><text:span text:style-name="T2"><text:s text:c="6"/>sa_handler: con trỏ hàm, SIG_DFL hoặc SIG_IGN</text:span></text:span></text:p>
            <text:p text:style-name="P15"><text:span text:style-name="Source_20_Text"><text:span text:style-name="T2"><text:s text:c="6"/>sa_sigaction: trình xử lý nâng cao (khi dùng cờ SA_SIGINFO)</text:span></text:span></text:p>
            <text:p text:style-name="P15"><text:span text:style-name="Source_20_Text"><text:span text:style-name="T2"><text:s text:c="6"/>sa_mask: mặt nạ tín hiệu cần chặn khi đang thực thi trình xử lý</text:span></text:span></text:p>
            <text:p text:style-name="P15"><text:span text:style-name="Source_20_Text"><text:span text:style-name="T2"><text:s text:c="6"/>sa_flags: các cờ điều khiển</text:span></text:span></text:p>
            <text:p text:style-name="P15"><text:span text:style-name="Source_20_Text"><text:span text:style-name="T2"><text:s text:c="3"/>*/</text:span></text:span></text:p>
            <text:p text:style-name="P20"/>
            <text:p text:style-name="P15"><text:span text:style-name="Source_20_Text"><text:span text:style-name="T2"><text:s text:c="3"/>sigemptyset(&amp;myaction.sa_mask);</text:span></text:span></text:p>
            <text:p text:style-name="P15"><text:span text:style-name="Source_20_Text"><text:span text:style-name="T2"><text:s text:c="3"/>myaction.sa_sigaction = myusr1;</text:span></text:span></text:p>
            <text:p text:style-name="P15"><text:span text:style-name="Source_20_Text"><text:span text:style-name="T2"><text:s text:c="3"/>myaction.sa_flags = SA_SIGINFO; /* Sử dụng cấu trúc thông tin nâng cao */</text:span></text:span></text:p>
            <text:p text:style-name="P20"/>
            <text:p text:style-name="P15"><text:span text:style-name="Source_20_Text"><text:span text:style-name="T2"><text:s text:c="3"/>sigaction(SIGUSR1, &amp;myaction, NULL);</text:span></text:span></text:p>
            <text:p text:style-name="P20"/>
            <text:p text:style-name="P15"><text:span text:style-name="Source_20_Text"><text:span text:style-name="T2"><text:s text:c="3"/>/* Ví dụ về việc kiểm tra xem tín hiệu có bị chặn (block) hay không */</text:span></text:span></text:p>
            <text:p text:style-name="P15"><text:span text:style-name="Source_20_Text"><text:span text:style-name="T2"><text:s text:c="3"/>sigset_t myset;</text:span></text:span></text:p>
            <text:p text:style-name="P15"><text:span text:style-name="Source_20_Text"><text:span text:style-name="T2"><text:s text:c="3"/>sigemptyset(&amp;myset);</text:span></text:span></text:p>
            <text:p text:style-name="P15"><text:span text:style-name="Source_20_Text"><text:span text:style-name="T2"><text:s text:c="3"/>sigprocmask(SIG_BLOCK, NULL, &amp;myset);</text:span></text:span></text:p>
            <text:p text:style-name="P15"><text:span text:style-name="Source_20_Text"><text:span text:style-name="T2"><text:s text:c="3"/>if (1 == sigismember(&amp;myset, SIGUSR1)) {</text:span></text:span></text:p>
            <text:p text:style-name="P15"><text:span text:style-name="Source_20_Text"><text:span text:style-name="T2"><text:s text:c="6"/>printf("The SIGUSR1 is blocked\n");</text:span></text:span></text:p>
            <text:p text:style-name="P15"><text:span text:style-name="Source_20_Text"><text:span text:style-name="T2"><text:s text:c="3"/>}</text:span></text:span></text:p>
            <text:p text:style-name="P20"><text:soft-page-break/></text:p>
            <text:p text:style-name="P15"><text:span text:style-name="Source_20_Text"><text:span text:style-name="T2"><text:s text:c="3"/>while (1) { }</text:span></text:span></text:p>
            <text:p text:style-name="P15"><text:span text:style-name="Source_20_Text"><text:span text:style-name="T2">}</text:span></text:span></text:p>
            <text:p text:style-name="P20"/>
            <text:p text:style-name="P15"><text:span text:style-name="Source_20_Text"><text:span text:style-name="T2">void myusr1(int sig, siginfo_t *theinfo, void *foo) {</text:span></text:span></text:p>
            <text:p text:style-name="P15"><text:span text:style-name="Source_20_Text"><text:span text:style-name="T2"><text:s text:c="4"/>sigset_t localset;</text:span></text:span></text:p>
            <text:p text:style-name="P15"><text:span text:style-name="Source_20_Text"><text:span text:style-name="T2"><text:s text:c="4"/>printf("SIGUSR1 called\n");</text:span></text:span></text:p>
            <text:p text:style-name="P15"><text:span text:style-name="Source_20_Text"><text:span text:style-name="T2"><text:s text:c="4"/>printf("Thông tin bổ sung:\n");</text:span></text:span></text:p>
            <text:p text:style-name="P15"><text:span text:style-name="Source_20_Text"><text:span text:style-name="T2"><text:s text:c="4"/>printf(" PID gửi tín hiệu = %d\n", theinfo-&gt;si_pid);</text:span></text:span></text:p>
            <text:p text:style-name="P15"><text:span text:style-name="Source_20_Text"><text:span text:style-name="T2"><text:s text:c="4"/>printf(" UID gửi tín hiệu = %d\n", theinfo-&gt;si_uid);</text:span></text:span></text:p>
            <text:p text:style-name="P15"><text:span text:style-name="Source_20_Text"><text:span text:style-name="T2"><text:s text:c="4"/></text:span></text:span></text:p>
            <text:p text:style-name="P15"><text:span text:style-name="Source_20_Text"><text:span text:style-name="T2"><text:s text:c="4"/>/* Kiểm tra các tín hiệu đang chờ (pending) */</text:span></text:span></text:p>
            <text:p text:style-name="P15"><text:span text:style-name="Source_20_Text"><text:span text:style-name="T2"><text:s text:c="4"/>sigpending(&amp;localset); </text:span></text:span></text:p>
            <text:p text:style-name="P15"><text:span text:style-name="Source_20_Text"><text:span text:style-name="T2"><text:s text:c="4"/>if (1 == sigismember(&amp;localset, SIGUSR2)) {</text:span></text:span></text:p>
            <text:p text:style-name="P15"><text:span text:style-name="Source_20_Text"><text:span text:style-name="T2"><text:s text:c="7"/>printf("There is a SIGUSR2 pending \n");</text:span></text:span></text:p>
            <text:p text:style-name="P15"><text:span text:style-name="Source_20_Text"><text:span text:style-name="T2"><text:s text:c="4"/>}</text:span></text:span></text:p>
            <text:p text:style-name="P15"><text:span text:style-name="Source_20_Text"><text:span text:style-name="T2">}</text:span></text:span></text:p>
          </table:table-cell>
        </table:table-row>
      </table:table>
      <text:p text:style-name="P16"><text:span text:style-name="Source_20_Text"><text:span text:style-name="T2"/></text:span></text:p>
      <text:h text:style-name="P6" text:outline-level="2">Lời gọi hệ thống longjmp()</text:h>
      <text:p text:style-name="P29"><text:span text:style-name="T2">Sau khi nhận được tín hiệu, đôi khi cần phải đưa chương trình trở lại trạng thái trước khi nhận tín hiệu. Điều này có thể thực hiện được bằng các lời gọi hệ thống </text:span><text:span text:style-name="Source_20_Text"><text:span text:style-name="T2">setjmp</text:span></text:span><text:span text:style-name="T2"> và </text:span><text:span text:style-name="Source_20_Text"><text:span text:style-name="T2">longjmp</text:span></text:span><text:span text:style-name="T2">.</text:span></text:p>
      <text:list text:style-name="L8">
        <text:list-item>
          <text:p text:style-name="P33"><text:span text:style-name="T1">setjmp()</text:span>: Lưu lại trạng thái hiện tại của ngăn xếp (stack context).</text:p>
        </text:list-item>
        <text:list-item>
          <text:p text:style-name="P27"><text:span text:style-name="T3">longjmp()</text:span><text:span text:style-name="T2">: Khôi phục trạng thái đã lưu, khiến chương trình "nhảy" ngược lại vị trí </text:span><text:span text:style-name="Source_20_Text"><text:span text:style-name="T2">setjmp</text:span></text:span><text:span text:style-name="T2"> đã gọi.</text:span></text:p>
        </text:list-item>
      </text:list>
      <text:p text:style-name="P29"><text:span text:style-name="T3">Lưu ý quan trọng:</text:span><text:span text:style-name="T2"> Ngữ cảnh ngăn xếp (stack context) có thể bị mất hiệu lực nếu hàm gọi </text:span><text:span text:style-name="Source_20_Text"><text:span text:style-name="T2">setjmp()</text:span></text:span><text:span text:style-name="T2"> đã trả về (return). Trong các phiên bản cũ của Linux, việc sử dụng sai cách có thể dẫn đến lỗi </text:span><text:span text:style-name="T3">core dump</text:span><text:span text:style-name="T2"> (kết xuất lõi).</text:span></text:p>
      <text:p text:style-name="P29"><text:span text:style-name="Source_20_Text"><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7T08:33:06.745555537</meta:creation-date>
    <dc:date>2026-04-08T06:15:21.602861190</dc:date>
    <meta:editing-duration>PT18M47S</meta:editing-duration>
    <meta:editing-cycles>13</meta:editing-cycles>
    <meta:generator>LibreOffice/24.2.7.2$Linux_X86_64 LibreOffice_project/420$Build-2</meta:generator>
    <meta:document-statistic meta:table-count="6" meta:image-count="0" meta:object-count="0" meta:page-count="11" meta:paragraph-count="209" meta:word-count="3894" meta:character-count="19573" meta:non-whitespace-character-count="15468"/>
  </office:meta>
</office:document-meta>
</file>