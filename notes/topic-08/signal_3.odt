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P1" style:family="paragraph" style:parent-style-name="Standard">
      <style:paragraph-properties fo:margin-top="0.0598in" fo:margin-bottom="0.0598in" style:contextual-spacing="false" fo:line-height="100%" fo:text-align="justify" style:justify-single-word="false"/>
    </style:style>
    <style:style style:name="P2"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 style:family="paragraph" style:parent-style-name="Heading_20_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5" style:family="paragraph" style:parent-style-name="Preformatted_20_Text" style:list-style-name="L2">
      <style:paragraph-properties fo:margin-top="0.0598in" fo:margin-bottom="0.0598in" style:contextual-spacing="false" fo:line-height="100%" fo:text-align="justify" style:justify-single-word="false"/>
    </style:style>
    <style:style style:name="P6"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7" style:family="paragraph" style:parent-style-name="Text_20_body" style:list-style-name="L1">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8" style:family="paragraph" style:parent-style-name="Text_20_body" style:list-style-name="L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9" style:family="paragraph" style:parent-style-name="Text_20_body" style:list-style-name="L4">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0" style:family="paragraph" style:parent-style-name="Text_20_body" style:list-style-name="L6">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1" style:family="paragraph" style:parent-style-name="Text_20_body" style:list-style-name="L2">
      <style:paragraph-properties fo:margin-top="0.0598in" fo:margin-bottom="0.0598in" style:contextual-spacing="false" fo:line-height="100%" fo:text-align="justify" style:justify-single-word="false"/>
      <style:text-properties style:font-name="Liberation Serif" fo:font-size="13pt" fo:font-weight="bold" style:font-size-asian="13pt" style:font-size-complex="13pt"/>
    </style:style>
    <style:style style:name="P12"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style:font-size-asian="13pt" style:font-size-complex="13pt"/>
    </style:style>
    <style:style style:name="P13" style:family="paragraph" style:parent-style-name="Text_20_body" style:list-style-name="L1">
      <style:paragraph-properties fo:margin-top="0.0598in" fo:margin-bottom="0.0598in" style:contextual-spacing="false" fo:line-height="100%" fo:text-align="justify" style:justify-single-word="false"/>
    </style:style>
    <style:style style:name="P14" style:family="paragraph" style:parent-style-name="Text_20_body" style:list-style-name="L2">
      <style:paragraph-properties fo:margin-top="0.0598in" fo:margin-bottom="0.0598in" style:contextual-spacing="false" fo:line-height="100%" fo:text-align="justify" style:justify-single-word="false"/>
    </style:style>
    <style:style style:name="P15" style:family="paragraph" style:parent-style-name="Text_20_body">
      <style:paragraph-properties fo:margin-top="0.0598in" fo:margin-bottom="0.0598in" style:contextual-spacing="false" fo:line-height="100%" fo:text-align="justify" style:justify-single-word="false"/>
    </style:style>
    <style:style style:name="P16" style:family="paragraph" style:parent-style-name="Text_20_body" style:list-style-name="L4">
      <style:paragraph-properties fo:margin-top="0.0598in" fo:margin-bottom="0.0598in" style:contextual-spacing="false" fo:line-height="100%" fo:text-align="justify" style:justify-single-word="false"/>
    </style:style>
    <style:style style:name="P17" style:family="paragraph" style:parent-style-name="Text_20_body" style:list-style-name="L5">
      <style:paragraph-properties fo:margin-top="0.0598in" fo:margin-bottom="0.0598in" style:contextual-spacing="false" fo:line-height="100%" fo:text-align="justify" style:justify-single-word="false"/>
    </style:style>
    <style:style style:name="P18" style:family="paragraph" style:parent-style-name="Text_20_body" style:list-style-name="L6">
      <style:paragraph-properties fo:margin-top="0.0598in" fo:margin-bottom="0.0598in" style:contextual-spacing="false" fo:line-height="100%" fo:text-align="justify" style:justify-single-word="false"/>
    </style:style>
    <style:style style:name="T1" style:family="text">
      <style:text-properties fo:font-weight="bold"/>
    </style:style>
    <style:style style:name="T2" style:family="text">
      <style:text-properties fo:font-style="italic"/>
    </style:style>
    <style:style style:name="T3" style:family="text">
      <style:text-properties style:font-name="Liberation Serif"/>
    </style:style>
    <style:style style:name="T4" style:family="text">
      <style:text-properties style:font-name="Liberation Serif" fo:font-size="13pt" style:font-size-asian="13pt" style:font-size-complex="13pt"/>
    </style:style>
    <style:style style:name="T5" style:family="text">
      <style:text-properties style:font-name="Liberation Serif" fo:font-size="13pt" officeooo:rsid="000c4cb6" style:font-size-asian="13pt" style:font-size-complex="13pt"/>
    </style:style>
    <style:style style:name="T6" style:family="text">
      <style:text-properties style:font-name="Liberation Serif" fo:font-size="13pt" fo:font-weight="bold" style:font-size-asian="13pt" style:font-size-complex="13pt"/>
    </style:style>
    <style:style style:name="T7" style:family="text">
      <style:text-properties style:font-name="Liberation Serif" fo:font-size="13pt" fo:font-style="italic" style:font-size-asian="13pt" style:font-size-complex="13pt"/>
    </style:style>
    <style:style style:name="T8" style:family="text">
      <style:text-properties officeooo:rsid="0012b81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Nguồn tham khảo: </text:span><text:a xlink:type="simple" xlink:href="https://priyanka-vedeshwar.medium.com/understanding-signals-in-linux-059c5608eca2" text:style-name="Internet_20_link" text:visited-style-name="Visited_20_Internet_20_Link"><text:span text:style-name="T5">https://priyanka-vedeshwar.medium.com/understanding-signals-in-linux-059c5608eca2</text:span></text:a></text:p>
      <text:h text:style-name="P3" text:outline-level="2">1. Tổng quan về Tín hiệu (Signals)</text:h>
      <text:p text:style-name="P6">Tín hiệu là một dạng tin nhắn thông báo tiêu chuẩn được sử dụng trong các hệ điều hành tuân theo chuẩn POSIX và Unix. Chúng được dùng để thông báo cho một tiến trình (process) rằng một sự kiện cụ thể vừa xảy ra.</text:p>
      <text:p text:style-name="P6">Các tín hiệu được chia thành hai loại chính:</text:p>
      <text:list text:style-name="L1">
        <text:list-item>
          <text:p text:style-name="P7"><text:span text:style-name="T1">Tín hiệu tiêu chuẩn (Standard signals):</text:span> Do Linux cung cấp sẵn. Một số ví dụ phổ biến bao gồm:</text:p>
          <text:list>
            <text:list-item>
              <text:p text:style-name="P13"><text:span text:style-name="Source_20_Text"><text:span text:style-name="T4">SIGCHILD</text:span></text:span><text:span text:style-name="T4">: Gửi đến tiến trình cha khi tiến trình con kết thúc.</text:span></text:p>
            </text:list-item>
            <text:list-item>
              <text:p text:style-name="P13"><text:span text:style-name="Source_20_Text"><text:span text:style-name="T4">SIGSEGV</text:span></text:span><text:span text:style-name="T4">: Do kernel (nhân hệ điều hành) phát ra khi tiến trình truy cập bộ nhớ bất hợp pháp (Segmentation fault).</text:span></text:p>
            </text:list-item>
            <text:list-item>
              <text:p text:style-name="P13"><text:span text:style-name="Source_20_Text"><text:span text:style-name="T4">SIGFPE</text:span></text:span><text:span text:style-name="T4">: Phát ra khi xảy ra lỗi ngoại lệ phần cứng, chẳng hạn như lỗi chia cho 0.</text:span></text:p>
            </text:list-item>
          </text:list>
        </text:list-item>
        <text:list-item>
          <text:p text:style-name="P13"><text:span text:style-name="T6">Tín hiệu tùy chỉnh/thời gian thực (Customized / Real-time signals):</text:span><text:span text:style-name="T4"> Các tín hiệu như </text:span><text:span text:style-name="Source_20_Text"><text:span text:style-name="T4">SIGUSR1</text:span></text:span><text:span text:style-name="T4"> và </text:span><text:span text:style-name="Source_20_Text"><text:span text:style-name="T4">SIGUSR2</text:span></text:span><text:span text:style-name="T4"> được cung cấp để lập trình viên tự định nghĩa hành vi, thường dùng trong giao tiếp giữa các tiến trình (IPC - Inter-process communication).</text:span></text:p>
        </text:list-item>
      </text:list>
      <text:h text:style-name="P3" text:outline-level="2">2. Cách thức Gửi một Tín hiệu</text:h>
      <text:p text:style-name="P6">Một tín hiệu có thể được gửi bất đồng bộ đến một chương trình đang chạy để thông báo sự kiện, do một tiến trình khác hoặc do chính kernel gửi. Có 3 cách chính để gửi đi một tín hiệu:</text:p>
      <text:list text:style-name="L2">
        <text:list-item>
          <text:p text:style-name="P14"><text:span text:style-name="T6">Sử dụng System Call </text:span><text:span text:style-name="Source_20_Text"><text:span text:style-name="T6">kill()</text:span></text:span><text:span text:style-name="T6"> trong mã nguồn:</text:span></text:p>
          <text:p text:style-name="P5"><text:span text:style-name="Source_20_Text"><text:span text:style-name="T4">int kill(pid_t pid, int sig);</text:span></text:span></text:p>
        </text:list-item>
        <text:list-item>
          <text:p text:style-name="P14"><text:span text:style-name="T6">Sử dụng lệnh </text:span><text:span text:style-name="Source_20_Text"><text:span text:style-name="T6">kill</text:span></text:span><text:span text:style-name="T6"> từ Terminal:</text:span></text:p>
          <text:p text:style-name="P5"><text:span text:style-name="Source_20_Text"><text:span text:style-name="T4">kill [signal] PID</text:span></text:span></text:p>
        </text:list-item>
        <text:list-item>
          <text:p text:style-name="P11">Gửi tín hiệu thông qua Phần cứng (Bàn phím):</text:p>
          <text:list>
            <text:list-item>
              <text:p text:style-name="P14"><text:span text:style-name="Source_20_Text"><text:span text:style-name="T4">Ctrl + C</text:span></text:span><text:span text:style-name="T4">: Gửi </text:span><text:span text:style-name="Source_20_Text"><text:span text:style-name="T4">SIGINT</text:span></text:span><text:span text:style-name="T4"> để ngắt/dừng tiến trình.</text:span></text:p>
            </text:list-item>
            <text:list-item>
              <text:p text:style-name="P14"><text:span text:style-name="Source_20_Text"><text:span text:style-name="T4">Ctrl + \</text:span></text:span><text:span text:style-name="T4">: Gửi </text:span><text:span text:style-name="Source_20_Text"><text:span text:style-name="T4">SIGQUIT</text:span></text:span><text:span text:style-name="T4"> để buộc kết thúc tiến trình.</text:span></text:p>
            </text:list-item>
            <text:list-item>
              <text:p text:style-name="P14"><text:span text:style-name="Source_20_Text"><text:span text:style-name="T4">Ctrl + Z</text:span></text:span><text:span text:style-name="T4">: Gửi </text:span><text:span text:style-name="Source_20_Text"><text:span text:style-name="T4">SIGTSTP</text:span></text:span><text:span text:style-name="T4"> để tạm dừng (suspend) tiến trình.</text:span></text:p>
            </text:list-item>
          </text:list>
        </text:list-item>
      </text:list>
      <text:p text:style-name="P15"><text:span text:style-name="T7">Lưu ý: Bạn có thể kiểm tra toàn bộ danh sách các tín hiệu mà hệ thống hỗ trợ bằng lệnh </text:span><text:span text:style-name="Source_20_Text"><text:span text:style-name="T7">kill -l</text:span></text:span><text:span text:style-name="T7"> trên terminal.</text:span></text:p>
      <text:h text:style-name="P3" text:outline-level="2">3. Nhận và Xử lý Tín hiệu</text:h>
      <text:p text:style-name="P15"><text:span text:style-name="T4">Mỗi tiến trình duy trì hai vector bit liên quan đến tín hiệu: </text:span><text:span text:style-name="T6">Pending</text:span><text:span text:style-name="T4"> (Đang chờ) và </text:span><text:span text:style-name="T6">Blocked</text:span><text:span text:style-name="T4"> (Bị chặn). Khi nhận được một tín hiệu, kernel sẽ thiết lập bit tương ứng thành </text:span><text:span text:style-name="Source_20_Text"><text:span text:style-name="T4">1</text:span></text:span><text:span text:style-name="T4"> trong vector </text:span><text:span text:style-name="T7">Pending</text:span><text:span text:style-name="T4"> của tiến trình đích. Nếu tiến trình có một tín hiệu (ví dụ </text:span><text:span text:style-name="Source_20_Text"><text:span text:style-name="T4">SIGCHILD</text:span></text:span><text:span text:style-name="T4">) đang chờ xử </text:span><text:soft-page-break/><text:span text:style-name="T4">lý, một tín hiệu cùng loại khác sẽ không thể được gửi thêm cho đến khi tín hiệu hiện tại được giải quyết.</text:span></text:p>
      <text:p text:style-name="P6">Khi tiến trình tiếp tục thực thi, kernel sẽ kiểm tra danh sách các tín hiệu đang chờ và không bị chặn:</text:p>
      <text:list text:style-name="L3">
        <text:list-item>
          <text:p text:style-name="P8">Nếu không có tín hiệu nào, chương trình tiếp tục chạy lệnh tiếp theo.</text:p>
        </text:list-item>
        <text:list-item>
          <text:p text:style-name="P8">Nếu có, kernel chọn một tín hiệu (thường là tín hiệu có số thứ tự nhỏ nhất) và buộc tiến trình phải phản hồi.</text:p>
        </text:list-item>
      </text:list>
      <text:p text:style-name="P6">Các hành động phản hồi (Action) có thể là:</text:p>
      <text:list text:style-name="L4">
        <text:list-item>
          <text:p text:style-name="P9"><text:span text:style-name="T1">Bỏ qua (Ignore)</text:span> tín hiệu.</text:p>
        </text:list-item>
        <text:list-item>
          <text:p text:style-name="P9"><text:span text:style-name="T1">Chấm dứt (Terminate):</text:span> Tiến trình kết thúc ngay lập tức.</text:p>
        </text:list-item>
        <text:list-item>
          <text:p text:style-name="P9"><text:span text:style-name="T1">Chấm dứt và kết xuất bộ nhớ (Core dump):</text:span> Tiến trình kết thúc và tạo file core dump để debug.</text:p>
        </text:list-item>
        <text:list-item>
          <text:p text:style-name="P16"><text:span text:style-name="T6">Tạm dừng (Suspend):</text:span><text:span text:style-name="T4"> Tiến trình dừng chạy cho đến khi nhận được tín hiệu </text:span><text:span text:style-name="Source_20_Text"><text:span text:style-name="T4">SIGCONT</text:span></text:span><text:span text:style-name="T4">.</text:span></text:p>
        </text:list-item>
        <text:list-item>
          <text:p text:style-name="P9"><text:span text:style-name="T1">Đánh chặn (Intercept):</text:span> Thực thi một hàm xử lý tín hiệu (signal handler) do người dùng tự định nghĩa.</text:p>
        </text:list-item>
      </text:list>
      <text:h text:style-name="P3" text:outline-level="2">4. Thay đổi Hành vi Mặc định của Tín hiệu</text:h>
      <text:p text:style-name="P15"><text:span text:style-name="T4">Mỗi tín hiệu đều có một hành vi mặc định, nhưng lập trình viên có thể thay đổi chúng bằng cách sử dụng các hàm xử lý (Signal Handlers). Ngoại lệ duy nhất là </text:span><text:span text:style-name="Source_20_Text"><text:span text:style-name="T4">SIGKILL</text:span></text:span><text:span text:style-name="T4"> và </text:span><text:span text:style-name="Source_20_Text"><text:span text:style-name="T4">SIGSTOP</text:span></text:span><text:span text:style-name="T4">, hai tín hiệu này không thể bị chặn hoặc thay đổi hành vi mặc định.</text:span></text:p>
      <text:p text:style-name="P6">Để cài đặt hàm xử lý, hệ thống cung cấp 2 system calls:</text:p>
      <text:list text:style-name="L5">
        <text:list-item>
          <text:p text:style-name="P17"><text:span text:style-name="Source_20_Text"><text:span text:style-name="T4">signal()</text:span></text:span><text:span text:style-name="T4">: Không được khuyến khích sử dụng do vấn đề về tính di động (portability).</text:span></text:p>
        </text:list-item>
        <text:list-item>
          <text:p text:style-name="P17"><text:span text:style-name="Source_20_Text"><text:span text:style-name="T4">sigaction()</text:span></text:span><text:span text:style-name="T4">: Hàm tiêu chuẩn để thay đổi hành động liên kết với tín hiệu.</text:span></text:p>
        </text:list-item>
      </text:list>
      <table:table table:name="Table1" table:style-name="Table1">
        <table:table-column table:style-name="Table1.A"/>
        <table:table-row>
          <table:table-cell table:style-name="Table1.A1" office:value-type="string">
            <text:p text:style-name="P4">#include &lt;signal.h&gt;</text:p>
            <text:p text:style-name="P4">int sigaction(int sig, const struct sigaction *__restrict__ new, struct sigaction *__restrict__ old);</text:p>
          </table:table-cell>
        </table:table-row>
      </table:table>
      <text:p text:style-name="P2"><text:span text:style-name="T1">Ví dụ: Thay đổi hành vi của SIGINT bằng sigaction</text:span> Chương trình dưới đây chặn <text:span text:style-name="Source_20_Text"><text:span text:style-name="T3">Ctrl+C</text:span></text:span> (<text:span text:style-name="Source_20_Text"><text:span text:style-name="T3">SIGINT</text:span></text:span>). Thay vì tắt chương trình, nó sẽ in ra một thông báo.</text:p>
      <table:table table:name="Table2" table:style-name="Table2">
        <table:table-column table:style-name="Table2.A"/>
        <table:table-row>
          <table:table-cell table:style-name="Table2.A1" office:value-type="string">
            <text:p text:style-name="P4">#include &lt;iostream&gt;</text:p>
            <text:p text:style-name="P4">#include &lt;signal.h&gt;</text:p>
            <text:p text:style-name="P4">#include &lt;strings.h&gt; // for bzero</text:p>
            <text:p text:style-name="P4"/>
            <text:p text:style-name="P4">using namespace std;</text:p>
            <text:p text:style-name="P4"/>
            <text:p text:style-name="P4"><text:soft-page-break/>void set_signal_action();</text:p>
            <text:p text:style-name="P4">void signal_handler(int);</text:p>
            <text:p text:style-name="P4"/>
            <text:p text:style-name="P4">int main(){</text:p>
            <text:p text:style-name="P4"><text:s text:c="4"/>// Cài đặt hàm xử lý tín hiệu</text:p>
            <text:p text:style-name="P4"><text:s text:c="4"/>set_signal_action();</text:p>
            <text:p text:style-name="P4"><text:s text:c="4"/>while(1);</text:p>
            <text:p text:style-name="P4"><text:s text:c="4"/>return 0;</text:p>
            <text:p text:style-name="P4">}</text:p>
            <text:p text:style-name="P4"/>
            <text:p text:style-name="P4">void set_signal_action(){</text:p>
            <text:p text:style-name="P4"><text:s text:c="4"/>struct sigaction sa;</text:p>
            <text:p text:style-name="P4"><text:s text:c="4"/>bzero(&amp;sa,sizeof(sa));</text:p>
            <text:p text:style-name="P4"><text:s text:c="4"/>// Cập nhật sa_handler để tùy chỉnh hành vi</text:p>
            <text:p text:style-name="P4"><text:s text:c="4"/>sa.sa_handler = &amp;signal_handler;</text:p>
            <text:p text:style-name="P4"><text:s text:c="4"/>// Đăng ký hàm xử lý cho SIGINT</text:p>
            <text:p text:style-name="P4"><text:s text:c="4"/>sigaction(SIGINT,&amp;sa,NULL);</text:p>
            <text:p text:style-name="P4">}</text:p>
            <text:p text:style-name="P4"/>
            <text:p text:style-name="P4">// Hàm do người dùng định nghĩa, được gọi khi có SIGINT</text:p>
            <text:p text:style-name="P4">void signal_handler(int SIGNAL){</text:p>
            <text:p text:style-name="P4"><text:s text:c="4"/>if(SIGNAL == SIGINT)</text:p>
            <text:p text:style-name="P4"><text:s text:c="8"/>cout &lt;&lt; "Intercepted SIGINT. Press Ctrl \\ to exit \n";</text:p>
            <text:p text:style-name="P4">}</text:p>
          </table:table-cell>
        </table:table-row>
      </table:table>
      <text:h text:style-name="P3" text:outline-level="2">5. Các Hàm An toàn với Tín hiệu (Signal-Safe Functions)</text:h>
      <text:p text:style-name="P15"><text:span text:style-name="T4">Không phải hàm nào cũng có thể được gọi an toàn bên trong một signal handler. Ví dụ, với các hàm I/O chuẩn như </text:span><text:span text:style-name="Source_20_Text"><text:span text:style-name="T4">printf</text:span></text:span><text:span text:style-name="T4">, nếu tiến trình đang cập nhật buffer </text:span><text:span text:style-name="Source_20_Text"><text:span text:style-name="T4">stdout</text:span></text:span><text:span text:style-name="T4"> và bị ngắt bởi một signal handler cũng gọi </text:span><text:span text:style-name="Source_20_Text"><text:span text:style-name="T4">printf</text:span></text:span><text:span text:style-name="T4">, buffer này có thể bị hỏng, dẫn đến hành vi không xác định (undefined behavior). Do đó, khi viết code trong signal handler, chỉ nên sử dụng các </text:span><text:span text:style-name="T6">hàm an toàn bất đồng bộ (async-signal-safe functions)</text:span><text:span text:style-name="T4">.</text:span></text:p>
      <text:h text:style-name="P3" text:outline-level="2"><text:soft-page-break/>6. Chặn Tín hiệu (Blocking Signals)</text:h>
      <text:p text:style-name="P6">Chặn một tín hiệu có nghĩa là yêu cầu kernel giữ nó lại và gửi đi sau. Do tín hiệu có tính bất đồng bộ (có thể đến bất cứ lúc nào), việc chặn tín hiệu là cần thiết trong các trường hợp:</text:p>
      <text:list text:style-name="L6">
        <text:list-item>
          <text:p text:style-name="P18"><text:span text:style-name="T6">Ngăn chặn sự gián đoạn giữa các handler:</text:span><text:span text:style-name="T4"> Một handler có thể bị ngắt bởi một tín hiệu khác. Nếu handler đang thực hiện một thao tác quan trọng, ta cần chặn các tín hiệu khác cho đến khi nó hoàn tất. Điều này có thể làm bằng cách cấu hình </text:span><text:span text:style-name="Source_20_Text"><text:span text:style-name="T4">sa.sa_mask</text:span></text:span><text:span text:style-name="T4"> trong struct </text:span><text:span text:style-name="Source_20_Text"><text:span text:style-name="T4">sigaction</text:span></text:span><text:span text:style-name="T4"> hoặc dùng hàm </text:span><text:span text:style-name="Source_20_Text"><text:span text:style-name="T4">sigprocmask()</text:span></text:span><text:span text:style-name="T4">.</text:span></text:p>
        </text:list-item>
        <text:list-item>
          <text:p text:style-name="P10"><text:span text:style-name="T1">Bảo vệ biến toàn cục:</text:span> Khi thao tác trên các biến toàn cục được chia sẻ giữa chương trình chính và các signal handlers, ta cần chặn tín hiệu để tránh việc dữ liệu bị thay đổi không kiểm soát.</text:p>
        </text:list-item>
      </text:list>
      <text:p text:style-name="P6"><text:span text:style-name="T1">Ví dụ: Chặn và Bỏ chặn (Unblock) tín hiệu</text:span> Khi tín hiệu bị chặn và có tín hiệu gửi đến, nó sẽ bị giữ lại. Ngay sau khi hàm unblock được gọi, tín hiệu đó sẽ lập tức được xử lý.</text:p>
      <table:table table:name="Table3" table:style-name="Table3">
        <table:table-column table:style-name="Table3.A"/>
        <table:table-row>
          <table:table-cell table:style-name="Table3.A1" office:value-type="string">
            <text:p text:style-name="P4">#include &lt;iostream&gt;</text:p>
            <text:p text:style-name="P4">#include &lt;signal.h&gt;</text:p>
            <text:p text:style-name="P4">#include &lt;unistd.h&gt;</text:p>
            <text:p text:style-name="P4">#include &lt;strings.h&gt;</text:p>
            <text:p text:style-name="P4"/>
            <text:p text:style-name="P4">using namespace std;</text:p>
            <text:p text:style-name="P4"/>
            <text:p text:style-name="P4">// Hàm xử lý tín hiệu cho SIGINT</text:p>
            <text:p text:style-name="P4">void signal_handler(int sig){</text:p>
            <text:p text:style-name="P4"><text:s text:c="4"/>if(sig != SIGINT)</text:p>
            <text:p text:style-name="P4"><text:s text:c="8"/>return;</text:p>
            <text:p text:style-name="P4"><text:s text:c="4"/>cout &lt;&lt; "SIGINT caught, Press Ctrl \\ to exit\n";</text:p>
            <text:p text:style-name="P4">}</text:p>
            <text:p text:style-name="P4"/>
            <text:p text:style-name="P4">// Đăng ký hàm xử lý cho SIGINT</text:p>
            <text:p text:style-name="P4">void install_signal_handler(){</text:p>
            <text:p text:style-name="P4"><text:s text:c="4"/>struct sigaction sa;</text:p>
            <text:p text:style-name="P4"><text:s text:c="4"/>bzero(&amp;sa,sizeof(sa));</text:p>
            <text:p text:style-name="P4"><text:s text:c="4"/>sa.sa_handler = &amp;signal_handler;</text:p>
            <text:p text:style-name="P4"><text:s text:c="4"/>sigaction(SIGINT,&amp;sa,NULL);</text:p>
            <text:p text:style-name="P4">}</text:p>
            <text:p text:style-name="P4"><text:soft-page-break/></text:p>
            <text:p text:style-name="P4">// Chặn một tín hiệu</text:p>
            <text:p text:style-name="P4">void block_signal(int sig){</text:p>
            <text:p text:style-name="P4"><text:s text:c="4"/>cout &lt;&lt; "Blocking signal\n";</text:p>
            <text:p text:style-name="P4"><text:s text:c="4"/>sigset_t sigset;</text:p>
            <text:p text:style-name="P4"><text:s text:c="4"/>sigemptyset(&amp;sigset);</text:p>
            <text:p text:style-name="P4"><text:s text:c="4"/>sigaddset(&amp;sigset,sig);</text:p>
            <text:p text:style-name="P4"><text:s text:c="4"/>sigprocmask(SIG_BLOCK,&amp;sigset,NULL);</text:p>
            <text:p text:style-name="P4">}</text:p>
            <text:p text:style-name="P4"/>
            <text:p text:style-name="P4">// Bỏ chặn một tín hiệu</text:p>
            <text:p text:style-name="P4">void unblock_signal(int sig){</text:p>
            <text:p text:style-name="P4"><text:s text:c="4"/>cout &lt;&lt; "Unblocking signal\n";</text:p>
            <text:p text:style-name="P4"><text:s text:c="4"/>sigset_t sigset;</text:p>
            <text:p text:style-name="P4"><text:s text:c="4"/>sigemptyset(&amp;sigset);</text:p>
            <text:p text:style-name="P4"><text:s text:c="4"/>sigaddset(&amp;sigset,sig);</text:p>
            <text:p text:style-name="P4"><text:s text:c="4"/>sigprocmask(SIG_UNBLOCK,&amp;sigset,NULL);</text:p>
            <text:p text:style-name="P4">}</text:p>
            <text:p text:style-name="P4"/>
            <text:p text:style-name="P4">int main(){</text:p>
            <text:p text:style-name="P4"><text:s text:c="4"/>// Đăng ký handler cho SIGINT</text:p>
            <text:p text:style-name="P4"><text:s text:c="4"/>install_signal_handler();</text:p>
            <text:p text:style-name="P4"/>
            <text:p text:style-name="P4"><text:s text:c="4"/>// Chặn SIGINT trong một khoảng thời gian</text:p>
            <text:p text:style-name="P4"><text:s text:c="4"/>block_signal(SIGINT);</text:p>
            <text:p text:style-name="P4"><text:s text:c="4"/>sleep(5); </text:p>
            <text:p text:style-name="P4"><text:s text:c="4"/></text:p>
            <text:p text:style-name="P4"><text:s text:c="4"/>// Bỏ chặn SIGINT sau khi ngủ dậy</text:p>
            <text:p text:style-name="P4"><text:s text:c="4"/>unblock_signal(SIGINT);</text:p>
            <text:p text:style-name="P4"><text:s text:c="4"/></text:p>
            <text:p text:style-name="P4"><text:soft-page-break/><text:s text:c="4"/>while(1);</text:p>
            <text:p text:style-name="P4"><text:s text:c="4"/>return 0;</text:p>
            <text:p text:style-name="P4">}</text:p>
          </table:table-cell>
        </table:table-row>
      </table:table>
      <text:p text:style-name="P6"><text:span text:style-name="T2">Cơ chế hoạt động:</text:span> Trong 5 giây đầu, nếu bạn bấm <text:span text:style-name="Source_20_Text"><text:span text:style-name="T3">Ctrl+C</text:span></text:span>, chương trình không làm gì (tín hiệu bị giữ lại). Sau 5 giây, tín hiệu được bỏ chặn và thông báo <text:span text:style-name="Source_20_Text"><text:span text:style-name="T3">"SIGINT caught..."</text:span></text:span> sẽ lập tức hiện ra.</text:p>
      <text:h text:style-name="P3" text:outline-level="2">7. Kế thừa Tín hiệu trong Đa Tiến Trình (Process) và Đa Luồng (Thread)</text:h>
      <text:p text:style-name="P15"><text:span text:style-name="T6">Đối với Tiến trình (Processes):</text:span><text:span text:style-name="T4"> Khi tạo tiến trình con (qua lệnh </text:span><text:span text:style-name="Source_20_Text"><text:span text:style-name="T4">fork()</text:span></text:span><text:span text:style-name="T4"> hoặc </text:span><text:span text:style-name="Source_20_Text"><text:span text:style-name="T4">clone()</text:span></text:span><text:span text:style-name="T4"> với cờ </text:span><text:span text:style-name="Source_20_Text"><text:span text:style-name="T4">CLONE_SIGHAND</text:span></text:span><text:span text:style-name="T4">), các hàm xử lý tín hiệu (signal handlers) đã được đăng ký ở tiến trình cha sẽ được sao chép sang tiến trình con. Tuy nhiên, </text:span><text:span text:style-name="T6">mặt nạ tín hiệu (signal masks)</text:span><text:span text:style-name="T4"> và </text:span><text:span text:style-name="T6">tập hợp các tín hiệu đang chờ (pending signals)</text:span><text:span text:style-name="T4"> của cha và con là độc lập. Tiến trình con hoàn toàn có thể đăng ký một handler mới để ghi đè lên handler được kế thừa.</text:span></text:p>
      <text:p text:style-name="P12">Ví dụ kế thừa trong fork():</text:p>
      <table:table table:name="Table4" table:style-name="Table4">
        <table:table-column table:style-name="Table4.A"/>
        <table:table-row>
          <table:table-cell table:style-name="Table4.A1" office:value-type="string">
            <text:p text:style-name="P4">#include &lt;iostream&gt;</text:p>
            <text:p text:style-name="P4">#include &lt;signal.h&gt;</text:p>
            <text:p text:style-name="P4">#include &lt;unistd.h&gt;</text:p>
            <text:p text:style-name="P4">#include &lt;sys/wait.h&gt;</text:p>
            <text:p text:style-name="P4">#include &lt;strings.h&gt;</text:p>
            <text:p text:style-name="P4"/>
            <text:p text:style-name="P4">using namespace std;</text:p>
            <text:p text:style-name="P4"/>
            <text:p text:style-name="P4">void install_signal_handler();</text:p>
            <text:p text:style-name="P4">void signal_handler(int sig);</text:p>
            <text:p text:style-name="P4"/>
            <text:p text:style-name="P4">int main(){</text:p>
            <text:p text:style-name="P4"><text:s text:c="4"/>install_signal_handler(); // Cài đặt cho tiến trình cha</text:p>
            <text:p text:style-name="P4"><text:s text:c="4"/>int pid = fork();</text:p>
            <text:p text:style-name="P4"><text:s text:c="4"/></text:p>
            <text:p text:style-name="P4"><text:s text:c="4"/>if (pid &lt; 0){</text:p>
            <text:p text:style-name="P4"><text:s text:c="8"/>cout &lt;&lt; "Error creating child process\n";</text:p>
            <text:p text:style-name="P4"><text:s text:c="8"/>exit(1);</text:p>
            <text:p text:style-name="P4"><text:s text:c="4"/>} else if (pid == 0){</text:p>
            <text:p text:style-name="P4"><text:soft-page-break/><text:s text:c="8"/>// Tiến trình con kế thừa handler của cha</text:p>
            <text:p text:style-name="P4"><text:s text:c="8"/>cout &lt;&lt; "In Child Process, pid: " &lt;&lt; getpid() &lt;&lt; "\n";</text:p>
            <text:p text:style-name="P4"><text:s text:c="8"/>while(1); // Để user thử lệnh kill -2 &lt;childPID&gt;</text:p>
            <text:p text:style-name="P4"><text:s text:c="8"/>exit(0);</text:p>
            <text:p text:style-name="P4"><text:s text:c="4"/>} else {</text:p>
            <text:p text:style-name="P4"><text:s text:c="8"/>int status;</text:p>
            <text:p text:style-name="P4"><text:s text:c="8"/>wait(&amp;status);</text:p>
            <text:p text:style-name="P4"><text:s text:c="8"/>cout &lt;&lt; "Parent process exiting now\n";</text:p>
            <text:p text:style-name="P4"><text:s text:c="4"/>}</text:p>
            <text:p text:style-name="P4"><text:s text:c="4"/>return 0;</text:p>
            <text:p text:style-name="P4">}</text:p>
            <text:p text:style-name="P4"/>
            <text:p text:style-name="P4">void signal_handler(int sig){</text:p>
            <text:p text:style-name="P4"><text:s text:c="4"/>if(sig != SIGINT)</text:p>
            <text:p text:style-name="P4"><text:s text:c="8"/>return;</text:p>
            <text:p text:style-name="P4"><text:s text:c="4"/>cout &lt;&lt; "SIGINT caught, try kill -9 " &lt;&lt; getpid() &lt;&lt; " to terminate\n";</text:p>
            <text:p text:style-name="P4">}</text:p>
            <text:p text:style-name="P4"/>
            <text:p text:style-name="P4">void install_signal_handler(){</text:p>
            <text:p text:style-name="P4"><text:s text:c="4"/>struct sigaction sa;</text:p>
            <text:p text:style-name="P4"><text:s text:c="4"/>bzero(&amp;sa,sizeof(sa));</text:p>
            <text:p text:style-name="P4"><text:s text:c="4"/>sa.sa_handler = &amp;signal_handler;</text:p>
            <text:p text:style-name="P4"><text:s text:c="4"/>sigaction(SIGINT,&amp;sa,NULL);</text:p>
            <text:p text:style-name="P4">}</text:p>
          </table:table-cell>
        </table:table-row>
      </table:table>
      <text:p text:style-name="P2"><text:span text:style-name="T1">Đối với Luồng (Threads):</text:span> Trong môi trường đa luồng (Multi-threading), tất cả các luồng trong cùng một tiến trình dùng chung cấu hình các hàm xử lý tín hiệu (signal handlers), nhưng mỗi luồng lại duy trì một cấu hình chặn tín hiệu (signal masking/blocking) riêng biệt của mìn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6T08:11:50.740344224</meta:creation-date>
    <dc:date>2026-04-07T10:50:55.027357374</dc:date>
    <meta:editing-duration>PT12M1S</meta:editing-duration>
    <meta:editing-cycles>11</meta:editing-cycles>
    <meta:generator>LibreOffice/24.2.7.2$Linux_X86_64 LibreOffice_project/420$Build-2</meta:generator>
    <meta:document-statistic meta:table-count="4" meta:image-count="0" meta:object-count="0" meta:page-count="7" meta:paragraph-count="161" meta:word-count="1518" meta:character-count="8502" meta:non-whitespace-character-count="6859"/>
  </office:meta>
</office:document-meta>
</file>