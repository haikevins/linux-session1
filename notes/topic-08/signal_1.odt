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2597in"/>
    </style:style>
    <style:style style:name="Table1.B" style:family="table-column">
      <style:table-column-properties style:column-width="1.2868in"/>
    </style:style>
    <style:style style:name="Table1.C" style:family="table-column">
      <style:table-column-properties style:column-width="1.4604in"/>
    </style:style>
    <style:style style:name="Table1.D" style:family="table-column">
      <style:table-column-properties style:column-width="2.9139in"/>
    </style:style>
    <style:style style:name="Table1.E" style:family="table-column">
      <style:table-column-properties style:column-width="0.7722in"/>
    </style:style>
    <style:style style:name="Table1.A1" style:family="table-cell">
      <style:table-cell-properties style:vertical-align="middle" fo:padding="0.0194in" fo:border="none"/>
    </style:style>
    <style:style style:name="Table1.E16" style:family="table-cell">
      <style:table-cell-properties fo:padding="0.0194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P1"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 style:family="paragraph" style:parent-style-name="Table_20_Heading">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 style:family="paragraph" style:parent-style-name="Heading_20_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5"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6"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7" style:family="paragraph" style:parent-style-name="Heading_20_2">
      <style:paragraph-properties fo:margin-top="0.0598in" fo:margin-bottom="0.0598in" style:contextual-spacing="false" fo:line-height="100%" fo:text-align="justify" style:justify-single-word="false"/>
      <style:text-properties style:font-name="Liberation Serif" fo:font-size="13pt" officeooo:paragraph-rsid="00135b33" style:font-size-asian="13pt" style:font-size-complex="13pt"/>
    </style:style>
    <style:style style:name="P8" style:family="paragraph" style:parent-style-name="Text_20_body">
      <style:paragraph-properties fo:margin-top="0.0598in" fo:margin-bottom="0.0598in" style:contextual-spacing="false" fo:line-height="100%" fo:text-align="justify" style:justify-single-word="false"/>
      <style:text-properties style:font-name="Liberation Serif" fo:font-size="13pt" officeooo:paragraph-rsid="00135b33" style:font-size-asian="13pt" style:font-size-complex="13pt"/>
    </style:style>
    <style:style style:name="P9" style:family="paragraph" style:parent-style-name="Heading_20_2">
      <style:paragraph-properties fo:margin-top="0.0598in" fo:margin-bottom="0.0598in" style:contextual-spacing="false" fo:line-height="100%"/>
      <style:text-properties style:font-name="Liberation Serif" fo:font-size="13pt" style:font-size-asian="13pt" style:font-size-complex="13pt"/>
    </style:style>
    <style:style style:name="P10" style:family="paragraph" style:parent-style-name="Table_20_Contents">
      <style:paragraph-properties fo:margin-top="0.0598in" fo:margin-bottom="0.0598in" style:contextual-spacing="false" fo:line-height="100%"/>
      <style:text-properties style:font-name="Liberation Serif" fo:font-size="13pt" style:font-size-asian="13pt" style:font-size-complex="13pt"/>
    </style:style>
    <style:style style:name="P11" style:family="paragraph" style:parent-style-name="Text_20_body">
      <style:paragraph-properties fo:margin-top="0.0598in" fo:margin-bottom="0.0598in" style:contextual-spacing="false" fo:line-height="100%"/>
      <style:text-properties style:font-name="Liberation Serif" fo:font-size="13pt" officeooo:paragraph-rsid="0021fb16" style:font-size-asian="13pt" style:font-size-complex="13pt"/>
    </style:style>
    <style:style style:name="P12" style:family="paragraph" style:parent-style-name="Text_20_body">
      <style:paragraph-properties fo:margin-top="0.0598in" fo:margin-bottom="0.0598in" style:contextual-spacing="false" fo:line-height="100%"/>
      <style:text-properties style:font-name="Liberation Serif" fo:font-size="13pt" officeooo:paragraph-rsid="002a2d6d" style:font-size-asian="13pt" style:font-size-complex="13pt"/>
    </style:style>
    <style:style style:name="P13" style:family="paragraph" style:parent-style-name="Heading_20_2">
      <style:paragraph-properties fo:margin-top="0.0598in" fo:margin-bottom="0.0598in" style:contextual-spacing="false" fo:line-height="100%"/>
      <style:text-properties style:font-name="Liberation Serif" fo:font-size="13pt" fo:font-weight="normal" officeooo:paragraph-rsid="0019d45c" style:font-size-asian="13pt" style:font-weight-asian="normal" style:font-size-complex="13pt" style:font-weight-complex="normal"/>
    </style:style>
    <style:style style:name="P14" style:family="paragraph" style:parent-style-name="Text_20_body">
      <style:paragraph-properties fo:margin-top="0.0598in" fo:margin-bottom="0.0598in" style:contextual-spacing="false" fo:line-height="100%"/>
      <style:text-properties style:font-name="Liberation Serif" fo:font-size="13pt" fo:font-weight="normal" officeooo:paragraph-rsid="0019d45c" style:font-size-asian="13pt" style:font-weight-asian="normal" style:font-size-complex="13pt" style:font-weight-complex="normal"/>
    </style:style>
    <style:style style:name="P15" style:family="paragraph" style:parent-style-name="Heading_20_2">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16" style:family="paragraph" style:parent-style-name="Table_20_Contents">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17" style:family="paragraph" style:parent-style-name="Text_20_body">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18" style:family="paragraph" style:parent-style-name="Preformatted_20_Text">
      <style:paragraph-properties fo:margin-left="0in" fo:margin-right="0in" fo:margin-top="0.0598in" fo:margin-bottom="0.0598in" style:contextual-spacing="false" fo:line-height="100%" fo:text-indent="0in" style:auto-text-indent="false"/>
      <style:text-properties style:font-name="Liberation Serif" fo:font-size="13pt" fo:font-weight="normal" officeooo:paragraph-rsid="00255de4" style:font-size-asian="13pt" style:font-weight-asian="normal" style:font-size-complex="13pt" style:font-weight-complex="normal"/>
    </style:style>
    <style:style style:name="P19" style:family="paragraph" style:parent-style-name="Preformatted_20_Text">
      <style:paragraph-properties fo:margin-left="0in" fo:margin-right="0in" fo:margin-top="0.0598in" fo:margin-bottom="0.0598in" style:contextual-spacing="false" fo:line-height="100%" fo:text-indent="0in" style:auto-text-indent="false"/>
      <style:text-properties style:font-name="Liberation Serif" fo:font-size="13pt" fo:font-weight="normal" officeooo:paragraph-rsid="0022f578" style:font-size-asian="13pt" style:font-weight-asian="normal" style:font-size-complex="13pt" style:font-weight-complex="normal"/>
    </style:style>
    <style:style style:name="P20" style:family="paragraph" style:parent-style-name="Preformatted_20_Text">
      <style:paragraph-properties fo:margin-left="0in" fo:margin-right="0in" fo:margin-top="0.0598in" fo:margin-bottom="0.0598in" style:contextual-spacing="false" fo:line-height="100%" fo:text-indent="0in" style:auto-text-indent="false"/>
      <style:text-properties style:font-name="Liberation Serif" fo:font-size="13pt" fo:font-weight="normal" style:font-size-asian="13pt" style:font-weight-asian="normal" style:font-size-complex="13pt" style:font-weight-complex="normal"/>
    </style:style>
    <style:style style:name="P21"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2" style:family="paragraph" style:parent-style-name="Text_20_body">
      <style:paragraph-properties fo:margin-top="0.0598in" fo:margin-bottom="0.0598in" style:contextual-spacing="false" fo:line-height="100%"/>
      <style:text-properties style:font-name="Liberation Serif" fo:font-size="13pt" fo:font-weight="normal" officeooo:paragraph-rsid="0017c254" style:font-size-asian="13pt" style:font-weight-asian="normal" style:font-size-complex="13pt" style:font-weight-complex="normal"/>
    </style:style>
    <style:style style:name="P23" style:family="paragraph" style:parent-style-name="Standard" style:master-page-name="">
      <style:paragraph-properties fo:margin-top="0.0598in" fo:margin-bottom="0.0598in" style:contextual-spacing="false" fo:line-height="100%" fo:text-align="justify" style:justify-single-word="false" style:page-number="auto"/>
    </style:style>
    <style:style style:name="P24" style:family="paragraph" style:parent-style-name="Table_20_Contents">
      <style:paragraph-properties fo:margin-top="0.0598in" fo:margin-bottom="0.0598in" style:contextual-spacing="false" fo:line-height="100%" fo:text-align="justify" style:justify-single-word="false"/>
    </style:style>
    <style:style style:name="P25" style:family="paragraph" style:parent-style-name="Text_20_body">
      <style:paragraph-properties fo:margin-top="0.0598in" fo:margin-bottom="0.0598in" style:contextual-spacing="false" fo:line-height="100%" fo:text-align="justify" style:justify-single-word="false"/>
    </style:style>
    <style:style style:name="P26" style:family="paragraph" style:parent-style-name="Heading_20_2">
      <style:paragraph-properties fo:margin-top="0.0598in" fo:margin-bottom="0.0598in" style:contextual-spacing="false" fo:line-height="100%" fo:text-align="justify" style:justify-single-word="false"/>
    </style:style>
    <style:style style:name="P27" style:family="paragraph" style:parent-style-name="Heading_20_3">
      <style:paragraph-properties fo:margin-top="0.0598in" fo:margin-bottom="0.0598in" style:contextual-spacing="false" fo:line-height="100%" fo:text-align="justify" style:justify-single-word="false"/>
    </style:style>
    <style:style style:name="P28" style:family="paragraph" style:parent-style-name="Text_20_body">
      <style:paragraph-properties fo:margin-top="0.0598in" fo:margin-bottom="0.0598in" style:contextual-spacing="false" fo:line-height="100%"/>
    </style:style>
    <style:style style:name="P29" style:family="paragraph" style:parent-style-name="Text_20_body">
      <style:paragraph-properties fo:margin-top="0.0598in" fo:margin-bottom="0.0598in" style:contextual-spacing="false" fo:line-height="100%"/>
      <style:text-properties officeooo:paragraph-rsid="0021fb16"/>
    </style:style>
    <style:style style:name="P30" style:family="paragraph" style:parent-style-name="Text_20_body">
      <style:paragraph-properties fo:margin-top="0.0598in" fo:margin-bottom="0.0598in" style:contextual-spacing="false" fo:line-height="100%"/>
      <style:text-properties officeooo:paragraph-rsid="002a2d6d"/>
    </style:style>
    <style:style style:name="P31" style:family="paragraph" style:parent-style-name="Text_20_body" style:list-style-name="L1">
      <style:paragraph-properties fo:margin-top="0.0598in" fo:margin-bottom="0.0598in" style:contextual-spacing="false" fo:line-height="100%" fo:text-align="justify" style:justify-single-word="false"/>
    </style:style>
    <style:style style:name="P32" style:family="paragraph" style:parent-style-name="Text_20_body" style:list-style-name="L2">
      <style:paragraph-properties fo:margin-top="0.0598in" fo:margin-bottom="0.0598in" style:contextual-spacing="false" fo:line-height="100%" fo:text-align="justify" style:justify-single-word="false"/>
    </style:style>
    <style:style style:name="P33" style:family="paragraph" style:parent-style-name="Text_20_body" style:list-style-name="L3">
      <style:paragraph-properties fo:margin-top="0.0598in" fo:margin-bottom="0.0598in" style:contextual-spacing="false" fo:line-height="100%" fo:text-align="justify" style:justify-single-word="false"/>
    </style:style>
    <style:style style:name="P34" style:family="paragraph" style:parent-style-name="Text_20_body" style:list-style-name="L4">
      <style:paragraph-properties fo:margin-top="0.0598in" fo:margin-bottom="0.0598in" style:contextual-spacing="false" fo:line-height="100%" fo:text-align="justify" style:justify-single-word="false"/>
    </style:style>
    <style:style style:name="P35" style:family="paragraph" style:parent-style-name="Text_20_body" style:list-style-name="L5">
      <style:paragraph-properties fo:margin-top="0.0598in" fo:margin-bottom="0.0598in" style:contextual-spacing="false" fo:line-height="100%" fo:text-align="justify" style:justify-single-word="false"/>
    </style:style>
    <style:style style:name="P36" style:family="paragraph" style:parent-style-name="Text_20_body" style:list-style-name="L6">
      <style:paragraph-properties fo:margin-top="0.0598in" fo:margin-bottom="0.0598in" style:contextual-spacing="false" fo:line-height="100%" fo:text-align="justify" style:justify-single-word="false"/>
    </style:style>
    <style:style style:name="P37" style:family="paragraph" style:parent-style-name="Text_20_body" style:list-style-name="L7">
      <style:paragraph-properties fo:margin-top="0.0598in" fo:margin-bottom="0.0598in" style:contextual-spacing="false" fo:line-height="100%" fo:text-align="justify" style:justify-single-word="false"/>
    </style:style>
    <style:style style:name="P38" style:family="paragraph" style:parent-style-name="Text_20_body" style:list-style-name="L8">
      <style:paragraph-properties fo:margin-top="0.0598in" fo:margin-bottom="0.0598in" style:contextual-spacing="false" fo:line-height="100%"/>
    </style:style>
    <style:style style:name="P39" style:family="paragraph" style:parent-style-name="Text_20_body" style:list-style-name="L8">
      <style:paragraph-properties fo:margin-top="0.0598in" fo:margin-bottom="0.0598in" style:contextual-spacing="false" fo:line-height="100%"/>
      <style:text-properties officeooo:paragraph-rsid="0019d45c"/>
    </style:style>
    <style:style style:name="P40" style:family="paragraph" style:parent-style-name="Text_20_body" style:list-style-name="L9">
      <style:paragraph-properties fo:margin-top="0.0598in" fo:margin-bottom="0.0598in" style:contextual-spacing="false" fo:line-height="100%"/>
    </style:style>
    <style:style style:name="P41" style:family="paragraph" style:parent-style-name="Text_20_body" style:list-style-name="L15">
      <style:paragraph-properties fo:margin-top="0.0598in" fo:margin-bottom="0.0598in" style:contextual-spacing="false" fo:line-height="100%"/>
    </style:style>
    <style:style style:name="P42" style:family="paragraph" style:parent-style-name="Text_20_body" style:list-style-name="L1">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3" style:family="paragraph" style:parent-style-name="Text_20_body" style:list-style-name="L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4" style:family="paragraph" style:parent-style-name="Text_20_body" style:list-style-name="L10">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45" style:family="paragraph" style:parent-style-name="Text_20_body" style:list-style-name="L11">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46" style:family="paragraph" style:parent-style-name="Text_20_body" style:list-style-name="L12">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47" style:family="paragraph" style:parent-style-name="Text_20_body" style:list-style-name="L13">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48" style:family="paragraph" style:parent-style-name="Text_20_body" style:list-style-name="L14">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49" style:family="paragraph" style:parent-style-name="Text_20_body" style:list-style-name="L16">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50" style:family="paragraph" style:parent-style-name="Text_20_body" style:list-style-name="L17">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51" style:family="paragraph" style:parent-style-name="Text_20_body" style:list-style-name="L18">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52" style:family="paragraph" style:parent-style-name="Text_20_body" style:list-style-name="L19">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53" style:family="paragraph" style:parent-style-name="Text_20_body" style:list-style-name="L20">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P54" style:family="paragraph" style:parent-style-name="Text_20_body" style:list-style-name="L21">
      <style:paragraph-properties fo:margin-top="0.0598in" fo:margin-bottom="0.0598in" style:contextual-spacing="false" fo:line-height="100%"/>
      <style:text-properties style:font-name="Liberation Serif" fo:font-size="13pt" fo:font-weight="normal" style:font-size-asian="13pt" style:font-weight-asian="normal" style:font-size-complex="13pt" style:font-weight-complex="normal"/>
    </style:style>
    <style:style style:name="T1" style:family="text">
      <style:text-properties fo:font-weight="bold"/>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bold" style:font-size-asian="13pt" style:font-size-complex="13pt"/>
    </style:style>
    <style:style style:name="T4" style:family="text">
      <style:text-properties style:font-name="Liberation Serif" fo:font-size="13pt" fo:font-weight="normal" style:font-size-asian="13pt" style:font-weight-asian="normal" style:font-size-complex="13pt" style:font-weight-complex="normal"/>
    </style:style>
    <style:style style:name="T5" style:family="text">
      <style:text-properties style:font-name="Liberation Serif" fo:font-size="13pt" style:text-underline-style="solid" style:text-underline-width="auto" style:text-underline-color="font-color" fo:font-weight="normal" style:font-size-asian="13pt" style:font-weight-asian="normal" style:font-size-complex="13pt" style:font-weight-complex="normal"/>
    </style:style>
    <style:style style:name="T6" style:family="text">
      <style:text-properties style:font-name="Liberation Serif" fo:font-style="italic"/>
    </style:style>
    <style:style style:name="T7" style:family="text">
      <style:text-properties fo:font-style="italic"/>
    </style:style>
    <style:style style:name="T8" style:family="text">
      <style:text-properties officeooo:rsid="0017c254"/>
    </style:style>
    <style:style style:name="T9" style:family="text">
      <style:text-properties fo:font-weight="normal" style:font-weight-asian="normal" style:font-weight-complex="normal"/>
    </style:style>
    <style:style style:name="T10" style:family="text">
      <style:text-properties officeooo:rsid="001ff76c"/>
    </style:style>
    <style:style style:name="T11" style:family="text">
      <style:text-properties officeooo:rsid="0021fb16"/>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ff76c"/>
    </style:style>
    <style:style style:name="T14"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Nguồn tham khảo: </text:span><text:a xlink:type="simple" xlink:href="https://faculty.cs.niu.edu/~hutchins/csci480/signals.htm" text:style-name="Internet_20_link" text:visited-style-name="Visited_20_Internet_20_Link"><text:span text:style-name="T2">https://faculty.cs.niu.edu/~hutchins/csci480/signals.htm</text:span></text:a></text:p>
      <text:h text:style-name="P3" text:outline-level="2">1. Tổng quan về Tín hiệu (Signals)</text:h>
      <text:p text:style-name="P1">Trong lập trình Linux, tín hiệu (signal) là một dạng ngắt (thường là ngắt phần mềm) được sử dụng để thông báo cho một tiến trình (process) về các sự kiện bất đồng bộ. Số lượng tín hiệu trong hệ thống là hữu hạn (ví dụ: 64 tín hiệu) và lập trình viên không thể tự phát minh ra tín hiệu mới mà phải sử dụng danh sách có sẵn.</text:p>
      <text:p text:style-name="P1">Tên của các tín hiệu trong Linux luôn bắt đầu bằng tiền tố <text:span text:style-name="T1">"SIG"</text:span>. Mặc dù mỗi tín hiệu đều được đánh số, chúng ta thường gọi chúng bằng tên để dễ nhận diện. Một số tín hiệu phổ biến bao gồm:</text:p>
      <text:list text:style-name="L1">
        <text:list-item>
          <text:p text:style-name="P31"><text:span text:style-name="T3">SIGINT:</text:span><text:span text:style-name="T2"> Được tạo ra khi người dùng nhấn </text:span><text:span text:style-name="Source_20_Text"><text:span text:style-name="T2">Ctrl-C</text:span></text:span><text:span text:style-name="T2">, dùng để chấm dứt chương trình từ terminal.</text:span></text:p>
        </text:list-item>
        <text:list-item>
          <text:p text:style-name="P31"><text:span text:style-name="T3">SIGALRM:</text:span><text:span text:style-name="T2"> Được phát ra khi bộ đếm thời gian (cài đặt bởi hàm </text:span><text:span text:style-name="Source_20_Text"><text:span text:style-name="T2">alarm</text:span></text:span><text:span text:style-name="T2">) kết thúc.</text:span></text:p>
        </text:list-item>
        <text:list-item>
          <text:p text:style-name="P31"><text:span text:style-name="T3">SIGABRT:</text:span><text:span text:style-name="T2"> Phát sinh khi tiến trình thực thi hàm </text:span><text:span text:style-name="Source_20_Text"><text:span text:style-name="T2">abort</text:span></text:span><text:span text:style-name="T2">.</text:span></text:p>
        </text:list-item>
        <text:list-item>
          <text:p text:style-name="P42"><text:span text:style-name="T1">SIGSTOP:</text:span> Yêu cầu Linux tạm dừng (pause) một tiến trình để tiếp tục sau.</text:p>
        </text:list-item>
        <text:list-item>
          <text:p text:style-name="P42"><text:span text:style-name="T1">SIGCONT:</text:span> Yêu cầu Linux tiếp tục chạy một tiến trình đã bị tạm dừng trước đó.</text:p>
        </text:list-item>
        <text:list-item>
          <text:p text:style-name="P42"><text:span text:style-name="T1">SIGSEGV:</text:span> Được gửi đến tiến trình khi nó gặp lỗi phân trang bộ nhớ (segmentation fault).</text:p>
        </text:list-item>
        <text:list-item>
          <text:p text:style-name="P42"><text:span text:style-name="T1">SIGKILL:</text:span> Buộc tiến trình phải chấm dứt ngay lập tức (không thể bỏ qua hoặc xử lý).</text:p>
        </text:list-item>
      </text:list>
      <text:h text:style-name="P3" text:outline-level="2">2. Vòng đời và Cơ chế Xử lý Tín hiệu (Signal Disposition)</text:h>
      <text:p text:style-name="P1">Khi một tín hiệu xuất hiện, tiến trình nhận được bắt buộc phải có phương án xử lý. Mỗi tín hiệu đều có một "khuynh hướng xử lý hiện tại" (disposition) quy định hành động nào sẽ được thực thi. Có ba kịch bản chính xảy ra:</text:p>
      <text:list text:style-name="L2">
        <text:list-item>
          <text:p text:style-name="P32"><text:span text:style-name="T3">Bỏ qua (Ignore):</text:span><text:span text:style-name="T2"> Rất nhiều tín hiệu có thể bị hệ thống hoặc lập trình viên bỏ qua. Tuy nhiên, các ngoại lệ phần cứng như "chia cho 0" (với số nguyên) hoặc tín hiệu đặc quyền như </text:span><text:span text:style-name="Source_20_Text"><text:span text:style-name="T2">SIGKILL</text:span></text:span><text:span text:style-name="T2"> thì không thể bị bỏ qua.</text:span></text:p>
        </text:list-item>
        <text:list-item>
          <text:p text:style-name="P43"><text:span text:style-name="T1">Bắt và Xử lý (Catch and Handle):</text:span> Tiến trình có thể định nghĩa một hàm tùy chỉnh (hàm xử lý tín hiệu - signal handler). Khi tín hiệu xảy ra, hàm này sẽ được gọi. Nó có thể giúp chương trình kết thúc một cách an toàn (graceful shutdown) hoặc xử lý sự cố để chương trình tiếp tục chạy.</text:p>
        </text:list-item>
        <text:list-item>
          <text:p text:style-name="P43"><text:span text:style-name="T1">Hành động Mặc định (Default Action):</text:span> Nếu không có chỉ định nào khác, hệ thống sẽ áp dụng hành động mặc định của tín hiệu đó. Các hành động mặc định có thể là:</text:p>
          <text:list>
            <text:list-item>
              <text:p text:style-name="P43">Bỏ qua (Ignore).</text:p>
            </text:list-item>
            <text:list-item>
              <text:p text:style-name="P43">Chấm dứt tiến trình (Terminate).</text:p>
            </text:list-item>
            <text:list-item>
              <text:p text:style-name="P43">Chấm dứt và xuất lõi bộ nhớ để gỡ lỗi (Dump core).</text:p>
            </text:list-item>
            <text:list-item>
              <text:p text:style-name="P43">Dừng hoặc tạm dừng chương trình (Stop/Pause).</text:p>
            </text:list-item>
            <text:list-item>
              <text:p text:style-name="P43"><text:soft-page-break/>Tiếp tục chương trình đã tạm dừng (Resume).</text:p>
            </text:list-item>
          </text:list>
        </text:list-item>
      </text:list>
      <text:p text:style-name="P1"><text:span text:style-name="T7">Lưu ý về đa luồng:</text:span> Nếu chương trình có nhiều luồng (threads), cơ chế xử lý (disposition) của một tín hiệu sẽ được áp dụng chung cho toàn bộ các luồng.</text:p>
      <text:h text:style-name="P3" text:outline-level="2">3. Danh sách các Tín hiệu Tiêu chuẩn</text:h>
      <text:p text:style-name="P1">Linux chuẩn hóa 31 tín hiệu đầu tiên, phần lớn tuân thủ tiêu chuẩn POSIX. Dưới đây là bảng tổng hợp các tín hiệu cơ bản, hành động mặc định và ý nghĩa của chúng:</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Số</text:p>
            </table:table-cell>
            <table:table-cell table:style-name="Table1.A1" office:value-type="string">
              <text:p text:style-name="P2">Tên Tín hiệu</text:p>
            </table:table-cell>
            <table:table-cell table:style-name="Table1.A1" office:value-type="string">
              <text:p text:style-name="P2">Hành động Mặc định</text:p>
            </table:table-cell>
            <table:table-cell table:style-name="Table1.A1" office:value-type="string">
              <text:p text:style-name="P2">Ý nghĩa / Bình luận</text:p>
            </table:table-cell>
            <table:table-cell table:style-name="Table1.A1" office:value-type="string">
              <text:p text:style-name="P2">POSIX</text:p>
            </table:table-cell>
          </table:table-row>
        </table:table-header-rows>
        <table:table-row>
          <table:table-cell table:style-name="Table1.A1" office:value-type="string">
            <text:p text:style-name="P6">1</text:p>
          </table:table-cell>
          <table:table-cell table:style-name="Table1.A1" office:value-type="string">
            <text:p text:style-name="P6">SIGHUP</text:p>
          </table:table-cell>
          <table:table-cell table:style-name="Table1.A1" office:value-type="string">
            <text:p text:style-name="P6">Terminate</text:p>
          </table:table-cell>
          <table:table-cell table:style-name="Table1.A1" office:value-type="string">
            <text:p text:style-name="P6">Ngắt kết nối terminal điều khiển hoặc tiến trình</text:p>
          </table:table-cell>
          <table:table-cell table:style-name="Table1.A1" office:value-type="string">
            <text:p text:style-name="P6">Có</text:p>
          </table:table-cell>
        </table:table-row>
        <table:table-row>
          <table:table-cell table:style-name="Table1.A1" office:value-type="string">
            <text:p text:style-name="P6">2</text:p>
          </table:table-cell>
          <table:table-cell table:style-name="Table1.A1" office:value-type="string">
            <text:p text:style-name="P6">SIGINT</text:p>
          </table:table-cell>
          <table:table-cell table:style-name="Table1.A1" office:value-type="string">
            <text:p text:style-name="P6">Terminate</text:p>
          </table:table-cell>
          <table:table-cell table:style-name="Table1.A1" office:value-type="string">
            <text:p text:style-name="P24"><text:span text:style-name="T2">Ngắt từ bàn phím (</text:span><text:span text:style-name="Source_20_Text"><text:span text:style-name="T2">Ctrl-C</text:span></text:span><text:span text:style-name="T2">)</text:span></text:p>
          </table:table-cell>
          <table:table-cell table:style-name="Table1.A1" office:value-type="string">
            <text:p text:style-name="P6">Có</text:p>
          </table:table-cell>
        </table:table-row>
        <table:table-row>
          <table:table-cell table:style-name="Table1.A1" office:value-type="string">
            <text:p text:style-name="P6">3</text:p>
          </table:table-cell>
          <table:table-cell table:style-name="Table1.A1" office:value-type="string">
            <text:p text:style-name="P6">SIGQUIT</text:p>
          </table:table-cell>
          <table:table-cell table:style-name="Table1.A1" office:value-type="string">
            <text:p text:style-name="P6">Dump</text:p>
          </table:table-cell>
          <table:table-cell table:style-name="Table1.A1" office:value-type="string">
            <text:p text:style-name="P24"><text:span text:style-name="T2">Thoát từ bàn phím (</text:span><text:span text:style-name="Source_20_Text"><text:span text:style-name="T2">Ctrl-\</text:span></text:span><text:span text:style-name="T2">)</text:span></text:p>
          </table:table-cell>
          <table:table-cell table:style-name="Table1.A1" office:value-type="string">
            <text:p text:style-name="P6">Có</text:p>
          </table:table-cell>
        </table:table-row>
        <table:table-row>
          <table:table-cell table:style-name="Table1.A1" office:value-type="string">
            <text:p text:style-name="P6">4</text:p>
          </table:table-cell>
          <table:table-cell table:style-name="Table1.A1" office:value-type="string">
            <text:p text:style-name="P6">SIGILL</text:p>
          </table:table-cell>
          <table:table-cell table:style-name="Table1.A1" office:value-type="string">
            <text:p text:style-name="P6">Dump</text:p>
          </table:table-cell>
          <table:table-cell table:style-name="Table1.A1" office:value-type="string">
            <text:p text:style-name="P6">Lệnh thực thi không hợp lệ</text:p>
          </table:table-cell>
          <table:table-cell table:style-name="Table1.A1" office:value-type="string">
            <text:p text:style-name="P6">Có</text:p>
          </table:table-cell>
        </table:table-row>
        <table:table-row>
          <table:table-cell table:style-name="Table1.A1" office:value-type="string">
            <text:p text:style-name="P6">6</text:p>
          </table:table-cell>
          <table:table-cell table:style-name="Table1.A1" office:value-type="string">
            <text:p text:style-name="P6">SIGABRT/SIGIOT</text:p>
          </table:table-cell>
          <table:table-cell table:style-name="Table1.A1" office:value-type="string">
            <text:p text:style-name="P6">Dump</text:p>
          </table:table-cell>
          <table:table-cell table:style-name="Table1.A1" office:value-type="string">
            <text:p text:style-name="P6">Kết thúc bất thường</text:p>
          </table:table-cell>
          <table:table-cell table:style-name="Table1.A1" office:value-type="string">
            <text:p text:style-name="P6">Có/Không</text:p>
          </table:table-cell>
        </table:table-row>
        <table:table-row>
          <table:table-cell table:style-name="Table1.A1" office:value-type="string">
            <text:p text:style-name="P6">8</text:p>
          </table:table-cell>
          <table:table-cell table:style-name="Table1.A1" office:value-type="string">
            <text:p text:style-name="P6">SIGFPE</text:p>
          </table:table-cell>
          <table:table-cell table:style-name="Table1.A1" office:value-type="string">
            <text:p text:style-name="P6">Dump</text:p>
          </table:table-cell>
          <table:table-cell table:style-name="Table1.A1" office:value-type="string">
            <text:p text:style-name="P6">Lỗi dấu phẩy động (Floating-point)</text:p>
          </table:table-cell>
          <table:table-cell table:style-name="Table1.A1" office:value-type="string">
            <text:p text:style-name="P6">Có</text:p>
          </table:table-cell>
        </table:table-row>
        <table:table-row>
          <table:table-cell table:style-name="Table1.A1" office:value-type="string">
            <text:p text:style-name="P6">9</text:p>
          </table:table-cell>
          <table:table-cell table:style-name="Table1.A1" office:value-type="string">
            <text:p text:style-name="P6">SIGKILL</text:p>
          </table:table-cell>
          <table:table-cell table:style-name="Table1.A1" office:value-type="string">
            <text:p text:style-name="P6">Terminate</text:p>
          </table:table-cell>
          <table:table-cell table:style-name="Table1.A1" office:value-type="string">
            <text:p text:style-name="P6">Ép buộc kết thúc tiến trình</text:p>
          </table:table-cell>
          <table:table-cell table:style-name="Table1.A1" office:value-type="string">
            <text:p text:style-name="P6">Có</text:p>
          </table:table-cell>
        </table:table-row>
        <table:table-row>
          <table:table-cell table:style-name="Table1.A1" office:value-type="string">
            <text:p text:style-name="P6">10</text:p>
          </table:table-cell>
          <table:table-cell table:style-name="Table1.A1" office:value-type="string">
            <text:p text:style-name="P6">SIGUSR1</text:p>
          </table:table-cell>
          <table:table-cell table:style-name="Table1.A1" office:value-type="string">
            <text:p text:style-name="P6">Terminate</text:p>
          </table:table-cell>
          <table:table-cell table:style-name="Table1.A1" office:value-type="string">
            <text:p text:style-name="P6">Dành cho lập trình viên tùy biến</text:p>
          </table:table-cell>
          <table:table-cell table:style-name="Table1.A1" office:value-type="string">
            <text:p text:style-name="P6">Có</text:p>
          </table:table-cell>
        </table:table-row>
        <table:table-row>
          <table:table-cell table:style-name="Table1.A1" office:value-type="string">
            <text:p text:style-name="P6">11</text:p>
          </table:table-cell>
          <table:table-cell table:style-name="Table1.A1" office:value-type="string">
            <text:p text:style-name="P6">SIGSEGV</text:p>
          </table:table-cell>
          <table:table-cell table:style-name="Table1.A1" office:value-type="string">
            <text:p text:style-name="P6">Dump</text:p>
          </table:table-cell>
          <table:table-cell table:style-name="Table1.A1" office:value-type="string">
            <text:p text:style-name="P6">Tham chiếu bộ nhớ không hợp lệ</text:p>
          </table:table-cell>
          <table:table-cell table:style-name="Table1.A1" office:value-type="string">
            <text:p text:style-name="P6">Có</text:p>
          </table:table-cell>
        </table:table-row>
        <table:table-row>
          <table:table-cell table:style-name="Table1.A1" office:value-type="string">
            <text:p text:style-name="P6">12</text:p>
          </table:table-cell>
          <table:table-cell table:style-name="Table1.A1" office:value-type="string">
            <text:p text:style-name="P6">SIGUSR2</text:p>
          </table:table-cell>
          <table:table-cell table:style-name="Table1.A1" office:value-type="string">
            <text:p text:style-name="P6">Terminate</text:p>
          </table:table-cell>
          <table:table-cell table:style-name="Table1.A1" office:value-type="string">
            <text:p text:style-name="P6">Dành cho lập trình viên tùy biến</text:p>
          </table:table-cell>
          <table:table-cell table:style-name="Table1.A1" office:value-type="string">
            <text:p text:style-name="P6">Có</text:p>
          </table:table-cell>
        </table:table-row>
        <table:table-row>
          <table:table-cell table:style-name="Table1.A1" office:value-type="string">
            <text:p text:style-name="P6">14</text:p>
          </table:table-cell>
          <table:table-cell table:style-name="Table1.A1" office:value-type="string">
            <text:p text:style-name="P6">SIGALRM</text:p>
          </table:table-cell>
          <table:table-cell table:style-name="Table1.A1" office:value-type="string">
            <text:p text:style-name="P6">Terminate</text:p>
          </table:table-cell>
          <table:table-cell table:style-name="Table1.A1" office:value-type="string">
            <text:p text:style-name="P6">Đồng hồ thời gian thực</text:p>
          </table:table-cell>
          <table:table-cell table:style-name="Table1.A1" office:value-type="string">
            <text:p text:style-name="P6">Có</text:p>
          </table:table-cell>
        </table:table-row>
        <table:table-row>
          <table:table-cell table:style-name="Table1.A1" office:value-type="string">
            <text:p text:style-name="P6">15</text:p>
          </table:table-cell>
          <table:table-cell table:style-name="Table1.A1" office:value-type="string">
            <text:p text:style-name="P6">SIGTERM</text:p>
          </table:table-cell>
          <table:table-cell table:style-name="Table1.A1" office:value-type="string">
            <text:p text:style-name="P6">Terminate</text:p>
          </table:table-cell>
          <table:table-cell table:style-name="Table1.A1" office:value-type="string">
            <text:p text:style-name="P6">Yêu cầu kết thúc tiến trình</text:p>
          </table:table-cell>
          <table:table-cell table:style-name="Table1.A1" office:value-type="string">
            <text:p text:style-name="P6">Có</text:p>
          </table:table-cell>
        </table:table-row>
        <table:table-row>
          <table:table-cell table:style-name="Table1.A1" office:value-type="string">
            <text:p text:style-name="P6">17</text:p>
          </table:table-cell>
          <table:table-cell table:style-name="Table1.A1" office:value-type="string">
            <text:p text:style-name="P6">SIGCHLD</text:p>
          </table:table-cell>
          <table:table-cell table:style-name="Table1.A1" office:value-type="string">
            <text:p text:style-name="P6">Ignore</text:p>
          </table:table-cell>
          <table:table-cell table:style-name="Table1.A1" office:value-type="string">
            <text:p text:style-name="P6">Tiến trình con dừng/kết thúc</text:p>
          </table:table-cell>
          <table:table-cell table:style-name="Table1.A1" office:value-type="string">
            <text:p text:style-name="P6">Có</text:p>
          </table:table-cell>
        </table:table-row>
        <table:table-row>
          <table:table-cell table:style-name="Table1.A1" office:value-type="string">
            <text:p text:style-name="P6">18</text:p>
          </table:table-cell>
          <table:table-cell table:style-name="Table1.A1" office:value-type="string">
            <text:p text:style-name="P6">SIGCONT</text:p>
          </table:table-cell>
          <table:table-cell table:style-name="Table1.A1" office:value-type="string">
            <text:p text:style-name="P6">Continue</text:p>
          </table:table-cell>
          <table:table-cell table:style-name="Table1.A1" office:value-type="string">
            <text:p text:style-name="P6">Tiếp tục thực thi nếu đang dừng</text:p>
          </table:table-cell>
          <table:table-cell table:style-name="Table1.A1" office:value-type="string">
            <text:p text:style-name="P6">Có</text:p>
          </table:table-cell>
        </table:table-row>
        <table:table-row>
          <table:table-cell table:style-name="Table1.A1" office:value-type="string">
            <text:p text:style-name="P6">19</text:p>
          </table:table-cell>
          <table:table-cell table:style-name="Table1.A1" office:value-type="string">
            <text:p text:style-name="P6">SIGSTOP</text:p>
          </table:table-cell>
          <table:table-cell table:style-name="Table1.A1" office:value-type="string">
            <text:p text:style-name="P6">Stop</text:p>
          </table:table-cell>
          <table:table-cell table:style-name="Table1.A1" office:value-type="string">
            <text:p text:style-name="P24"><text:span text:style-name="T2">Dừng thực thi tiến trình (</text:span><text:span text:style-name="Source_20_Text"><text:span text:style-name="T2">Ctrl-Z</text:span></text:span><text:span text:style-name="T2">)</text:span></text:p>
          </table:table-cell>
          <table:table-cell table:style-name="Table1.E16" office:value-type="string">
            <text:p text:style-name="P6"/>
          </table:table-cell>
        </table:table-row>
      </table:table>
      <text:p text:style-name="P8"><text:span text:style-name="T1">Đặc biệt với SIGUSR1 và SIGUSR2:</text:span> Đây là hai tín hiệu dành riêng cho lập trình viên sử dụng. Mặc dù hành động mặc định là Chấm dứt (Terminate), lập trình viên thường thay đổi chúng để tạo ra các kênh giao tiếp tối giản (ví dụ: báo hiệu "đã có sự kiện xảy ra") giữa các tiến trình.</text:p>
      <text:h text:style-name="P7" text:outline-level="2"><text:soft-page-break/>4. Gửi, Chờ và Mặt nạ Tín hiệu (Signal Mask)</text:h>
      <text:h text:style-name="P4" text:outline-level="3">4.1. Gửi Tín hiệu</text:h>
      <text:p text:style-name="P25"><text:span text:style-name="T2">Các tiến trình hoặc luồng có thể gửi tín hiệu cho nhau thông qua các hàm hệ thống (trả về </text:span><text:span text:style-name="Source_20_Text"><text:span text:style-name="T2">0</text:span></text:span><text:span text:style-name="T2"> nếu thành công, </text:span><text:span text:style-name="Source_20_Text"><text:span text:style-name="T2">-1</text:span></text:span><text:span text:style-name="T2"> nếu thất bại):</text:span></text:p>
      <text:list text:style-name="L3">
        <text:list-item>
          <text:p text:style-name="P33"><text:span text:style-name="Source_20_Text"><text:span text:style-name="T2">raise(getpid(), int S)</text:span></text:span><text:span text:style-name="T2">: Gửi tín hiệu </text:span><text:span text:style-name="Source_20_Text"><text:span text:style-name="T2">S</text:span></text:span><text:span text:style-name="T2"> cho chính luồng đang gọi hàm.</text:span></text:p>
        </text:list-item>
        <text:list-item>
          <text:p text:style-name="P33"><text:span text:style-name="Source_20_Text"><text:span text:style-name="T2">kill(pid_t PID, int S)</text:span></text:span><text:span text:style-name="T2">: Gửi tín hiệu đến tiến trình cụ thể (</text:span><text:span text:style-name="Source_20_Text"><text:span text:style-name="T2">PID &gt; 0</text:span></text:span><text:span text:style-name="T2">), nhóm tiến trình (</text:span><text:span text:style-name="Source_20_Text"><text:span text:style-name="T2">PID = 0</text:span></text:span><text:span text:style-name="T2">), hoặc toàn hệ thống (</text:span><text:span text:style-name="Source_20_Text"><text:span text:style-name="T2">PID = -1</text:span></text:span><text:span text:style-name="T2">).</text:span></text:p>
        </text:list-item>
        <text:list-item>
          <text:p text:style-name="P33"><text:span text:style-name="Source_20_Text"><text:span text:style-name="T2">killpg(int PGroup, int S)</text:span></text:span><text:span text:style-name="T2">: Gửi tín hiệu đến toàn bộ thành viên trong một nhóm tiến trình.</text:span></text:p>
        </text:list-item>
        <text:list-item>
          <text:p text:style-name="P33"><text:span text:style-name="Source_20_Text"><text:span text:style-name="T2">pthread_kill(pthread_t TID, int S)</text:span></text:span><text:span text:style-name="T2">: Gửi tín hiệu đến một luồng cụ thể trong cùng tiến trình.</text:span></text:p>
        </text:list-item>
        <text:list-item>
          <text:p text:style-name="P33"><text:span text:style-name="Source_20_Text"><text:span text:style-name="T2">tgkill(int TGID, int TID, int S)</text:span></text:span><text:span text:style-name="T2">: Gửi tín hiệu đến một luồng cụ thể trong một nhóm luồng cụ thể.</text:span></text:p>
        </text:list-item>
        <text:list-item>
          <text:p text:style-name="P33"><text:span text:style-name="Source_20_Text"><text:span text:style-name="T2">sigqueue(pid_t PID, int S, const union sigval V)</text:span></text:span><text:span text:style-name="T2">: Gửi tín hiệu thời gian thực kèm theo dữ liệu (số nguyên hoặc con trỏ).</text:span></text:p>
        </text:list-item>
      </text:list>
      <text:h text:style-name="P4" text:outline-level="3">4.2. Chờ Tín hiệu</text:h>
      <text:p text:style-name="P1">Để làm cho tiến trình tạm dừng và chờ tín hiệu, ta có thể dùng:</text:p>
      <text:list text:style-name="L4">
        <text:list-item>
          <text:p text:style-name="P34"><text:span text:style-name="Source_20_Text"><text:span text:style-name="T2">pause()</text:span></text:span><text:span text:style-name="T2">: Đình chỉ tiến trình cho đến khi bắt được bất kỳ tín hiệu nào.</text:span></text:p>
        </text:list-item>
        <text:list-item>
          <text:p text:style-name="P34"><text:span text:style-name="Source_20_Text"><text:span text:style-name="T2">sigsuspend(const sigset_t *Mask)</text:span></text:span><text:span text:style-name="T2">: Tạm thời thay đổi mặt nạ tín hiệu và đình chỉ tiến trình đến khi nhận được một tín hiệu không bị che (unmasked).</text:span></text:p>
        </text:list-item>
        <text:list-item>
          <text:p text:style-name="P34"><text:span text:style-name="Source_20_Text"><text:span text:style-name="T2">wait()</text:span></text:span><text:span text:style-name="T2"> / </text:span><text:span text:style-name="Source_20_Text"><text:span text:style-name="T2">waitpid()</text:span></text:span><text:span text:style-name="T2">: Đưa tiến trình gọi vào trạng thái chờ (STOP) cho đến khi tiến trình con thay đổi trạng thái (chấm dứt, bị dừng bởi tín hiệu, hoặc được tiếp tục). Sự thay đổi này được báo hiệu bằng </text:span><text:span text:style-name="Source_20_Text"><text:span text:style-name="T2">SIGCHLD</text:span></text:span><text:span text:style-name="T2">.</text:span></text:p>
        </text:list-item>
      </text:list>
      <text:h text:style-name="P4" text:outline-level="3">4.3. Mặt nạ Tín hiệu (Signal Mask)</text:h>
      <text:p text:style-name="P1">Mặt nạ tín hiệu là danh sách các tín hiệu đang bị "chặn" (blocked) bởi một luồng. Khi bị chặn, tín hiệu chưa được giao đến tiến trình mà nằm ở trạng thái "chờ xử lý" (pending).</text:p>
      <text:list text:style-name="L5">
        <text:list-item>
          <text:p text:style-name="P35"><text:span text:style-name="T2">Tiến trình đơn luồng dùng </text:span><text:span text:style-name="Source_20_Text"><text:span text:style-name="T2">sigprocmask()</text:span></text:span><text:span text:style-name="T2"> để đổi mặt nạ.</text:span></text:p>
        </text:list-item>
        <text:list-item>
          <text:p text:style-name="P35"><text:span text:style-name="T2">Trong đa luồng, mỗi luồng có mặt nạ riêng và thay đổi qua </text:span><text:span text:style-name="Source_20_Text"><text:span text:style-name="T2">pthread_sigmask()</text:span></text:span><text:span text:style-name="T2">.</text:span></text:p>
        </text:list-item>
      </text:list>
      <text:h text:style-name="P4" text:outline-level="3">4.4. Tính Kế thừa khi dùng fork() và exec()</text:h>
      <text:list text:style-name="L6">
        <text:list-item>
          <text:p text:style-name="P36"><text:span text:style-name="T3">Khi gọi </text:span><text:span text:style-name="Source_20_Text"><text:span text:style-name="T3">fork()</text:span></text:span><text:span text:style-name="T3">:</text:span><text:span text:style-name="T2"> Tiến trình con kế thừa bản sao về các hành vi xử lý tín hiệu (dispositions) và mặt nạ tín hiệu (mask) từ cha.</text:span></text:p>
        </text:list-item>
        <text:list-item>
          <text:p text:style-name="P36"><text:span text:style-name="T3">Khi gọi </text:span><text:span text:style-name="Source_20_Text"><text:span text:style-name="T3">exec()</text:span></text:span><text:span text:style-name="T3">:</text:span><text:span text:style-name="T2"> Các tín hiệu đang bị bỏ qua (ignore) hoặc theo mặc định (default) sẽ giữ nguyên, nhưng các tín hiệu đang được bắt bởi hàm tùy chỉnh sẽ bị </text:span><text:span text:style-name="T3">đặt lại về mặc định</text:span><text:span text:style-name="T2"> (vì mã nguồn hàm tùy chỉnh không còn tồn tại trong chương trình mới). Mặt nạ tín hiệu vẫn được giữ nguyên.</text:span></text:p>
        </text:list-item>
      </text:list>
      <text:h text:style-name="P3" text:outline-level="2"><text:soft-page-break/>5. Lập trình Bắt Tín hiệu và Tính Tái vào (Reentrancy)</text:h>
      <text:p text:style-name="P1">Để định nghĩa lại cách xử lý một tín hiệu, Linux cung cấp hai hàm chính:</text:p>
      <text:list text:style-name="L7">
        <text:list-item>
          <text:p text:style-name="P37"><text:span text:style-name="Source_20_Text"><text:span text:style-name="T2">signal()</text:span></text:span><text:span text:style-name="T2">: Dễ sử dụng nhưng ít tính chuẩn hóa.</text:span></text:p>
        </text:list-item>
        <text:list-item>
          <text:p text:style-name="P37"><text:span text:style-name="Source_20_Text"><text:span text:style-name="T2">sigaction(int S, const struct sigaction *Act, struct sigaction *OldAct)</text:span></text:span><text:span text:style-name="T2">: Khuyến nghị sử dụng. Cung cấp cơ chế an toàn hơn, cho phép che (mask) các tín hiệu khác trong lúc handler đang thực thi để tránh xung đột. Hàm xử lý có dạng: </text:span><text:span text:style-name="Source_20_Text"><text:span text:style-name="T2">void handler(int S)</text:span></text:span><text:span text:style-name="T2">.</text:span></text:p>
        </text:list-item>
      </text:list>
      <text:h text:style-name="P4" text:outline-level="3">5.1. Vấn đề của hàm xử lý tín hiệu cơ bản</text:h>
      <text:p text:style-name="P25"><text:span text:style-name="T2">Ví dụ một đoạn code dùng </text:span><text:span text:style-name="Source_20_Text"><text:span text:style-name="T2">signal()</text:span></text:span><text:span text:style-name="T2"> (Không khuyến nghị dùng trong thực tế do lỗi an toàn tái vào):</text:span></text:p>
      <table:table table:name="Table2" table:style-name="Table2">
        <table:table-column table:style-name="Table2.A"/>
        <table:table-row>
          <table:table-cell table:style-name="Table2.A1" office:value-type="string">
            <text:p text:style-name="P6">#include&lt;stdio.h&gt;</text:p>
            <text:p text:style-name="P6">#include&lt;signal.h&gt;</text:p>
            <text:p text:style-name="P6">#include&lt;unistd.h&gt;</text:p>
            <text:p text:style-name="P6"/>
            <text:p text:style-name="P6">void sig_handler(int signo) {</text:p>
            <text:p text:style-name="P6"><text:s text:c="2"/>if (signo == SIGINT)</text:p>
            <text:p text:style-name="P6"><text:s text:c="4"/>printf("received SIGINT\n"); // Lỗi tiềm ẩn: printf không reentrant</text:p>
            <text:p text:style-name="P6">}</text:p>
            <text:p text:style-name="P6"/>
            <text:p text:style-name="P6">int main(void) {</text:p>
            <text:p text:style-name="P6"><text:s text:c="2"/>if (signal(SIGINT, sig_handler) == SIG_ERR)</text:p>
            <text:p text:style-name="P6"><text:s text:c="4"/>printf("\ncan't catch SIGINT\n");</text:p>
            <text:p text:style-name="P6"><text:s text:c="4"/></text:p>
            <text:p text:style-name="P6"><text:s text:c="2"/>while(1) </text:p>
            <text:p text:style-name="P6"><text:s text:c="4"/>sleep(1);</text:p>
            <text:p text:style-name="P6"><text:s text:c="2"/>return 0;</text:p>
            <text:p text:style-name="P6">}</text:p>
          </table:table-cell>
        </table:table-row>
      </table:table>
      <text:p text:style-name="P1"><text:span text:style-name="T7">Đoạn mã trên mô phỏng việc chặn phím </text:span><text:span text:style-name="Source_20_Text"><text:span text:style-name="T6">Ctrl-C</text:span></text:span><text:span text:style-name="T7">. Tuy nhiên, việc sử dụng </text:span><text:span text:style-name="Source_20_Text"><text:span text:style-name="T6">printf()</text:span></text:span><text:span text:style-name="T7"> trong handler là một lỗi thiết kế nghiêm trọng.</text:span></text:p>
      <text:h text:style-name="P4" text:outline-level="3">5.2. Nguyên tắc Code "Tái vào" (Reentrant Code)</text:h>
      <text:p text:style-name="P25"><text:span text:style-name="T2">Hàm xử lý tín hiệu ngắt ngang luồng thực thi hiện tại. Nếu một tín hiệu thứ hai đến khi tín hiệu thứ nhất đang xử lý, hàm handler lại bị gọi đè lên. Do đó, mã trong handler phải là </text:span><text:span text:style-name="T3">Reentrant</text:span><text:span text:style-name="T2"> (có thể bị ngắt ở bất kỳ đâu và tiếp tục lại mà không làm hỏng dữ liệu). Các hàm </text:span><text:soft-page-break/><text:span text:style-name="T2">cấp phát động như </text:span><text:span text:style-name="Source_20_Text"><text:span text:style-name="T2">malloc()</text:span></text:span><text:span text:style-name="T2"> hay in ấn ra luồng chuẩn như </text:span><text:span text:style-name="Source_20_Text"><text:span text:style-name="T2">printf()</text:span></text:span><text:span text:style-name="T2"> không phải là reentrant và tuyệt đối không nên gọi trực tiếp trong signal handler.</text:span></text:p>
      <text:p text:style-name="P25"><text:span text:style-name="T5">Giải thích:</text:span><text:span text:style-name="T4"> Ví dụ khi handler A đang xử lý thì handler B tới, handler sẽ bị gọi lần nữa chồng lên. Đây chính là lý do phải cực kỳ cẩn thận. Vì sao </text:span><text:span text:style-name="Source_20_Text"><text:span text:style-name="T4">printf()</text:span></text:span><text:span text:style-name="T4"> và </text:span><text:span text:style-name="Source_20_Text"><text:span text:style-name="T4">malloc()</text:span></text:span><text:span text:style-name="T4"> nguy hiểm?.</text:span></text:p>
      <text:p text:style-name="P21">Đầu tiên là về hàm printf(<text:span text:style-name="T8">):</text:span></text:p>
      <text:h text:style-name="P26" text:outline-level="2"><text:span text:style-name="Source_20_Text"><text:span text:style-name="T4">- printf()</text:span></text:span><text:span text:style-name="T4"> KHÔNG phải là 1 syscall đơn giản</text:span></text:h>
      <text:p text:style-name="P17">Khi bạn gọi:</text:p>
      <table:table table:name="Table4" table:style-name="Table4">
        <table:table-column table:style-name="Table4.A"/>
        <table:table-row>
          <table:table-cell table:style-name="Table4.A1" office:value-type="string">
            <text:p text:style-name="P22">printf("Hello %d\n", x);</text:p>
          </table:table-cell>
        </table:table-row>
      </table:table>
      <text:p text:style-name="P22">Thực tế nó làm nhiều bước:</text:p>
      <text:list text:style-name="L8">
        <text:list-item>
          <text:p text:style-name="P38"><text:span text:style-name="T4">Format chuỗi (</text:span><text:span text:style-name="Source_20_Text"><text:span text:style-name="T4">%d</text:span></text:span><text:span text:style-name="T4">, </text:span><text:span text:style-name="Source_20_Text"><text:span text:style-name="T4">%s</text:span></text:span><text:span text:style-name="T4">, ...) </text:span></text:p>
        </text:list-item>
        <text:list-item>
          <text:p text:style-name="P38"><text:span text:style-name="T4">Ghi vào </text:span><text:span text:style-name="Strong_20_Emphasis"><text:span text:style-name="T4">buffer nội bộ</text:span></text:span><text:span text:style-name="T4"> (stdout buffer) </text:span></text:p>
        </text:list-item>
        <text:list-item>
          <text:p text:style-name="P38"><text:span text:style-name="T4">Có thể gọi </text:span><text:span text:style-name="Source_20_Text"><text:span text:style-name="T4">malloc()</text:span></text:span><text:span text:style-name="T4"> để cấp phát buffer (nếu chưa có) </text:span></text:p>
        </text:list-item>
        <text:list-item>
          <text:p text:style-name="P38"><text:span text:style-name="T4">Dùng </text:span><text:span text:style-name="Strong_20_Emphasis"><text:span text:style-name="T4">lock nội bộ (mutex)</text:span></text:span><text:span text:style-name="T4"> để bảo vệ </text:span><text:span text:style-name="Source_20_Text"><text:span text:style-name="T4">FILE*</text:span></text:span><text:span text:style-name="T4"> </text:span></text:p>
        </text:list-item>
        <text:list-item>
          <text:p text:style-name="P39"><text:span text:style-name="T4">Cuối cùng mới gọi </text:span><text:span text:style-name="Source_20_Text"><text:span text:style-name="T4">write()</text:span></text:span><text:span text:style-name="T4"> syscall</text:span></text:p>
        </text:list-item>
      </text:list>
      <text:h text:style-name="P13" text:outline-level="2">- <text:span text:style-name="T12">Vấn đề 1:</text:span> Buffer bị “xé đôi” (data corruption):</text:h>
      <text:p text:style-name="P14">Giả sử:</text:p>
      <table:table table:name="Table5" table:style-name="Table5">
        <table:table-column table:style-name="Table5.A"/>
        <table:table-row>
          <table:table-cell table:style-name="Table5.A1" office:value-type="string">
            <text:p text:style-name="P16">Lần 1: printf("Value = 123");</text:p>
          </table:table-cell>
        </table:table-row>
      </table:table>
      <text:p text:style-name="P14">Nó đang ghi vào buffer:</text:p>
      <table:table table:name="Table6" table:style-name="Table6">
        <table:table-column table:style-name="Table6.A"/>
        <table:table-row>
          <table:table-cell table:style-name="Table6.A1" office:value-type="string">
            <text:p text:style-name="P16">"Value = 12"</text:p>
          </table:table-cell>
        </table:table-row>
      </table:table>
      <text:p text:style-name="P14">Đúng lúc đó signal tới → handler chạy:</text:p>
      <table:table table:name="Table7" table:style-name="Table7">
        <table:table-column table:style-name="Table7.A"/>
        <table:table-row>
          <table:table-cell table:style-name="Table7.A1" office:value-type="string">
            <text:p text:style-name="P16">printf("SIGNAL\n");</text:p>
          </table:table-cell>
        </table:table-row>
      </table:table>
      <text:p text:style-name="P14">Buffer lúc này bị dùng chung → kết quả có thể:</text:p>
      <table:table table:name="Table8" table:style-name="Table8">
        <table:table-column table:style-name="Table8.A"/>
        <table:table-row>
          <table:table-cell table:style-name="Table8.A1" office:value-type="string">
            <text:p text:style-name="P16">Value = SIGNAL3</text:p>
          </table:table-cell>
        </table:table-row>
      </table:table>
      <text:p text:style-name="P14">Do đó, dữ liệu bị trộn lẫn (race condition).</text:p>
      <text:h text:style-name="P13" text:outline-level="2">- <text:span text:style-name="T12">Vấn đề 2:</text:span> Deadlock do lock nội bộ</text:h>
      <text:p text:style-name="P28"><text:span text:style-name="Source_20_Text"><text:span text:style-name="T4">printf()</text:span></text:span><text:span text:style-name="T4"> dùng lock kiểu:</text:span></text:p>
      <table:table table:name="Table9" table:style-name="Table9">
        <table:table-column table:style-name="Table9.A"/>
        <table:table-row>
          <table:table-cell table:style-name="Table9.A1" office:value-type="string">
            <text:p text:style-name="P16">flockfile(stdout);</text:p>
            <text:p text:style-name="P16">...</text:p>
            <text:p text:style-name="P16">funlockfile(stdout);</text:p>
          </table:table-cell>
        </table:table-row>
      </table:table>
      <text:p text:style-name="P14">Giả sử:</text:p>
      <text:list text:style-name="L9">
        <text:list-item>
          <text:p text:style-name="P40"><text:soft-page-break/><text:span text:style-name="T4">Main thread đang giữ lock </text:span><text:span text:style-name="Source_20_Text"><text:span text:style-name="T4">stdout</text:span></text:span><text:span text:style-name="T4"> </text:span></text:p>
        </text:list-item>
        <text:list-item>
          <text:p text:style-name="P40"><text:span text:style-name="T4">Signal tới → handler gọi </text:span><text:span text:style-name="Source_20_Text"><text:span text:style-name="T4">printf()</text:span></text:span><text:span text:style-name="T4"> </text:span></text:p>
        </text:list-item>
        <text:list-item>
          <text:p text:style-name="P40"><text:span text:style-name="T4">Handler cố lock </text:span><text:span text:style-name="Source_20_Text"><text:span text:style-name="T4">stdout</text:span></text:span><text:span text:style-name="T4"> AGAIN </text:span></text:p>
        </text:list-item>
      </text:list>
      <text:p text:style-name="P17">Nhưng:</text:p>
      <text:list text:style-name="L10">
        <text:list-item>
          <text:p text:style-name="P44">Lock đang bị giữ </text:p>
        </text:list-item>
        <text:list-item>
          <text:p text:style-name="P44">Handler không thể tiếp tục </text:p>
        </text:list-item>
      </text:list>
      <text:p text:style-name="P28"><text:span text:style-name="T4">Do đó, d</text:span><text:span text:style-name="Strong_20_Emphasis"><text:span text:style-name="T4">eadlock luôn (treo chương trình)</text:span></text:span></text:p>
      <text:p text:style-name="P14">- <text:span text:style-name="T12">Vấn đề </text:span><text:span text:style-name="T13">3:</text:span><text:span text:style-name="T10"> </text:span>Không reentrant (trạng thái nội bộ)</text:p>
      <text:p text:style-name="P28"><text:span text:style-name="Source_20_Text"><text:span text:style-name="T4">printf()</text:span></text:span><text:span text:style-name="T4"> dùng:</text:span></text:p>
      <text:list text:style-name="L11">
        <text:list-item>
          <text:p text:style-name="P45">static variables </text:p>
        </text:list-item>
        <text:list-item>
          <text:p text:style-name="P45">trạng thái format </text:p>
        </text:list-item>
        <text:list-item>
          <text:p text:style-name="P45">buffer con trỏ </text:p>
        </text:list-item>
      </text:list>
      <text:p text:style-name="P17">Nếu bị interrupt giữa chừng:</text:p>
      <text:list text:style-name="L12">
        <text:list-item>
          <text:p text:style-name="P46">trạng thái bị “dang dở” </text:p>
        </text:list-item>
        <text:list-item>
          <text:p text:style-name="P46">lần gọi thứ 2 dùng lại trạng thái chưa hoàn chỉnh </text:p>
        </text:list-item>
      </text:list>
      <text:p text:style-name="P28"><text:span text:style-name="T2">Do đó, u</text:span><text:span text:style-name="Strong_20_Emphasis"><text:span text:style-name="T4">ndefined behavior (lỗi không đoán trước)</text:span></text:span></text:p>
      <text:p text:style-name="P28"><text:span text:style-name="Strong_20_Emphasis"><text:span text:style-name="T4"/></text:span></text:p>
      <text:p text:style-name="P11">Thứ hai, về hàm malloc(<text:span text:style-name="T11">):</text:span></text:p>
      <text:p text:style-name="P29"><text:span text:style-name="Source_20_Text"><text:span text:style-name="T4">- <text:s/>malloc()</text:span></text:span><text:span text:style-name="T4"> thực chất làm gì?</text:span></text:p>
      <text:p text:style-name="P17">Nó quản lý heap bằng:</text:p>
      <text:list text:style-name="L13">
        <text:list-item>
          <text:p text:style-name="P47">free list (danh sách block rảnh) </text:p>
        </text:list-item>
        <text:list-item>
          <text:p text:style-name="P47">metadata (header của block) </text:p>
        </text:list-item>
        <text:list-item>
          <text:p text:style-name="P47">pointer linking </text:p>
        </text:list-item>
      </text:list>
      <text:p text:style-name="P17">Ví dụ:</text:p>
      <table:table table:name="Table10" table:style-name="Table10">
        <table:table-column table:style-name="Table10.A"/>
        <table:table-row>
          <table:table-cell table:style-name="Table10.A1" office:value-type="string">
            <text:p text:style-name="P10">[Block A][Block B][Free Block][Block C]</text:p>
          </table:table-cell>
        </table:table-row>
      </table:table>
      <text:h text:style-name="P9" text:outline-level="2"><text:span text:style-name="T9">- </text:span><text:span text:style-name="T14">Vấn đề 1:</text:span><text:span text:style-name="T9"> Heap đang bị sửa dở</text:span></text:h>
      <text:p text:style-name="P17">Giả sử:</text:p>
      <table:table table:name="Table12" table:style-name="Table12">
        <table:table-column table:style-name="Table12.A"/>
        <table:table-row>
          <table:table-cell table:style-name="Table12.A1" office:value-type="string">
            <text:p text:style-name="P18">p = malloc(100);</text:p>
          </table:table-cell>
        </table:table-row>
      </table:table>
      <text:p text:style-name="P17">Nội bộ:</text:p>
      <text:list text:style-name="L14">
        <text:list-item>
          <text:p text:style-name="P48">Tìm block free </text:p>
        </text:list-item>
        <text:list-item>
          <text:p text:style-name="P48"><text:soft-page-break/>Cắt block </text:p>
        </text:list-item>
        <text:list-item>
          <text:p text:style-name="P48">Update metadata </text:p>
        </text:list-item>
        <text:list-item>
          <text:p text:style-name="P48">Update free list </text:p>
        </text:list-item>
      </text:list>
      <text:p text:style-name="P17">Nếu signal tới ở bước 2:</text:p>
      <text:list text:style-name="L15">
        <text:list-item>
          <text:p text:style-name="P41"><text:span text:style-name="T4">heap đang </text:span><text:span text:style-name="Strong_20_Emphasis"><text:span text:style-name="T4">nửa cập nhật</text:span></text:span><text:span text:style-name="T4"> </text:span></text:p>
        </text:list-item>
        <text:list-item>
          <text:p text:style-name="P41"><text:span text:style-name="T4">cấu trúc dữ liệu </text:span><text:span text:style-name="Strong_20_Emphasis"><text:span text:style-name="T4">chưa consistent</text:span></text:span><text:span text:style-name="T4"> </text:span></text:p>
        </text:list-item>
      </text:list>
      <text:p text:style-name="P17">Handler gọi tiếp:</text:p>
      <table:table table:name="Table11" table:style-name="Table11">
        <table:table-column table:style-name="Table11.A"/>
        <table:table-row>
          <table:table-cell table:style-name="Table11.A1" office:value-type="string">
            <text:p text:style-name="P19"><text:bookmark text:name="code-block-viewer"/>malloc(50);</text:p>
          </table:table-cell>
        </table:table-row>
      </table:table>
      <text:p text:style-name="P17">Nó đọc heap đang “hỏng tạm thời”</text:p>
      <text:p text:style-name="P17">Kết quả:</text:p>
      <text:list text:style-name="L16">
        <text:list-item>
          <text:p text:style-name="P49">crash </text:p>
        </text:list-item>
        <text:list-item>
          <text:p text:style-name="P49">segfault </text:p>
        </text:list-item>
        <text:list-item>
          <text:p text:style-name="P49">heap corruption</text:p>
        </text:list-item>
      </text:list>
      <text:p text:style-name="P17">- <text:span text:style-name="T12">Vấn đề 2:</text:span> Double allocation</text:p>
      <text:p text:style-name="P17">Ví dụ:</text:p>
      <text:list text:style-name="L17">
        <text:list-item>
          <text:p text:style-name="P50">Block X đang được cấp phát (chưa xong) </text:p>
        </text:list-item>
        <text:list-item>
          <text:p text:style-name="P50">Signal tới → malloc() lần 2 </text:p>
        </text:list-item>
      </text:list>
      <text:p text:style-name="P17">Cả 2 lần có thể:</text:p>
      <text:list text:style-name="L18">
        <text:list-item>
          <text:p text:style-name="P51">cấp phát cùng 1 block </text:p>
        </text:list-item>
      </text:list>
      <text:p text:style-name="P30"><text:span text:style-name="T4">Do đó, </text:span><text:span text:style-name="Strong_20_Emphasis"><text:span text:style-name="T4">2 con trỏ trỏ cùng vùng nhớ → cực kỳ nguy hiểm</text:span></text:span></text:p>
      <text:p text:style-name="P12"><text:span text:style-name="T9">- </text:span><text:span text:style-name="T14">Vấn đề 3:</text:span><text:span text:style-name="T9"> Lock nội bộ của malloc</text:span></text:p>
      <text:p text:style-name="P28"><text:span text:style-name="T4">glibc </text:span><text:span text:style-name="Source_20_Text"><text:span text:style-name="T4">malloc()</text:span></text:span><text:span text:style-name="T4"> dùng:</text:span></text:p>
      <text:list text:style-name="L19">
        <text:list-item>
          <text:p text:style-name="P52">mutex để bảo vệ heap </text:p>
        </text:list-item>
      </text:list>
      <text:p text:style-name="P17">Giả sử:</text:p>
      <text:list text:style-name="L20">
        <text:list-item>
          <text:p text:style-name="P53">Main thread đang malloc → giữ lock </text:p>
        </text:list-item>
        <text:list-item>
          <text:p text:style-name="P53">Signal tới → handler gọi malloc </text:p>
        </text:list-item>
        <text:list-item>
          <text:p text:style-name="P53">Handler cố lock lại </text:p>
        </text:list-item>
      </text:list>
      <text:p text:style-name="P28"><text:span text:style-name="T4">Do đó, </text:span><text:span text:style-name="Strong_20_Emphasis"><text:span text:style-name="T4">Deadlock giống printf()</text:span></text:span></text:p>
      <text:h text:style-name="P15" text:outline-level="2">- <text:span text:style-name="T12">Vấn đề 4:</text:span> Heap corruption (tệ nhất)</text:h>
      <text:p text:style-name="P17">Heap có dạng:</text:p>
      <text:section text:style-name="Sect1" text:name="code-block-viewer">
        <text:p text:style-name="P20">[Header][Data][Header][Data]</text:p>
      </text:section>
      <text:p text:style-name="P17"><text:soft-page-break/>Nếu metadata bị ghi sai:</text:p>
      <text:list text:style-name="L21">
        <text:list-item>
          <text:p text:style-name="P54">size sai </text:p>
        </text:list-item>
        <text:list-item>
          <text:p text:style-name="P54">pointer sai </text:p>
        </text:list-item>
      </text:list>
      <text:p text:style-name="P17">Lần malloc/free tiếp theo: crash ngay hoặc bug ngầm (hard-to-debug)</text:p>
      <text:h text:style-name="P27" text:outline-level="3"><text:span text:style-name="T2">5.3. Cách viết Signal Handler chuẩn mực bằng </text:span><text:span text:style-name="Source_20_Text"><text:span text:style-name="T2">sigaction</text:span></text:span></text:h>
      <text:p text:style-name="P25"><text:span text:style-name="T2">Cách tốt nhất để xử lý tín hiệu là chỉ thay đổi một cờ (flag) kiểu số nguyên nguyên tử (</text:span><text:span text:style-name="Source_20_Text"><text:span text:style-name="T2">sig_atomic_t</text:span></text:span><text:span text:style-name="T2">) bên trong handler, sau đó thực hiện phần việc nặng ở vòng lặp chính (main loop).</text:span></text:p>
      <table:table table:name="Table3" table:style-name="Table3">
        <table:table-column table:style-name="Table3.A"/>
        <table:table-row>
          <table:table-cell table:style-name="Table3.A1" office:value-type="string">
            <text:p text:style-name="P6">#include &lt;stdlib.h&gt;</text:p>
            <text:p text:style-name="P6">#include &lt;signal.h&gt;</text:p>
            <text:p text:style-name="P6">#include &lt;stdio.h&gt;</text:p>
            <text:p text:style-name="P6">#include &lt;string.h&gt;</text:p>
            <text:p text:style-name="P6">#include &lt;unistd.h&gt;</text:p>
            <text:p text:style-name="P6"/>
            <text:p text:style-name="P6">// got_signal là một cờ nguyên tử để báo hiệu đã nhận tín hiệu</text:p>
            <text:p text:style-name="P6">static volatile sig_atomic_t got_signal = 0;</text:p>
            <text:p text:style-name="P6"/>
            <text:p text:style-name="P6">static void my_sig_handler(int signo) {</text:p>
            <text:p text:style-name="P6"><text:s text:c="4"/>got_signal = 1; // Chỉ đổi trạng thái cờ, đảm bảo reentrant</text:p>
            <text:p text:style-name="P6">}</text:p>
            <text:p text:style-name="P6"/>
            <text:p text:style-name="P6">int main() {</text:p>
            <text:p text:style-name="P6"><text:s text:c="4"/>struct sigaction sa;</text:p>
            <text:p text:style-name="P6"/>
            <text:p text:style-name="P6"><text:s text:c="4"/>// Khởi tạo và đăng ký hàm xử lý bằng sigaction</text:p>
            <text:p text:style-name="P6"><text:s text:c="4"/>memset(&amp;sa, 0, sizeof(struct sigaction));</text:p>
            <text:p text:style-name="P6"><text:s text:c="4"/>sa.sa_handler = &amp;my_sig_handler;</text:p>
            <text:p text:style-name="P6"><text:s text:c="4"/></text:p>
            <text:p text:style-name="P6"><text:s text:c="4"/>if (sigaction(SIGINT, &amp;sa, NULL) == -1) {</text:p>
            <text:p text:style-name="P6"><text:s text:c="8"/>perror("sigaction");</text:p>
            <text:p text:style-name="P6"><text:s text:c="8"/>return EXIT_FAILURE;</text:p>
            <text:p text:style-name="P6"><text:soft-page-break/><text:s text:c="4"/>}</text:p>
            <text:p text:style-name="P6"/>
            <text:p text:style-name="P6"><text:s text:c="4"/>while(1) {</text:p>
            <text:p text:style-name="P6"><text:s text:c="8"/>if (got_signal) {</text:p>
            <text:p text:style-name="P6"><text:s text:c="12"/>got_signal = 0;</text:p>
            <text:p text:style-name="P6"><text:s text:c="12"/>// Xử lý logic nặng, printf ở luồng chính là an toàn</text:p>
            <text:p text:style-name="P6"><text:s text:c="12"/>printf("Received interrupt signal SIGINT!\n");</text:p>
            <text:p text:style-name="P6"><text:s text:c="8"/>}</text:p>
            <text:p text:style-name="P6"><text:s text:c="8"/>printf("Doing useful stuff...\n");</text:p>
            <text:p text:style-name="P6"><text:s text:c="8"/>sleep(1);</text:p>
            <text:p text:style-name="P6"><text:s text:c="4"/>}</text:p>
            <text:p text:style-name="P6"><text:s text:c="4"/>return EXIT_SUCCESS;</text:p>
            <text:p text:style-name="P6">}</text:p>
          </table:table-cell>
        </table:table-row>
      </table:table>
      <text:p text:style-name="P1"><text:span text:style-name="T7">Trong ví dụ này, chương trình hoạt động an toàn và hiệu quả. Bạn không thể tắt nó bằng </text:span><text:span text:style-name="Source_20_Text"><text:span text:style-name="T6">Ctrl-C</text:span></text:span><text:span text:style-name="T7"> (vì đã bị bắt), nhưng bạn vẫn có thể thoát khỏi chương trình bằng </text:span><text:span text:style-name="Source_20_Text"><text:span text:style-name="T6">Ctrl-Z</text:span></text:span><text:span text:style-name="T7"> (Gửi SIGTSTP - Stop) hoặc </text:span><text:span text:style-name="Source_20_Text"><text:span text:style-name="T6">Ctrl-\</text:span></text:span><text:span text:style-name="T7"> (Gửi SIGQUIT - Dump).</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6T07:52:19.930828494</meta:creation-date>
    <dc:date>2026-04-07T10:27:31.106951101</dc:date>
    <meta:editing-duration>PT1H7M23S</meta:editing-duration>
    <meta:editing-cycles>32</meta:editing-cycles>
    <meta:generator>LibreOffice/24.2.7.2$Linux_X86_64 LibreOffice_project/420$Build-2</meta:generator>
    <meta:document-statistic meta:table-count="12" meta:image-count="0" meta:object-count="0" meta:page-count="9" meta:paragraph-count="274" meta:word-count="2203" meta:character-count="11015" meta:non-whitespace-character-count="8962"/>
  </office:meta>
</office:document-meta>
</file>