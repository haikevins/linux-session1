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top="0.0598in" fo:margin-bottom="0.0598in" style:contextual-spacing="false" fo:line-height="100%" fo:text-align="start" style:justify-single-word="false"/>
      <style:text-properties style:font-name="Liberation Serif" fo:font-size="13pt" fo:font-weight="normal" style:font-size-asian="13pt" style:font-weight-asian="normal" style:font-size-complex="13pt" style:font-weight-complex="normal"/>
    </style:style>
    <style:style style:name="P2" style:family="paragraph" style:parent-style-name="Heading_20_3">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3" style:family="paragraph" style:parent-style-name="Standard">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4" style:family="paragraph" style:parent-style-name="Text_20_body" style:list-style-name="L1">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5" style:family="paragraph" style:parent-style-name="Text_20_body">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6" style:family="paragraph" style:parent-style-name="Text_20_body">
      <style:paragraph-properties fo:margin-top="0.0598in" fo:margin-bottom="0.0598in" style:contextual-spacing="false" fo:line-height="100%" fo:text-align="justify" style:justify-single-word="false"/>
    </style:style>
    <style:style style:name="P7" style:family="paragraph" style:parent-style-name="Text_20_body" style:list-style-name="L1">
      <style:paragraph-properties fo:margin-top="0.0598in" fo:margin-bottom="0.0598in" style:contextual-spacing="false" fo:line-height="100%" fo:text-align="justify" style:justify-single-word="false"/>
    </style:style>
    <style:style style:name="P8" style:family="paragraph" style:parent-style-name="Text_20_body" style:list-style-name="L2">
      <style:paragraph-properties fo:margin-top="0.0598in" fo:margin-bottom="0.0598in" style:contextual-spacing="false" fo:line-height="100%" fo:text-align="justify" style:justify-single-word="false"/>
    </style:style>
    <style:style style:name="P9" style:family="paragraph" style:parent-style-name="Text_20_body" style:list-style-name="L3">
      <style:paragraph-properties fo:margin-top="0.0598in" fo:margin-bottom="0.0598in" style:contextual-spacing="false" fo:line-height="100%" fo:text-align="justify" style:justify-single-word="false"/>
    </style:style>
    <style:style style:name="P10" style:family="paragraph" style:parent-style-name="Text_20_body">
      <style:paragraph-properties fo:margin-top="0.0598in" fo:margin-bottom="0.0598in" style:contextual-spacing="false" fo:line-height="100%" fo:text-align="justify" style:justify-single-word="false"/>
      <style:text-properties officeooo:paragraph-rsid="000ea22a"/>
    </style:style>
    <style:style style:name="T1" style:family="text">
      <style:text-properties fo:font-weight="bold"/>
    </style:style>
    <style:style style:name="T2" style:family="text">
      <style:text-properties style:font-name="Liberation Serif" fo:font-size="13pt" style:font-size-asian="13pt" style:font-size-complex="13pt"/>
    </style:style>
    <style:style style:name="T3" style:family="text">
      <style:text-properties style:font-name="Liberation Serif" fo:font-size="13pt" fo:font-weight="bold" style:font-size-asian="13pt" style:font-size-complex="13pt"/>
    </style:style>
    <style:style style:name="T4" style:family="text">
      <style:text-properties officeooo:rsid="0009c879"/>
    </style:style>
    <style:style style:name="T5" style:family="text">
      <style:text-properties fo:font-size="13pt" style:font-size-asian="13pt" style:font-size-complex="13pt"/>
    </style:style>
    <style:style style:name="T6" style:family="text">
      <style:text-properties style:font-name="Liberation Serif" fo:font-size="13pt" style:font-size-asian="13pt" style:font-size-complex="13pt"/>
    </style:style>
    <style:style style:name="T7" style:family="text">
      <style:text-properties style:font-name="Liberation Serif" fo:font-size="13pt" fo:font-weight="normal" style:font-size-asian="13pt" style:font-weight-asian="normal" style:font-size-complex="13pt"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Nguồn tham khảo: <text:a xlink:type="simple" xlink:href="https://www.geeksforgeeks.org/linux-unix/signal-handling-in-linux-through-the-signal-function/" text:style-name="Internet_20_link" text:visited-style-name="Visited_20_Internet_20_Link"><text:span text:style-name="T4">https://www.geeksforgeeks.org/linux-unix/signal-handling-in-linux-through-the-signal-function/</text:span></text:a></text:h>
      <text:h text:style-name="P2" text:outline-level="3">1. Giới thiệu tổng quan về Tín hiệu (Signal)</text:h>
      <text:p text:style-name="P6"><text:span text:style-name="T2">Trong hệ điều hành Linux, tín hiệu (signal) là các thông điệp hoặc thông báo được hệ điều hành hoặc một ứng dụng khác (thậm chí là một luồng trong cùng ứng dụng) gửi đến chương trình của bạn. Mỗi tín hiệu được gán một số định danh riêng biệt chạy từ 1 đến 31. Các tín hiệu thường không chứa đối số truyền kèm, và bản thân tên gọi của chúng đã phản ánh trực tiếp chức năng. Ví dụ, tín hiệu số 9 (còn gọi là </text:span><text:span text:style-name="Source_20_Text"><text:span text:style-name="T2">SIGKILL</text:span></text:span><text:span text:style-name="T2">) được hệ thống gửi đi để thông báo rằng chương trình đang bị ép buộc phải đóng lại ngay lập tức.</text:span></text:p>
      <text:h text:style-name="P2" text:outline-level="3">2. Danh sách và phân loại các Tín hiệu phổ biến</text:h>
      <text:p text:style-name="P6"><text:span text:style-name="T2">Hệ thống cung cấp một phương thức rất đơn giản để liệt kê toàn bộ các tín hiệu được hỗ trợ, đó là thông qua câu lệnh </text:span><text:span text:style-name="Source_20_Text"><text:span text:style-name="T2">kill -l</text:span></text:span><text:span text:style-name="T2"> trên terminal. Mỗi tín hiệu sẽ chịu trách nhiệm cho các tình huống khác nhau của hệ thống. Các tín hiệu phổ biến bao gồm:</text:span></text:p>
      <text:list text:style-name="L1">
        <text:list-item>
          <text:p text:style-name="P4"><text:span text:style-name="T1">SIGHUP (Hang up):</text:span> Báo hiệu terminal điều khiển đã bị ngắt kết nối (hoặc đóng lại). Tín hiệu này xảy ra khi một tiến trình chạy trên terminal và terminal đó đột ngột bị tắt.</text:p>
        </text:list-item>
        <text:list-item>
          <text:p text:style-name="P7"><text:span text:style-name="T3">SIGINT:</text:span><text:span text:style-name="T2"> Tín hiệu ngắt, được sinh ra khi người dùng nhấn tổ hợp phím </text:span><text:span text:style-name="Source_20_Text"><text:span text:style-name="T2">Ctrl + C</text:span></text:span><text:span text:style-name="T2"> trên bàn phím.</text:span></text:p>
        </text:list-item>
        <text:list-item>
          <text:p text:style-name="P7"><text:span text:style-name="T3">SIGQUIT:</text:span><text:span text:style-name="T2"> Tín hiệu thoát, sinh ra khi người dùng nhấn tổ hợp </text:span><text:span text:style-name="Source_20_Text"><text:span text:style-name="T2">Ctrl + D</text:span></text:span><text:span text:style-name="T2">.</text:span></text:p>
        </text:list-item>
        <text:list-item>
          <text:p text:style-name="P4"><text:span text:style-name="T1">SIGILL:</text:span> Cảnh báo chỉ thị bất hợp pháp. Hệ điều hành gửi tín hiệu này khi phát hiện chương trình thực thi một lệnh sai cấu trúc, file thực thi bị hỏng, hoặc tải một thư viện động bị lỗi.</text:p>
        </text:list-item>
        <text:list-item>
          <text:p text:style-name="P7"><text:span text:style-name="T3">SIGABRT:</text:span><text:span text:style-name="T2"> Tín hiệu hủy bỏ, được gọi ra khi chương trình sử dụng API </text:span><text:span text:style-name="Source_20_Text"><text:span text:style-name="T2">abort()</text:span></text:span><text:span text:style-name="T2"> để tự kết thúc chính nó.</text:span></text:p>
        </text:list-item>
        <text:list-item>
          <text:p text:style-name="P4"><text:span text:style-name="T1">SIGFPE:</text:span> Ngoại lệ đối với số thực dấu phẩy động. Xảy ra khi chương trình thực hiện một phép toán lỗi (ví dụ: chia cho 0).</text:p>
        </text:list-item>
        <text:list-item>
          <text:p text:style-name="P4"><text:span text:style-name="T1">SIGPIPE:</text:span> Lỗi đường ống (Broken pipe). Xảy ra khi một tiến trình cố gắng ghi dữ liệu vào một pipe nhưng không có tiến trình nào ở đầu kia chờ đọc dữ liệu.</text:p>
        </text:list-item>
        <text:list-item>
          <text:p text:style-name="P4"><text:span text:style-name="T1">SIGSEGV (Segmentation Fault):</text:span> Tín hiệu báo lỗi phân đoạn bộ nhớ, một lỗi rất phổ biến khi ứng dụng cố tình truy cập vào vùng bộ nhớ không thuộc quyền sở hữu của nó.</text:p>
        </text:list-item>
        <text:list-item>
          <text:p text:style-name="P7"><text:span text:style-name="T3">SIGALRM:</text:span><text:span text:style-name="T2"> Tín hiệu báo thức, thường được kích hoạt thông qua hàm </text:span><text:span text:style-name="Source_20_Text"><text:span text:style-name="T2">alarm()</text:span></text:span><text:span text:style-name="T2">. Hàm này hoạt động như một bộ đếm thời gian, gửi tín hiệu đến chương trình sau một khoảng thời gian được thiết lập trước.</text:span></text:p>
        </text:list-item>
        <text:list-item>
          <text:p text:style-name="P7"><text:span text:style-name="T3">SIGTERM:</text:span><text:span text:style-name="T2"> Tín hiệu yêu cầu chương trình tự tắt một cách an toàn và dọn dẹp, khác hoàn toàn với sự cưỡng chế ngắt đột ngột của </text:span><text:span text:style-name="Source_20_Text"><text:span text:style-name="T2">SIGKILL</text:span></text:span><text:span text:style-name="T2">.</text:span></text:p>
        </text:list-item>
        <text:list-item>
          <text:p text:style-name="P4"><text:span text:style-name="T1">SIGCHLD:</text:span> Tín hiệu báo cho tiến trình cha biết rằng một tiến trình con của nó đã dừng hoặc kết thúc, cực kỳ hữu ích cho việc đồng bộ hóa dữ liệu.</text:p>
        </text:list-item>
        <text:list-item>
          <text:p text:style-name="P4"><text:soft-page-break/><text:span text:style-name="T1">SIGUSR1 và SIGUSR2:</text:span> Là các tín hiệu do người dùng tự định nghĩa, được cung cấp để các lập trình viên sử dụng nhằm mục đích đồng bộ hóa và giao tiếp với các phần mềm khác.</text:p>
        </text:list-item>
      </text:list>
      <text:h text:style-name="P2" text:outline-level="3">3. Bản chất ngắt của Tín hiệu và Mặt nạ tín hiệu (Signal Masks)</text:h>
      <text:p text:style-name="P5">Bên cạnh việc cung cấp thông tin, tín hiệu còn có khả năng làm gián đoạn luồng xử lý của chương trình. Khi nhận được một tín hiệu, một trong các luồng của ứng dụng bắt buộc phải tạm thời chuyển sang "chế độ xử lý tín hiệu" để giải quyết sự kiện đó. Kể từ phiên bản nhân Linux 2.6, hầu hết các tín hiệu chỉ làm gián đoạn một luồng đơn lẻ thay vì đóng băng toàn bộ ứng dụng như trước đây. Bản thân một trình xử lý tín hiệu cũng có thể bị gián đoạn tiếp bởi một tín hiệu đến sau. Một tín hiệu khi tới có thể rơi vào ba trạng thái xử lý: được xử lý bởi hàm do người dùng tự định nghĩa, xử lý bằng hàm mặc định của hệ thống, hoặc hoàn toàn bị bỏ qua (chặn tín hiệu).</text:p>
      <text:p text:style-name="P10"><text:span text:style-name="T2">Để thao tác và thiết lập tín hiệu dễ dàng hơn, Linux sử dụng cấu trúc "mặt nạ tín hiệu" (signal masks). Hệ điều hành lưu trữ thông tin của 32 loại tín hiệu vào một số nguyên 32-bit (unsigned int), trong đó mỗi bit tương ứng với trạng thái của một tín hiệu. Cách biểu diễn này cho phép truyền tham số mặt nạ tín hiệu qua các lời gọi hệ thống một cách hiệu quả nhất. </text:span><text:span text:style-name="T2">Ví dụ: System call (</text:span><text:span text:style-name="Source_20_Text"><text:span text:style-name="T2">sigprocmask</text:span></text:span><text:span text:style-name="T2">) phải copy dữ liệu từ user → kernel, nếu: 32 biến → copy 32 lần, 1 số int → copy 1 lần, n</text:span><text:span text:style-name="Strong_20_Emphasis"><text:span text:style-name="T7">hanh hơn rất nhiều.</text:span></text:span><text:span text:style-name="Strong_20_Emphasis"><text:span text:style-name="T2"> </text:span></text:span><text:span text:style-name="T2">Thư viện C của hệ thống luôn gán các trình xử lý mặc định, do đó dù bạn cố tình bỏ qua tín hiệu, tiến trình ngầm vẫn ghi nhận và xử lý chuẩn mực.</text:span></text:p>
      <text:h text:style-name="P2" text:outline-level="3">4. Ứng dụng thực tiễn của Tín hiệu</text:h>
      <text:p text:style-name="P6"><text:span text:style-name="T2">Đúng như tên gọi, chức năng chính của tín hiệu là để "ra dấu" báo hiệu một sự kiện. Lập trình viên có quyền gắn bất kỳ hành động nào (như in văn bản, vẽ đồ họa) làm phản hồi cho một tín hiệu cụ thể, nhưng có những tiêu chuẩn chung cần tuân thủ (như </text:span><text:span text:style-name="Source_20_Text"><text:span text:style-name="T2">SIGINT</text:span></text:span><text:span text:style-name="T2"> bắt buộc phải là lệnh đóng chương trình để tránh tạo ra các phần mềm không thể tắt được). Ngoài ra, tín hiệu mang trọng trách cực lớn trong việc cảnh báo lỗi ngoại lệ (như </text:span><text:span text:style-name="Source_20_Text"><text:span text:style-name="T2">SIGSEGV</text:span></text:span><text:span text:style-name="T2"> báo lỗi tràn bộ nhớ). Các công cụ gỡ lỗi (debugger) cũng phải dựa vào tín hiệu để lắng nghe diễn biến của chương trình đang được debug. Cuối cùng, tín hiệu đóng vai trò là một trong những phương thức Giao tiếp Liên tiến trình (IPC - Inter-Process Communication) cơ bản nhất, cho phép các tiến trình trò chuyện, ra lệnh hoặc khởi động lại nhau (ví dụ thông qua phần mềm </text:span><text:span text:style-name="Source_20_Text"><text:span text:style-name="T2">kill</text:span></text:span><text:span text:style-name="T2">).</text:span></text:p>
      <text:h text:style-name="P2" text:outline-level="3">5. Quản lý Tín hiệu: Hàm signal() và sigaction()</text:h>
      <text:p text:style-name="P5">Trong lập trình C/C++ trên Linux, bạn có thể tự cài đặt trình xử lý tín hiệu cho chương trình thông qua hai giao diện hàm chính:</text:p>
      <text:list text:style-name="L2">
        <text:list-item>
          <text:p text:style-name="P8"><text:span text:style-name="T3">Hàm </text:span><text:span text:style-name="Source_20_Text"><text:span text:style-name="T3">signal()</text:span></text:span><text:span text:style-name="T2">: Đây là lời gọi hệ thống cơ bản và lâu đời nhất. Nó nhận vào hai tham số: một mã số tín hiệu (ví dụ </text:span><text:span text:style-name="Source_20_Text"><text:span text:style-name="T2">SIGINT</text:span></text:span><text:span text:style-name="T2">) và một con trỏ trỏ tới hàm xử lý. Hàm này cho phép bạn định nghĩa các hàm void xử lý riêng, cài đặt bỏ qua tín hiệu (sử dụng </text:span><text:span text:style-name="Source_20_Text"><text:span text:style-name="T2">SIG_IGN</text:span></text:span><text:span text:style-name="T2">), hoặc trả về thiết lập mặc định (sử dụng </text:span><text:span text:style-name="Source_20_Text"><text:span text:style-name="T2">SIG_DFL</text:span></text:span><text:span text:style-name="T2">). Dù đơn giản, hàm </text:span><text:span text:style-name="Source_20_Text"><text:span text:style-name="T2">signal()</text:span></text:span><text:span text:style-name="T2"> lại có nhược điểm về tính khả chuyển (portability), nó thường hoạt động thiếu nhất quán trên các môi trường hệ điều hành khác nhau. Lưu ý quan trọng là hai tín hiệu </text:span><text:span text:style-name="Source_20_Text"><text:span text:style-name="T2">SIGKILL</text:span></text:span><text:span text:style-name="T2"> và </text:span><text:span text:style-name="Source_20_Text"><text:span text:style-name="T2">SIGSTOP</text:span></text:span><text:span text:style-name="T2"> là những tín hiệu tối cao, không thể bị bắt (catch) hoặc bỏ qua bằng bất cứ hàm nào.</text:span></text:p>
        </text:list-item>
        <text:list-item>
          <text:p text:style-name="P8"><text:soft-page-break/><text:span text:style-name="T3">Hàm </text:span><text:span text:style-name="Source_20_Text"><text:span text:style-name="T3">sigaction()</text:span></text:span><text:span text:style-name="T2">: Để khắc phục nhược điểm của </text:span><text:span text:style-name="Source_20_Text"><text:span text:style-name="T2">signal()</text:span></text:span><text:span text:style-name="T2">, hệ thống cung cấp </text:span><text:span text:style-name="Source_20_Text"><text:span text:style-name="T2">sigaction()</text:span></text:span><text:span text:style-name="T2">. Lời gọi hệ thống này nhận vào mã tín hiệu và các con trỏ trỏ đến một cấu trúc dữ liệu </text:span><text:span text:style-name="Source_20_Text"><text:span text:style-name="T2">sigaction</text:span></text:span><text:span text:style-name="T2">. Cấu trúc này không chỉ mô tả cách xử lý tín hiệu mà còn cung cấp nhiều thông tin chi tiết hơn về nguồn gốc và trạng thái của tín hiệu, đem lại sự an toàn và đồng bộ cao cho các ứng dụng phức tạp.</text:span></text:p>
        </text:list-item>
      </text:list>
      <text:h text:style-name="P2" text:outline-level="3">6. Phân tích Ví dụ Thực tiễn với lệnh kill</text:h>
      <text:p text:style-name="P6"><text:span text:style-name="T2">Trên môi trường dòng lệnh (shell), lệnh </text:span><text:span text:style-name="Source_20_Text"><text:span text:style-name="T2">kill</text:span></text:span><text:span text:style-name="T2"> là công cụ thường xuyên được dùng để bắn tín hiệu đến một tiến trình cụ thể bằng cú pháp </text:span><text:span text:style-name="Source_20_Text"><text:span text:style-name="T2">kill -signal pid</text:span></text:span><text:span text:style-name="T2">.</text:span></text:p>
      <text:list text:style-name="L3">
        <text:list-item>
          <text:p text:style-name="P9"><text:span text:style-name="T3">Trường hợp gửi tín hiệu treo (hangup):</text:span><text:span text:style-name="T2"> Lệnh </text:span><text:span text:style-name="Source_20_Text"><text:span text:style-name="T2">kill -1 500</text:span></text:span><text:span text:style-name="T2"> sẽ bắn tín hiệu số 1 (tức </text:span><text:span text:style-name="Source_20_Text"><text:span text:style-name="T2">SIGHUP</text:span></text:span><text:span text:style-name="T2">) vào tiến trình mang Process ID (PID) là 500.</text:span></text:p>
        </text:list-item>
        <text:list-item>
          <text:p text:style-name="P9"><text:span text:style-name="T3">Trường hợp cưỡng chế tắt (kill):</text:span><text:span text:style-name="T2"> Lệnh </text:span><text:span text:style-name="Source_20_Text"><text:span text:style-name="T2">kill -9 500</text:span></text:span><text:span text:style-name="T2"> sẽ gửi tín hiệu số 9 (</text:span><text:span text:style-name="Source_20_Text"><text:span text:style-name="T2">SIGKILL</text:span></text:span><text:span text:style-name="T2">) tới PID 500 để lập tức tước đoạt tài nguyên và đóng tiến trình đó mà không cho nó cơ hội dọn dẹp. Ở cả hai ví dụ, nếu hệ thống không tìm thấy ID của tiến trình trùng khớp, một thông báo lỗi sẽ được trả về trên màn hình.</text:span></text:p>
        </text:list-item>
      </text:list>
      <text:p text:style-name="P5"><text:span text:style-name="T1">Tổng kết:</text:span> Mọi tín hiệu sinh ra luôn đi kèm một kịch bản phản hồi mặc định từ hệ thống. Việc nắm bắt và thiết kế lại kịch bản này (bỏ qua, tạm dừng, hay tái khởi động tiến trình) hoàn toàn phụ thuộc vào kỹ năng lập trình xử lý tín hiệu, giúp các phần mềm trên Linux chạy an toàn và mạnh mẽ hơ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6T08:04:07.405597432</meta:creation-date>
    <dc:date>2026-04-07T10:41:31.396453567</dc:date>
    <meta:editing-duration>PT16M2S</meta:editing-duration>
    <meta:editing-cycles>10</meta:editing-cycles>
    <meta:generator>LibreOffice/24.2.7.2$Linux_X86_64 LibreOffice_project/420$Build-2</meta:generator>
    <meta:document-statistic meta:table-count="0" meta:image-count="0" meta:object-count="0" meta:page-count="3" meta:paragraph-count="31" meta:word-count="1496" meta:character-count="6961" meta:non-whitespace-character-count="5512"/>
  </office:meta>
</office:document-meta>
</file>