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 fo:text-align="justify" style:justify-single-word="false"/>
      <style:text-properties style:font-name="Liberation Serif" fo:font-size="13pt" officeooo:paragraph-rsid="00180b25" style:font-size-asian="13pt" style:font-size-complex="13pt"/>
    </style:style>
    <style:style style:name="P2" style:family="paragraph" style:parent-style-name="Heading_20_3">
      <style:paragraph-properties fo:line-height="100%" fo:text-align="justify" style:justify-single-word="false"/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8" style:family="paragraph" style:parent-style-name="Preformatted_20_Text">
      <style:paragraph-properties fo:line-height="100%" fo:text-align="justify" style:justify-single-word="false"/>
      <style:text-properties style:font-name="Liberation Serif" fo:font-size="13pt" officeooo:paragraph-rsid="0014d0b4" style:font-size-asian="13pt" style:font-size-complex="13pt"/>
    </style:style>
    <style:style style:name="P9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3pt" style:font-size-asian="13pt" style:font-size-complex="13pt"/>
    </style:style>
    <style:style style:name="P10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line-height="100%" fo:text-align="justify" style:justify-single-word="false"/>
    </style:style>
    <style:style style:name="P12" style:family="paragraph" style:parent-style-name="Text_20_body">
      <style:paragraph-properties fo:line-height="100%" fo:text-align="justify" style:justify-single-word="false"/>
      <style:text-properties officeooo:paragraph-rsid="00180b25"/>
    </style:style>
    <style:style style:name="P13" style:family="paragraph" style:parent-style-name="Text_20_body" style:list-style-name="L9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4" style:family="paragraph" style:parent-style-name="Text_20_body" style:list-style-name="L9">
      <style:paragraph-properties fo:line-height="100%" fo:text-align="justify" style:justify-single-word="false"/>
      <style:text-properties style:font-name="Liberation Serif" fo:font-size="13pt" fo:font-weight="normal" officeooo:paragraph-rsid="00180b25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Liberation Serif" fo:font-size="13pt" officeooo:rsid="00095b2a" officeooo:paragraph-rsid="00095b2a" style:font-size-asian="13pt" style:font-size-complex="13pt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Liberation Serif" fo:font-size="13pt" officeooo:rsid="001a5a62" officeooo:paragraph-rsid="001a5a62" style:font-size-asian="13pt" style:font-size-complex="13pt"/>
    </style:style>
    <style:style style:name="P18" style:family="paragraph" style:parent-style-name="Text_20_body" style:list-style-name="L7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19" style:family="paragraph" style:parent-style-name="Text_20_body" style:list-style-name="L8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Liberation Serif" fo:font-size="13pt" officeooo:paragraph-rsid="00180b25" style:font-size-asian="13pt" style:font-size-complex="13pt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officeooo:rsid="00095b2a" officeooo:paragraph-rsid="00095b2a" style:font-size-asian="13pt" style:font-size-complex="13pt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bold" officeooo:paragraph-rsid="001a5a62" style:font-size-asian="13pt" style:font-weight-asian="bold" style:font-size-complex="13pt" style:font-weight-complex="bold"/>
    </style:style>
    <style:style style:name="T1" style:family="text">
      <style:text-properties officeooo:rsid="000707a4"/>
    </style:style>
    <style:style style:name="T2" style:family="text">
      <style:text-properties officeooo:rsid="0007dd98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4ab6" style:font-weight-asian="bold" style:font-weight-complex="bold"/>
    </style:style>
    <style:style style:name="T6" style:family="text">
      <style:text-properties fo:font-weight="bold" officeooo:rsid="00180b2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5b2a" style:font-weight-asian="normal" style:font-weight-complex="normal"/>
    </style:style>
    <style:style style:name="T9" style:family="text">
      <style:text-properties fo:font-weight="normal" officeooo:rsid="001a5a62" style:font-weight-asian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124ab6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180b25" style:font-size-asian="13pt" style:font-weight-asian="bold" style:font-size-complex="13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weight="normal" officeooo:rsid="00095b2a" style:font-weight-asian="normal" style:font-weight-complex="normal"/>
    </style:style>
    <style:style style:name="T18" style:family="text">
      <style:text-properties style:font-name="Liberation Serif" fo:font-weight="normal" officeooo:rsid="001a5a62" style:font-weight-asian="normal" style:font-weight-complex="normal"/>
    </style:style>
    <style:style style:name="T1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20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21" style:family="text">
      <style:text-properties style:font-name="Liberation Serif" fo:font-size="13pt" fo:font-weight="bold" officeooo:rsid="00124ab6" style:font-size-asian="13pt" style:font-weight-asian="bold" style:font-size-complex="13pt" style:font-weight-complex="bold"/>
    </style:style>
    <style:style style:name="T22" style:family="text">
      <style:text-properties style:font-name="Liberation Serif" fo:font-size="13pt" fo:font-weight="bold" officeooo:rsid="00180b25" style:font-size-asian="13pt" style:font-weight-asian="bold" style:font-size-complex="13pt" style:font-weight-complex="bold"/>
    </style:style>
    <style:style style:name="T23" style:family="text">
      <style:text-properties style:font-name="Liberation Serif" fo:font-size="13pt" style:font-size-asian="13pt" style:font-size-complex="13pt"/>
    </style:style>
    <style:style style:name="T24" style:family="text">
      <style:text-properties officeooo:rsid="00142711"/>
    </style:style>
    <style:style style:name="T25" style:family="text">
      <style:text-properties officeooo:rsid="00165e01"/>
    </style:style>
    <style:style style:name="T26" style:family="text">
      <style:text-properties officeooo:rsid="0017ed64"/>
    </style:style>
    <style:style style:name="T27" style:family="text">
      <style:text-properties officeooo:rsid="001a5a62"/>
    </style:style>
    <style:style style:name="T28" style:family="text">
      <style:text-properties officeooo:rsid="001b81cd"/>
    </style:style>
    <style:style style:name="T29" style:family="text">
      <style:text-properties officeooo:rsid="001cf78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File descriptor</text:p>
      <text:p text:style-name="P10"/>
      <text:p text:style-name="P10">1.1 File descriptor là gì?</text:p>
      <text:p text:style-name="P3">Khi một file được mở, kernel tạo một file descriptor (FD).</text:p>
      <text:p text:style-name="P3">File descriptor là:</text:p>
      <text:p text:style-name="P3">một số nguyên đại diện cho file đang mở</text:p>
      <text:p text:style-name="P6">Ví dụ:</text:p>
      <text:p text:style-name="P3">0 -&gt; stdin</text:p>
      <text:p text:style-name="P3">1 -&gt; stdout</text:p>
      <text:p text:style-name="P3">2 -&gt; stderr</text:p>
      <text:p text:style-name="P3">Các file khác sẽ có descriptor:</text:p>
      <text:p text:style-name="P3">3, 4, 5...</text:p>
      <text:p text:style-name="P3">FD là chỉ số của bảng file descriptor của process. </text:p>
      <text:p text:style-name="P3"/>
      <text:p text:style-name="P10">1.2 Quá trình khi process mở file</text:p>
      <text:p text:style-name="P3"/>
      <text:p text:style-name="P3">Process</text:p>
      <text:p text:style-name="P3"><text:s text:c="3"/>|</text:p>
      <text:p text:style-name="P3">File descriptor table</text:p>
      <text:p text:style-name="P3"><text:s text:c="3"/>|</text:p>
      <text:p text:style-name="P3">Open file description <text:span text:style-name="T2">(File Table)</text:span></text:p>
      <text:p text:style-name="P3"><text:s text:c="3"/>|</text:p>
      <text:p text:style-name="P3"><text:span text:style-name="T1">V</text:span>node</text:p>
      <text:p text:style-name="P3"/>
      <text:p text:style-name="P3">Ý nghĩa:</text:p>
      <text:p text:style-name="P3"><text:span text:style-name="T7">Open file description</text:span> lưu các thông tin:</text:p>
      <text:p text:style-name="P3"><text:span text:style-name="Strong_20_Emphasis"><text:span text:style-name="T17">+ </text:span></text:span><text:span text:style-name="Strong_20_Emphasis"><text:span text:style-name="T16">file status flags</text:span></text:span></text:p>
      <text:list text:style-name="L7">
        <text:list-item>
          <text:p text:style-name="P18">write</text:p>
        </text:list-item>
        <text:list-item>
          <text:p text:style-name="P18">read</text:p>
        </text:list-item>
      </text:list>
      <text:list text:style-name="L8">
        <text:list-item>
          <text:p text:style-name="P19">append</text:p>
        </text:list-item>
      </text:list>
      <text:p text:style-name="P16">+ current offset</text:p>
      <text:p text:style-name="P16">+ poniter tới vnode</text:p>
      <text:p text:style-name="P21">Ví dụ:</text:p>
      <text:section text:style-name="Sect1" text:name="code-block-viewer">
        <text:p text:style-name="P9">File table</text:p>
        <text:p text:style-name="P3"><text:s text:c="2"/>read/write flag</text:p>
        <text:p text:style-name="P3"><text:s text:c="2"/>offset = 120</text:p>
        <text:p text:style-name="P3"><text:s text:c="2"/>pointer -&gt; vnode</text:p>
      </text:section>
      <text:p text:style-name="P8"/>
      <text:p text:style-name="P8">Nếu nhiều descriptor trỏ tới cùng open file description thì chúng chia sẻ offset. </text:p>
      <text:p text:style-name="P8">dup()</text:p>
      <text:p text:style-name="P8">fork()</text:p>
      <text:p text:style-name="P3"/>
      <text:p text:style-name="P10">1.<text:span text:style-name="T24">4</text:span> File Descriptor Table</text:p>
      <text:p text:style-name="P3">Mỗi process có một: File Descriptor Table</text:p>
      <text:p text:style-name="P3">Nó giống như mảng:</text:p>
      <text:p text:style-name="P3"><text:soft-page-break/>FD Table (của process)</text:p>
      <text:p text:style-name="P3">0</text:p>
      <text:p text:style-name="P3">1</text:p>
      <text:p text:style-name="P3">2</text:p>
      <text:p text:style-name="P3">3</text:p>
      <text:p text:style-name="P3">4</text:p>
      <text:p text:style-name="P3">...</text:p>
      <text:p text:style-name="P3">1023</text:p>
      <text:p text:style-name="P3">Mỗi ô trong bảng:</text:p>
      <text:p text:style-name="P3"><text:s text:c="4"/>• chứa con trỏ</text:p>
      <text:p text:style-name="P3"><text:s text:c="4"/>• trỏ tới một cấu trúc trong kernel gọi là: Open File Description (mục nhập bảng file)</text:p>
      <text:p text:style-name="P3"/>
      <text:p text:style-name="P10">1.<text:span text:style-name="T26">5</text:span> Open File Description (Open File Object) là gì?</text:p>
      <text:p text:style-name="P3">Khi bạn gọi open(), kernel tạo ra một cấu trúc trong bộ nhớ, chứa:</text:p>
      <text:p text:style-name="P3"><text:s text:c="4"/>• Con trỏ tới inode của file</text:p>
      <text:p text:style-name="P3"><text:s text:c="4"/>• File offset (vị trí đầu đọc)</text:p>
      <text:p text:style-name="P3"><text:s text:c="4"/>• Flags (O_RDONLY, O_WRONLY, O_APPEND…)</text:p>
      <text:p text:style-name="P3"><text:s text:c="4"/>• Trạng thái mở file</text:p>
      <text:p text:style-name="P3">Cấu trúc này không nằm trong process, mà nằm trong kernel.</text:p>
      <text:p text:style-name="P3"><text:s text:c="4"/>• FD chỉ là số đại diện.</text:p>
      <text:p text:style-name="P3"><text:s text:c="4"/>• Thứ thực sự chứa thông tin là Open File Description.</text:p>
      <text:p text:style-name="P3"/>
      <text:h text:style-name="P1" text:outline-level="2"><text:span text:style-name="T5">1.</text:span><text:span text:style-name="T6">6</text:span><text:span text:style-name="T5"> </text:span><text:span text:style-name="T4">Vnode Table</text:span></text:h>
      <text:p text:style-name="P12"><text:span text:style-name="T19">Bảng này chứa </text:span><text:span text:style-name="Strong_20_Emphasis"><text:span text:style-name="T19">thông tin thật về file</text:span></text:span><text:span text:style-name="T19">:</text:span></text:p>
      <text:list text:style-name="L9">
        <text:list-item>
          <text:p text:style-name="P14">vị trí trên disk</text:p>
        </text:list-item>
        <text:list-item>
          <text:p text:style-name="P14">inode</text:p>
        </text:list-item>
        <text:list-item>
          <text:p text:style-name="P14">filesystem</text:p>
        </text:list-item>
        <text:list-item>
          <text:p text:style-name="P14">metadata</text:p>
        </text:list-item>
      </text:list>
      <text:p text:style-name="P12"><text:span text:style-name="T19">Mỗi </text:span><text:span text:style-name="Strong_20_Emphasis"><text:span text:style-name="T19">file có một vnode riêng</text:span></text:span><text:span text:style-name="T19">.</text:span></text:p>
      <text:p text:style-name="P20"><text:span text:style-name="T7"/></text:p>
      <text:p text:style-name="P23"><text:span text:style-name="T27">1.7 V</text:span>ì sao thiết kế phức tạp như vậy?</text:p>
      <text:p text:style-name="P11"><text:span text:style-name="T19">Vì nó </text:span><text:span text:style-name="Strong_20_Emphasis"><text:span text:style-name="T19">rất linh hoạt</text:span></text:span><text:span text:style-name="T19">.</text:span></text:p>
      <text:h text:style-name="P2" text:outline-level="3"><text:span text:style-name="T28">1</text:span>.<text:span text:style-name="T28">7.</text:span>1 Nhiều process có thể mở cùng một file</text:h>
      <text:p text:style-name="P22">Ví dụ:</text:p>
      <text:section text:style-name="Sect1" text:name="Section1">
        <text:p text:style-name="P5"><text:bookmark text:name="code-block-viewer"/>Process A -&gt; FD 3 -&gt; File table -&gt; vnode(file.txt)</text:p>
        <text:p text:style-name="P4">Process B -&gt; FD 5 -&gt; File table -&gt; vnode(file.txt)</text:p>
      </text:section>
      <text:h text:style-name="P2" text:outline-level="3"><text:span text:style-name="T28">1</text:span>.<text:span text:style-name="T28">7.</text:span>2 Một process có nhiều FD cho cùng file</text:h>
      <text:p text:style-name="P22">Ví dụ:</text:p>
      <text:section text:style-name="Sect1" text:name="Section2">
        <text:p text:style-name="P5"><text:bookmark text:name="code-block-viewer Copy 1"/>FD 3 -&gt; file.txt</text:p>
        <text:p text:style-name="P4">FD 7 -&gt; file.txt</text:p>
      </text:section>
      <text:p text:style-name="P15"><text:soft-page-break/>Điều này xảy ra khi dùng:</text:p>
      <text:section text:style-name="Sect1" text:name="Section3">
        <text:p text:style-name="P5"><text:bookmark text:name="code-block-viewer Copy 2"/>dup()</text:p>
        <text:p text:style-name="P4">dup2()</text:p>
      </text:section>
      <text:h text:style-name="P2" text:outline-level="3"><text:span text:style-name="T29">1.7</text:span>.3 Parent và Child process chia sẻ file</text:h>
      <text:p text:style-name="P15">Khi dùng:</text:p>
      <text:section text:style-name="Sect1" text:name="Section4">
        <text:p text:style-name="P5"><text:bookmark text:name="code-block-viewer Copy 3"/>fork()</text:p>
      </text:section>
      <text:p text:style-name="P11"><text:span text:style-name="T19">Process con </text:span><text:span text:style-name="Strong_20_Emphasis"><text:span text:style-name="T19">thừa hưởng file descriptor của process cha</text:span></text:span><text:span text:style-name="T19">.</text:span></text:p>
      <text:p text:style-name="P22">Ví dụ:</text:p>
      <text:section text:style-name="Sect1" text:name="Section5">
        <text:p text:style-name="P5"><text:bookmark text:name="code-block-viewer Copy 4"/>Parent FD 3</text:p>
        <text:p text:style-name="P4"><text:s text:c="6"/>│</text:p>
        <text:p text:style-name="P4"><text:s text:c="6"/>▼</text:p>
        <text:p text:style-name="P4"><text:s text:c="3"/>File table</text:p>
        <text:p text:style-name="P4"><text:s text:c="6"/>│</text:p>
        <text:p text:style-name="P4"><text:s text:c="6"/>▼</text:p>
        <text:p text:style-name="P4"><text:s text:c="4"/>vnode</text:p>
        <text:p text:style-name="P4"><text:s text:c="6"/>▲</text:p>
        <text:p text:style-name="P4"><text:s text:c="6"/>│</text:p>
        <text:p text:style-name="P4">Child FD 3</text:p>
      </text:section>
      <text:p text:style-name="P17"><text:span text:style-name="T7"/></text:p>
      <text:p text:style-name="P1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4T17:24:42.107148456</dc:date>
    <meta:editing-duration>PT11M55S</meta:editing-duration>
    <meta:editing-cycles>30</meta:editing-cycles>
    <meta:document-statistic meta:table-count="0" meta:image-count="0" meta:object-count="0" meta:page-count="3" meta:paragraph-count="94" meta:word-count="399" meta:character-count="1966" meta:non-whitespace-character-count="1576"/>
  </office:meta>
</office:document-meta>
</file>