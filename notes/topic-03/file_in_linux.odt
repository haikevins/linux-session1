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134in" table:align="left"/>
    </style:style>
    <style:style style:name="Table1.A" style:family="table-column">
      <style:table-column-properties style:column-width="1.3458in"/>
    </style:style>
    <style:style style:name="Table1.B" style:family="table-column">
      <style:table-column-properties style:column-width="1.78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7653in" table:align="left"/>
    </style:style>
    <style:style style:name="Table2.A" style:family="table-column">
      <style:table-column-properties style:column-width="1.5653in"/>
    </style:style>
    <style:style style:name="Table2.B" style:family="table-column">
      <style:table-column-properties style:column-width="2.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2243in" table:align="left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356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" style:family="paragraph" style:parent-style-name="Preformatted_20_Text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" style:family="paragraph" style:parent-style-name="Table_20_Heading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" style:family="paragraph" style:parent-style-name="Heading_20_2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7" style:family="paragraph" style:parent-style-name="Heading_20_3">
      <style:paragraph-properties fo:line-height="100%" fo:text-align="justify" style:justify-single-word="false"/>
      <style:text-properties style:font-name="Liberation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Heading_20_3">
      <style:paragraph-properties fo:line-height="100%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9" style:family="paragraph" style:parent-style-name="Heading_20_2">
      <style:paragraph-properties fo:line-height="100%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10" style:family="paragraph" style:parent-style-name="Heading_20_1">
      <style:paragraph-properties fo:line-height="100%" fo:text-align="justify" style:justify-single-word="false"/>
      <style:text-properties style:font-name="Liberation Serif" fo:font-size="18pt" fo:font-weight="bold" officeooo:paragraph-rsid="000fee44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line-height="100%" fo:text-align="justify" style:justify-single-word="false"/>
    </style:style>
    <style:style style:name="P12" style:family="paragraph" style:parent-style-name="Quotations">
      <style:paragraph-properties fo:line-height="100%" fo:text-align="justify" style:justify-single-word="false"/>
    </style:style>
    <style:style style:name="P13" style:family="paragraph" style:parent-style-name="Text_20_body">
      <style:paragraph-properties fo:line-height="100%" fo:text-align="justify" style:justify-single-word="false"/>
    </style:style>
    <style:style style:name="P14" style:family="paragraph" style:parent-style-name="Text_20_body">
      <style:paragraph-properties fo:line-height="100%" fo:text-align="justify" style:justify-single-word="false"/>
      <style:text-properties officeooo:paragraph-rsid="000fee44"/>
    </style:style>
    <style:style style:name="P15" style:family="paragraph" style:parent-style-name="Heading_20_1">
      <style:paragraph-properties fo:line-height="100%" fo:text-align="justify" style:justify-single-word="false"/>
      <style:text-properties style:font-name="Liberation Serif" fo:font-size="13pt" fo:font-weight="bold" officeooo:paragraph-rsid="000fee44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Liberation Serif" fo:font-size="13pt" fo:font-weight="normal" officeooo:paragraph-rsid="000fee44" style:font-size-asian="13pt" style:font-weight-asian="normal" style:font-size-complex="13pt" style:font-weight-complex="normal"/>
    </style:style>
    <style:style style:name="P17" style:family="paragraph" style:parent-style-name="Text_20_body" style:list-style-name="L1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8" style:family="paragraph" style:parent-style-name="Text_20_body" style:list-style-name="L2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1. Khái niệm và các tính chất của file trong Linux</text:h>
      <text:h text:style-name="P15" text:outline-level="1">1.1 Khái niệm file trong Linux</text:h>
      <text:p text:style-name="P13"><text:span text:style-name="T1">Trong Linux (và các hệ thống UNIX), </text:span><text:span text:style-name="Strong_20_Emphasis"><text:span text:style-name="T1">file là cơ chế trừu tượng cơ bản dùng để lưu trữ và truy xuất dữ liệu</text:span></text:span><text:span text:style-name="T1">. Hầu như mọi tài nguyên của hệ thống đều được biểu diễn dưới dạng file. </text:span></text:p>
      <text:p text:style-name="P6">Nguyên lý thiết kế nổi tiếng của Linux là:</text:p>
      <text:p text:style-name="P12"><text:span text:style-name="Strong_20_Emphasis"><text:span text:style-name="T1">“Everything is a file”</text:span></text:span></text:p>
      <text:p text:style-name="P6">Điều này có nghĩa là không chỉ dữ liệu thông thường mà các tài nguyên khác cũng được biểu diễn như file, ví dụ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Loại tài nguyên</text:p>
            </table:table-cell>
            <table:table-cell table:style-name="Table1.A1" office:value-type="string">
              <text:p text:style-name="P4">Ví dụ</text:p>
            </table:table-cell>
          </table:table-row>
        </table:table-header-rows>
        <table:table-row>
          <table:table-cell table:style-name="Table1.A1" office:value-type="string">
            <text:p text:style-name="P1">File dữ liệu</text:p>
          </table:table-cell>
          <table:table-cell table:style-name="Table1.A1" office:value-type="string">
            <text:p text:style-name="P11"><text:span text:style-name="Source_20_Text"><text:span text:style-name="T1">.txt</text:span></text:span><text:span text:style-name="T1">, </text:span><text:span text:style-name="Source_20_Text"><text:span text:style-name="T1">.c</text:span></text:span><text:span text:style-name="T1">, </text:span><text:span text:style-name="Source_20_Text"><text:span text:style-name="T1">.log</text:span></text:span></text:p>
          </table:table-cell>
        </table:table-row>
        <table:table-row>
          <table:table-cell table:style-name="Table1.A1" office:value-type="string">
            <text:p text:style-name="P1">Thiết bị phần cứng</text:p>
          </table:table-cell>
          <table:table-cell table:style-name="Table1.A1" office:value-type="string">
            <text:p text:style-name="P11"><text:span text:style-name="Source_20_Text"><text:span text:style-name="T1">/dev/sda</text:span></text:span><text:span text:style-name="T1">, </text:span><text:span text:style-name="Source_20_Text"><text:span text:style-name="T1">/dev/tty</text:span></text:span></text:p>
          </table:table-cell>
        </table:table-row>
        <table:table-row>
          <table:table-cell table:style-name="Table1.A1" office:value-type="string">
            <text:p text:style-name="P1">Pipe</text:p>
          </table:table-cell>
          <table:table-cell table:style-name="Table1.A1" office:value-type="string">
            <text:p text:style-name="P1">FIFO</text:p>
          </table:table-cell>
        </table:table-row>
        <table:table-row>
          <table:table-cell table:style-name="Table1.A1" office:value-type="string">
            <text:p text:style-name="P1">Socket</text:p>
          </table:table-cell>
          <table:table-cell table:style-name="Table1.A1" office:value-type="string">
            <text:p text:style-name="P1">IPC</text:p>
          </table:table-cell>
        </table:table-row>
        <table:table-row>
          <table:table-cell table:style-name="Table1.A1" office:value-type="string">
            <text:p text:style-name="P1">Thư mục</text:p>
          </table:table-cell>
          <table:table-cell table:style-name="Table1.A1" office:value-type="string">
            <text:p text:style-name="P1">directory</text:p>
          </table:table-cell>
        </table:table-row>
        <table:table-row>
          <table:table-cell table:style-name="Table1.A1" office:value-type="string">
            <text:p text:style-name="P1">Link</text:p>
          </table:table-cell>
          <table:table-cell table:style-name="Table1.A1" office:value-type="string">
            <text:p text:style-name="P1">symbolic link</text:p>
          </table:table-cell>
        </table:table-row>
      </table:table>
      <text:p text:style-name="P14"><text:span text:style-name="T1">Nhờ mô hình này, Linux có thể sử dụng </text:span><text:span text:style-name="Strong_20_Emphasis"><text:span text:style-name="T1">cùng một cơ chế I/O (open, read, write, close)</text:span></text:span><text:span text:style-name="T1"> cho rất nhiều loại tài nguyên khác nhau.</text:span></text:p>
      <text:p text:style-name="P16"><text:s/></text:p>
      <text:h text:style-name="P9" text:outline-level="2">1.2 Các loại file trong Linux</text:h>
      <text:p text:style-name="P6">Linux hỗ trợ nhiều loại file khác nhau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Loại file</text:p>
            </table:table-cell>
            <table:table-cell table:style-name="Table2.A1" office:value-type="string">
              <text:p text:style-name="P4">Mô tả</text:p>
            </table:table-cell>
          </table:table-row>
        </table:table-header-rows>
        <table:table-row>
          <table:table-cell table:style-name="Table2.A1" office:value-type="string">
            <text:p text:style-name="P11"><text:span text:style-name="Strong_20_Emphasis"><text:span text:style-name="T1">Regular file</text:span></text:span></text:p>
          </table:table-cell>
          <table:table-cell table:style-name="Table2.A1" office:value-type="string">
            <text:p text:style-name="P1">File dữ liệu thông thường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Directory file</text:span></text:span></text:p>
          </table:table-cell>
          <table:table-cell table:style-name="Table2.A1" office:value-type="string">
            <text:p text:style-name="P1">File chứa danh sách file khác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Character device file</text:span></text:span></text:p>
          </table:table-cell>
          <table:table-cell table:style-name="Table2.A1" office:value-type="string">
            <text:p text:style-name="P1">File đại diện thiết bị dạng ký tự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Block device file</text:span></text:span></text:p>
          </table:table-cell>
          <table:table-cell table:style-name="Table2.A1" office:value-type="string">
            <text:p text:style-name="P1">File đại diện thiết bị block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FIFO / Pipe</text:span></text:span></text:p>
          </table:table-cell>
          <table:table-cell table:style-name="Table2.A1" office:value-type="string">
            <text:p text:style-name="P1">File cho IPC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Socket</text:span></text:span></text:p>
          </table:table-cell>
          <table:table-cell table:style-name="Table2.A1" office:value-type="string">
            <text:p text:style-name="P1">File dùng giao tiếp mạng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Symbolic link</text:span></text:span></text:p>
          </table:table-cell>
          <table:table-cell table:style-name="Table2.A1" office:value-type="string">
            <text:p text:style-name="P1">File liên kết</text:p>
          </table:table-cell>
        </table:table-row>
      </table:table>
      <text:p text:style-name="P6">Các file thiết bị thường nằm trong thư mục:</text:p>
      <text:section text:style-name="Sect1" text:name="code-block-viewer">
        <text:p text:style-name="P2">/dev</text:p>
      </text:section>
      <text:h text:style-name="P5" text:outline-level="2"><text:soft-page-break/></text:h>
      <text:h text:style-name="P9" text:outline-level="2">1.3 Các tính chất quan trọng của file trong Linux</text:h>
      <text:h text:style-name="P7" text:outline-level="3">1.3.1 Tính thống nhất của I/O (Universal I/O Model)</text:h>
      <text:p text:style-name="P13"><text:span text:style-name="T1">Linux sử dụng </text:span><text:span text:style-name="Strong_20_Emphasis"><text:span text:style-name="T1">một mô hình I/O thống nhất</text:span></text:span><text:span text:style-name="T1"> cho mọi loại file. </text:span></text:p>
      <text:p text:style-name="P6">Cùng một tập system call có thể dùng cho:</text:p>
      <text:list text:style-name="L1">
        <text:list-item>
          <text:p text:style-name="P17">file thông thường</text:p>
        </text:list-item>
        <text:list-item>
          <text:p text:style-name="P17">thiết bị</text:p>
        </text:list-item>
        <text:list-item>
          <text:p text:style-name="P17">pipe</text:p>
        </text:list-item>
        <text:list-item>
          <text:p text:style-name="P17">socket</text:p>
        </text:list-item>
      </text:list>
      <text:p text:style-name="P19">Ví dụ:</text:p>
      <text:section text:style-name="Sect1" text:name="Section1">
        <text:p text:style-name="P2"><text:bookmark text:name="code-block-viewer"/>open()</text:p>
        <text:p text:style-name="P3">read()</text:p>
        <text:p text:style-name="P3">write()</text:p>
        <text:p text:style-name="P3">close()</text:p>
      </text:section>
      <text:h text:style-name="P7" text:outline-level="3">1.3.2 File có cấu trúc byte stream</text:h>
      <text:p text:style-name="P6">Linux xem nội dung file là:</text:p>
      <text:section text:style-name="Sect1" text:name="Section2">
        <text:p text:style-name="P2"><text:bookmark text:name="code-block-viewer Copy 1"/>chuỗi các byte liên tiếp</text:p>
      </text:section>
      <text:p text:style-name="P13"><text:span text:style-name="T1">Kernel </text:span><text:span text:style-name="Strong_20_Emphasis"><text:span text:style-name="T1">không quan tâm định dạng dữ liệu</text:span></text:span><text:span text:style-name="T1"> bên trong file.</text:span></text:p>
      <text:p text:style-name="P19">Ví dụ:</text:p>
      <text:list text:style-name="L2">
        <text:list-item>
          <text:p text:style-name="P18">text</text:p>
        </text:list-item>
        <text:list-item>
          <text:p text:style-name="P18">binary</text:p>
        </text:list-item>
        <text:list-item>
          <text:p text:style-name="P18">image</text:p>
        </text:list-item>
        <text:list-item>
          <text:p text:style-name="P18">executable</text:p>
        </text:list-item>
      </text:list>
      <text:p text:style-name="P13"><text:span text:style-name="T1">Tất cả đều chỉ là </text:span><text:span text:style-name="Strong_20_Emphasis"><text:span text:style-name="T1">dòng byte</text:span></text:span><text:span text:style-name="T1">.</text:span></text:p>
      <text:h text:style-name="P7" text:outline-level="3">1.3.3 File có metadata</text:h>
      <text:p text:style-name="P13"><text:span text:style-name="T1">Mỗi file được mô tả bởi một </text:span><text:span text:style-name="Strong_20_Emphasis"><text:span text:style-name="T1">inode</text:span></text:span><text:span text:style-name="T1"> chứa metadata như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">Thuộc tính</text:p>
            </table:table-cell>
            <table:table-cell table:style-name="Table3.A1" office:value-type="string">
              <text:p text:style-name="P4">Ý nghĩa</text:p>
            </table:table-cell>
          </table:table-row>
        </table:table-header-rows>
        <table:table-row>
          <table:table-cell table:style-name="Table3.A1" office:value-type="string">
            <text:p text:style-name="P1">Owner</text:p>
          </table:table-cell>
          <table:table-cell table:style-name="Table3.A1" office:value-type="string">
            <text:p text:style-name="P1">Chủ sở hữu</text:p>
          </table:table-cell>
        </table:table-row>
        <table:table-row>
          <table:table-cell table:style-name="Table3.A1" office:value-type="string">
            <text:p text:style-name="P1">Permission</text:p>
          </table:table-cell>
          <table:table-cell table:style-name="Table3.A1" office:value-type="string">
            <text:p text:style-name="P1">Quyền truy cập</text:p>
          </table:table-cell>
        </table:table-row>
        <table:table-row>
          <table:table-cell table:style-name="Table3.A1" office:value-type="string">
            <text:p text:style-name="P1">Size</text:p>
          </table:table-cell>
          <table:table-cell table:style-name="Table3.A1" office:value-type="string">
            <text:p text:style-name="P1">Kích thước</text:p>
          </table:table-cell>
        </table:table-row>
        <table:table-row>
          <table:table-cell table:style-name="Table3.A1" office:value-type="string">
            <text:p text:style-name="P1">Timestamp</text:p>
          </table:table-cell>
          <table:table-cell table:style-name="Table3.A1" office:value-type="string">
            <text:p text:style-name="P1">Thời gian tạo / sửa</text:p>
          </table:table-cell>
        </table:table-row>
        <table:table-row>
          <table:table-cell table:style-name="Table3.A1" office:value-type="string">
            <text:p text:style-name="P1">Link count</text:p>
          </table:table-cell>
          <table:table-cell table:style-name="Table3.A1" office:value-type="string">
            <text:p text:style-name="P1">số liên kết</text:p>
          </table:table-cell>
        </table:table-row>
        <table:table-row>
          <table:table-cell table:style-name="Table3.A1" office:value-type="string">
            <text:p text:style-name="P1">File type</text:p>
          </table:table-cell>
          <table:table-cell table:style-name="Table3.A1" office:value-type="string">
            <text:p text:style-name="P1">loại file</text:p>
          </table:table-cell>
        </table:table-row>
      </table:table>
      <text:h text:style-name="P8" text:outline-level="3"><text:soft-page-break/><text:span text:style-name="T2">1.3.4 File có quyền truy cập</text:span></text:h>
      <text:p text:style-name="P13"><text:span text:style-name="T1">Linux sử dụng </text:span><text:span text:style-name="Strong_20_Emphasis"><text:span text:style-name="T1">permission model</text:span></text:span><text:span text:style-name="T1">:</text:span></text:p>
      <text:section text:style-name="Sect1" text:name="Section3">
        <text:p text:style-name="P2"><text:bookmark text:name="code-block-viewer Copy 2"/>r <text:s/>read</text:p>
        <text:p text:style-name="P3">w <text:s/>write</text:p>
        <text:p text:style-name="P3">x <text:s/>execute</text:p>
      </text:section>
      <text:p text:style-name="P6">Cho ba nhóm:</text:p>
      <text:section text:style-name="Sect1" text:name="Section4">
        <text:p text:style-name="P2"><text:bookmark text:name="code-block-viewer Copy 3"/>owner</text:p>
        <text:p text:style-name="P3">group</text:p>
        <text:p text:style-name="P3">others</text:p>
      </text:section>
      <text:p text:style-name="P19">Ví dụ:</text:p>
      <text:section text:style-name="Sect1" text:name="Section5">
        <text:p text:style-name="P2"><text:bookmark text:name="code-block-viewer Copy 4"/>-rwxr-xr-x</text:p>
      </text:section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14T15:49:58.249824081</dc:date>
    <meta:editing-duration>PT5M14S</meta:editing-duration>
    <meta:editing-cycles>12</meta:editing-cycles>
    <meta:document-statistic meta:table-count="3" meta:image-count="0" meta:object-count="0" meta:page-count="3" meta:paragraph-count="92" meta:word-count="401" meta:character-count="1892" meta:non-whitespace-character-count="1584"/>
  </office:meta>
</office:document-meta>
</file>