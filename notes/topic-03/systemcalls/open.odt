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line-height="100%" fo:text-align="justify" style:justify-single-word="false"/>
      <style:text-properties style:font-name="Liberation Serif" fo:font-size="13pt" style:font-size-asian="13pt" style:font-size-complex="13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uy trình open:</text:p>
      <text:p text:style-name="P1"><text:s text:c="4"/>1. Nếu O_CREAT → tạo file trên disk (nếu chưa tồn tại)</text:p>
      <text:p text:style-name="P1"><text:s text:c="4"/>2. Tạo open file description trong kernel</text:p>
      <text:p text:style-name="P1"><text:s text:c="4"/>3. Tìm FD nhỏ nhất chưa được sử dụng</text:p>
      <text:p text:style-name="P1"><text:s text:c="4"/>4. FD trỏ tới open file description</text:p>
      <text:p text:style-name="P1"><text:s text:c="4"/>5. Trả về FD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vi" fo:country="V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vi" fo:country="VN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3-14T16:23:50.414647467</dc:date>
    <meta:editing-duration>PT19S</meta:editing-duration>
    <meta:editing-cycles>1</meta:editing-cycles>
    <meta:document-statistic meta:table-count="0" meta:image-count="0" meta:object-count="0" meta:page-count="1" meta:paragraph-count="6" meta:word-count="42" meta:character-count="213" meta:non-whitespace-character-count="157"/>
    <meta:generator>LibreOffice/24.2.7.2$Linux_X86_64 LibreOffice_project/420$Build-2</meta:generator>
  </office:meta>
</office:document-meta>
</file>