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y trình close:</text:p>
      <text:p text:style-name="P1"><text:s text:c="4"/>1. Kernel kiểm tra fd hợp lệ</text:p>
      <text:p text:style-name="P1"><text:s text:c="4"/>2. Xóa entry fd khỏi FD table</text:p>
      <text:p text:style-name="P1"><text:s text:c="4"/>3. Giảm reference count của open file description</text:p>
      <text:p text:style-name="P1"><text:s text:c="4"/>4. Nếu reference count == 0:</text:p>
      <text:p text:style-name="P1"><text:s text:c="8"/>◦ Giải phóng open file description</text:p>
      <text:p text:style-name="P1"><text:s text:c="8"/>◦ Cập nhật inode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22:49.464316063</dc:date>
    <meta:editing-duration>PT1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1" meta:character-count="232" meta:non-whitespace-character-count="166"/>
  </office:meta>
</office:document-meta>
</file>