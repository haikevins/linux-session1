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paragraph-properties fo:line-height="100%" fo:text-align="justify" style:justify-single-word="false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P2" style:family="paragraph" style:parent-style-name="Preformatted_20_Text">
      <style:paragraph-properties fo:line-height="100%" fo:text-align="justify" style:justify-single-word="false"/>
      <style:text-properties style:font-name="Liberation Serif" fo:font-size="13pt" style:font-size-asian="13pt" style:font-size-complex="13pt"/>
    </style:style>
    <style:style style:name="P3" style:family="paragraph" style:parent-style-name="Preformatted_20_Text">
      <style:paragraph-properties fo:line-height="100%" fo:text-align="justify" style:justify-single-word="false"/>
      <style:text-properties style:font-name="Liberation Serif" fo:font-size="13pt" officeooo:paragraph-rsid="00184df6" style:font-size-asian="13pt" style:font-size-complex="13pt"/>
    </style:style>
    <style:style style:name="P4" style:family="paragraph" style:parent-style-name="Preformatted_20_Text">
      <style:paragraph-properties fo:margin-left="0in" fo:margin-right="0in" fo:line-height="100%" fo:text-indent="0in" style:auto-text-indent="false"/>
      <style:text-properties style:font-name="Liberation Serif" fo:font-size="13pt" style:font-size-asian="13pt" style:font-size-complex="13pt"/>
    </style:style>
    <style:style style:name="P5" style:family="paragraph" style:parent-style-name="Preformatted_20_Text">
      <style:paragraph-properties fo:line-height="100%" fo:text-align="justify" style:justify-single-word="false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P6" style:family="paragraph" style:parent-style-name="Text_20_body">
      <style:paragraph-properties fo:line-height="100%"/>
      <style:text-properties style:font-name="Liberation Serif" fo:font-size="13pt" style:font-size-asian="13pt" style:font-size-complex="13pt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1. Có bao nhiêu FD một process có thể mở?</text:p>
      <text:p text:style-name="P2">Trả lời chuẩn:</text:p>
      <text:p text:style-name="P2"><text:s text:c="4"/>• POSIX đảm bảo tối thiểu 16</text:p>
      <text:p text:style-name="P2"><text:s text:c="4"/>• Giá trị thực tế phụ thuộc hệ thống</text:p>
      <text:p text:style-name="P2"><text:s text:c="4"/>• Có thể lấy bằng sysconf(_SC_OPEN_MAX)</text:p>
      <text:p text:style-name="P2"><text:s text:c="4"/>• Bị giới hạn bởi soft/hard limit</text:p>
      <text:p text:style-name="P2"><text:s text:c="4"/>• Thường mặc định Linux là 1024</text:p>
      <text:h text:style-name="P1" text:outline-level="3">Kiểm tra trong Linux</text:h>
      <text:p text:style-name="P6">Giới hạn hiện tại:</text:p>
      <text:section text:style-name="Sect1" text:name="code-block-viewer">
        <text:p text:style-name="P4">ulimit -n</text:p>
      </text:section>
      <text:p text:style-name="P6">Ví dụ:</text:p>
      <text:section text:style-name="Sect1" text:name="Section1">
        <text:p text:style-name="P4"><text:bookmark text:name="code-block-viewer"/>1024</text:p>
      </text:section>
      <text:p text:style-name="P5">2. close() luôn xóa file descriptor, nhưng không phải lúc nào cũng xóa open file description?</text:p>
      <text:p text:style-name="P2">Khi bạn gọi:</text:p>
      <text:p text:style-name="P2">close(fd);</text:p>
      <text:p text:style-name="P2">Kernel làm 2 việc chính:</text:p>
      <text:p text:style-name="P2">- Xóa file descriptor (FD)</text:p>
      <text:p text:style-name="P2">Trong process có bảng FD:</text:p>
      <text:p text:style-name="P2">FD table:</text:p>
      <text:p text:style-name="P2">0</text:p>
      <text:p text:style-name="P2">1</text:p>
      <text:p text:style-name="P2">2</text:p>
      <text:p text:style-name="P2">3 → Open file description</text:p>
      <text:p text:style-name="P2">Sau close(3):</text:p>
      <text:p text:style-name="P2">FD table:</text:p>
      <text:p text:style-name="P2">0</text:p>
      <text:p text:style-name="P2">1</text:p>
      <text:p text:style-name="P2">2</text:p>
      <text:p text:style-name="P2">3 → NULL</text:p>
      <text:p text:style-name="P2">Phần này chắc chắn xảy ra.</text:p>
      <text:p text:style-name="P2">- Giảm reference count của open file description</text:p>
      <text:p text:style-name="P2">Open file description trong kernel có một biến:</text:p>
      <text:p text:style-name="P3">reference_count</text:p>
      <text:p text:style-name="P2">Nếu chỉ có 1 FD trỏ tới nó:</text:p>
      <text:p text:style-name="P3">reference_count = 1</text:p>
      <text:p text:style-name="P2">Sau close(fd):</text:p>
      <text:p text:style-name="P3">reference_count = 0</text:p>
      <text:p text:style-name="P2">→ Kernel mới xóa open file description.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vi" fo:country="VN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14T17:26:11.296716804</dc:date>
    <meta:editing-duration>PT2M42S</meta:editing-duration>
    <meta:editing-cycles>7</meta:editing-cycles>
    <meta:generator>LibreOffice/24.2.7.2$Linux_X86_64 LibreOffice_project/420$Build-2</meta:generator>
    <meta:document-statistic meta:table-count="0" meta:image-count="0" meta:object-count="0" meta:page-count="1" meta:paragraph-count="38" meta:word-count="163" meta:character-count="813" meta:non-whitespace-character-count="668"/>
  </office:meta>
</office:document-meta>
</file>