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️. Khái niệm vị trí đầu đọc file (File Pointer / File Offset)</text:p>
      <text:p text:style-name="P1">Trong Linux, khi một tiến trình mở file bằng open(), kernel tạo ra một open file object.</text:p>
      <text:p text:style-name="P1">Trong cấu trúc này có một trường rất quan trọng:</text:p>
      <text:p text:style-name="P1">offset field – lưu vị trí hiện tại trong file mà thao tác đọc/ghi tiếp theo sẽ diễn ra.</text:p>
      <text:p text:style-name="P1">Nói cách khác:</text:p>
      <text:p text:style-name="P1"><text:s text:c="4"/>• Vị trí đầu đọc file = byte offset hiện tại tính từ đầu file</text:p>
      <text:p text:style-name="P1"><text:s text:c="4"/>• Đơn vị: byte</text:p>
      <text:p text:style-name="P1"><text:s text:c="4"/>• Giá trị ban đầu: 0 (khi vừa mở file)</text:p>
      <text:p text:style-name="P1"/>
      <text:p text:style-name="P2">2️. Vị trí đầu đọc nằm ở đâu?</text:p>
      <text:p text:style-name="P1">File offset không nằm trong inode mà nó nằm trong open file object (open file description).</text:p>
      <text:p text:style-name="P1">Vì vậy:</text:p>
      <text:p text:style-name="P1"><text:s text:c="4"/>• Mỗi lần open() → tạo một open file object mới</text:p>
      <text:p text:style-name="P1"><text:s text:c="4"/>• Mỗi open file object có offset riêng</text:p>
      <text:p text:style-name="P1"/>
      <text:p text:style-name="P2">3️. Cách offset thay đổi</text:p>
      <text:p text:style-name="P1">- Khi đọc file</text:p>
      <text:p text:style-name="P1">read(fd, buf, count);</text:p>
      <text:p text:style-name="P1">Kernel:</text:p>
      <text:p text:style-name="P1"><text:s text:c="4"/>• Đọc từ vị trí offset hiện tại</text:p>
      <text:p text:style-name="P1"><text:s text:c="4"/>• Sau khi đọc x byte</text:p>
      <text:p text:style-name="P1"><text:s text:c="4"/>• offset = offset + x</text:p>
      <text:p text:style-name="P1">- Khi ghi file</text:p>
      <text:p text:style-name="P1">write(fd, buf, count);</text:p>
      <text:p text:style-name="P1">Kernel:</text:p>
      <text:p text:style-name="P1"><text:s text:c="4"/>• Ghi tại vị trí offset hiện tại</text:p>
      <text:p text:style-name="P1"><text:s text:c="4"/>• Sau khi ghi x byte</text:p>
      <text:p text:style-name="P1"><text:s text:c="4"/>• offset = offset + x</text:p>
      <text:p text:style-name="P1">- Khi di chuyển thủ công (lseek)</text:p>
      <text:p text:style-name="P1">lseek(fd, offset, whence);</text:p>
      <text:p text:style-name="P1">Tham số whence cho phép tính lại offset:</text:p>
      <text:p text:style-name="P1">whence</text:p>
      <text:p text:style-name="P1">Ý nghĩa:</text:p>
      <text:p text:style-name="P1">SEEK_SET từ đầu file</text:p>
      <text:p text:style-name="P1">SEEK_CUR từ vị trí hiện tại</text:p>
      <text:p text:style-name="P1">SEEK_END từ cuối file</text:p>
      <text:p text:style-name="P1">Sau lệnh này, offset được cập nhật thành giá trị mới.</text:p>
      <text:p text:style-name="P1"/>
      <text:p text:style-name="P2">4️. Tính chất quan trọng của vị trí đầu đọc</text:p>
      <text:p text:style-name="P3">4.1. Offset là per-open, không phải per-file</text:p>
      <text:p text:style-name="P1">Nếu hai tiến trình cùng mở một file:</text:p>
      <text:p text:style-name="P1">fd1 = open("a.txt", O_RDONLY);</text:p>
      <text:p text:style-name="P1">fd2 = open("a.txt", O_RDONLY);</text:p>
      <text:p text:style-name="P1">→ Có 2 open file object</text:p>
      <text:p text:style-name="P1">→ Có 2 offset độc lập</text:p>
      <text:p text:style-name="P3">4.2. Nếu fork() thì offset có thể được chia sẻ</text:p>
      <text:p text:style-name="P1">Nếu tiến trình:</text:p>
      <text:p text:style-name="P1">fd = open("a.txt", O_RDONLY);</text:p>
      <text:p text:style-name="P1"><text:soft-page-break/>fork();</text:p>
      <text:p text:style-name="P1">→ Tiến trình con và cha dùng chung open file object</text:p>
      <text:p text:style-name="P1">→ Offset được chia sẻ</text:p>
      <text:p text:style-name="P1">Vì file descriptor table của tiến trình con trỏ tới cùng open file object.</text:p>
      <text:p text:style-name="P3">4.3. Offset chỉ áp dụng cho file có thể seek</text:p>
      <text:p text:style-name="P1"><text:s text:c="4"/>• Regular file → có offset</text:p>
      <text:p text:style-name="P1"><text:s text:c="4"/>• Device file → có thể không hỗ trợ seek</text:p>
      <text:p text:style-name="P1"><text:s text:c="4"/>• Pipe / FIFO → không có offset (chỉ đọc tuần tự)</text:p>
      <text:p text:style-name="P1"/>
      <text:p text:style-name="P2">5️. Ý nghĩa trong thiết kế kernel</text:p>
      <text:p text:style-name="P1">File offset giúp:</text:p>
      <text:p text:style-name="P1"><text:s text:c="4"/>• Hỗ trợ truy cập tuần tự</text:p>
      <text:p text:style-name="P1"><text:s text:c="4"/>• Hỗ trợ truy cập ngẫu nhiên</text:p>
      <text:p text:style-name="P1"><text:s text:c="4"/>• Tách biệt metadata (inode) khỏi trạng thái truy cập (file object)</text:p>
      <text:p text:style-name="P1"><text:s text:c="4"/>• Cho phép nhiều tiến trình truy cập cùng file nhưng giữ trạng thái riêng</text:p>
      <text:p text:style-name="P1">Đây là một quyết định thiết kế rất quan trọng của VF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14T16:19:42.459426689</dc:date>
    <meta:editing-duration>PT44S</meta:editing-duration>
    <meta:editing-cycles>3</meta:editing-cycles>
    <meta:document-statistic meta:table-count="0" meta:image-count="0" meta:object-count="0" meta:page-count="2" meta:paragraph-count="60" meta:word-count="436" meta:character-count="2104" meta:non-whitespace-character-count="1655"/>
  </office:meta>
</office:document-meta>
</file>