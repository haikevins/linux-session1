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60000019E0FA53176.png" manifest:media-type="image/png"/>
  <manifest:file-entry manifest:full-path="Pictures/100000000000013A000001208B61B7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611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Heading_20_1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" style:family="paragraph" style:parent-style-name="Heading_20_1">
      <style:paragraph-properties fo:margin-top="0.0598in" fo:margin-bottom="0.0598in" style:contextual-spacing="false" fo:line-height="100%" fo:text-align="center" style:justify-single-word="false"/>
      <style:text-properties style:font-name="Liberation Seri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Heading_20_2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4" style:family="paragraph" style:parent-style-name="Heading_20_2">
      <style:paragraph-properties fo:margin-top="0.0598in" fo:margin-bottom="0.0598in" style:contextual-spacing="false" fo:line-height="100%"/>
    </style:style>
    <style:style style:name="P5" style:family="paragraph" style:parent-style-name="Heading_20_2">
      <style:paragraph-properties fo:margin-top="0.0598in" fo:margin-bottom="0.0598in" style:contextual-spacing="false" fo:line-height="100%"/>
      <style:text-properties officeooo:paragraph-rsid="001b7199"/>
    </style:style>
    <style:style style:name="P6" style:family="paragraph" style:parent-style-name="Heading_20_3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7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9101d" style:font-size-asian="13pt" style:font-size-complex="13pt"/>
    </style:style>
    <style:style style:name="P8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92a5f" style:font-size-asian="13pt" style:font-size-complex="13pt"/>
    </style:style>
    <style:style style:name="P9" style:family="paragraph" style:parent-style-name="Preformatted_20_Text">
      <style:paragraph-properties fo:margin-top="0.0598in" fo:margin-bottom="0.0598in" style:contextual-spacing="false" fo:line-height="100%"/>
      <style:text-properties style:font-name="Liberation Serif" fo:font-size="13pt" officeooo:paragraph-rsid="00192a5f" style:font-size-asian="13pt" style:font-size-complex="13pt"/>
    </style:style>
    <style:style style:name="P10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aefcb" style:font-size-asian="13pt" style:font-size-complex="13pt"/>
    </style:style>
    <style:style style:name="P11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b0c64" style:font-size-asian="13pt" style:font-size-complex="13pt"/>
    </style:style>
    <style:style style:name="P12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b7199" style:font-size-asian="13pt" style:font-size-complex="13pt"/>
    </style:style>
    <style:style style:name="P13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b7cbb" style:font-size-asian="13pt" style:font-size-complex="13pt"/>
    </style:style>
    <style:style style:name="P14" style:family="paragraph" style:parent-style-name="Preformatted_20_Text">
      <style:paragraph-properties fo:margin-top="0.0598in" fo:margin-bottom="0.0598in" style:contextual-spacing="false" fo:line-height="100%"/>
      <style:text-properties style:font-name="Liberation Serif" fo:font-size="13pt" officeooo:paragraph-rsid="001b7cbb" style:font-size-asian="13pt" style:font-size-complex="13pt"/>
    </style:style>
    <style:style style:name="P15" style:family="paragraph" style:parent-style-name="Quotations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6" style:family="paragraph" style:parent-style-name="Text_20_body" style:list-style-name="L1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7" style:family="paragraph" style:parent-style-name="Text_20_body" style:list-style-name="L3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8" style:family="paragraph" style:parent-style-name="Text_20_body" style:list-style-name="L5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9" style:family="paragraph" style:parent-style-name="Text_20_body" style:list-style-name="L8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0" style:family="paragraph" style:parent-style-name="Text_20_body" style:list-style-name="L12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1" style:family="paragraph" style:parent-style-name="Text_20_body" style:list-style-name="L13">
      <style:paragraph-properties fo:margin-top="0.0598in" fo:margin-bottom="0.0598in" style:contextual-spacing="false" fo:line-height="100%"/>
      <style:text-properties style:font-name="Liberation Serif" fo:font-size="13pt" officeooo:paragraph-rsid="001b7199" style:font-size-asian="13pt" style:font-size-complex="13pt"/>
    </style:style>
    <style:style style:name="P22" style:family="paragraph" style:parent-style-name="Text_20_body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3" style:family="paragraph" style:parent-style-name="Text_20_body">
      <style:paragraph-properties fo:margin-top="0.0598in" fo:margin-bottom="0.0598in" style:contextual-spacing="false" fo:line-height="100%" fo:text-align="center" style:justify-single-word="false"/>
      <style:text-properties style:font-name="Liberation Seri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Text_20_body" style:list-style-name="L2">
      <style:paragraph-properties fo:margin-top="0.0598in" fo:margin-bottom="0.0598in" style:contextual-spacing="false" fo:line-height="100%"/>
    </style:style>
    <style:style style:name="P25" style:family="paragraph" style:parent-style-name="Text_20_body" style:list-style-name="L4">
      <style:paragraph-properties fo:margin-top="0.0598in" fo:margin-bottom="0.0598in" style:contextual-spacing="false" fo:line-height="100%"/>
    </style:style>
    <style:style style:name="P26" style:family="paragraph" style:parent-style-name="Text_20_body" style:list-style-name="L5">
      <style:paragraph-properties fo:margin-top="0.0598in" fo:margin-bottom="0.0598in" style:contextual-spacing="false" fo:line-height="100%"/>
    </style:style>
    <style:style style:name="P27" style:family="paragraph" style:parent-style-name="Text_20_body" style:list-style-name="L6">
      <style:paragraph-properties fo:margin-top="0.0598in" fo:margin-bottom="0.0598in" style:contextual-spacing="false" fo:line-height="100%"/>
    </style:style>
    <style:style style:name="P28" style:family="paragraph" style:parent-style-name="Text_20_body" style:list-style-name="L7">
      <style:paragraph-properties fo:margin-top="0.0598in" fo:margin-bottom="0.0598in" style:contextual-spacing="false" fo:line-height="100%"/>
    </style:style>
    <style:style style:name="P29" style:family="paragraph" style:parent-style-name="Text_20_body" style:list-style-name="L9">
      <style:paragraph-properties fo:margin-top="0.0598in" fo:margin-bottom="0.0598in" style:contextual-spacing="false" fo:line-height="100%"/>
    </style:style>
    <style:style style:name="P30" style:family="paragraph" style:parent-style-name="Text_20_body" style:list-style-name="L10">
      <style:paragraph-properties fo:margin-top="0.0598in" fo:margin-bottom="0.0598in" style:contextual-spacing="false" fo:line-height="100%"/>
    </style:style>
    <style:style style:name="P31" style:family="paragraph" style:parent-style-name="Text_20_body" style:list-style-name="L11">
      <style:paragraph-properties fo:margin-top="0.0598in" fo:margin-bottom="0.0598in" style:contextual-spacing="false" fo:line-height="100%"/>
    </style:style>
    <style:style style:name="P32" style:family="paragraph" style:parent-style-name="Text_20_body" style:list-style-name="L13">
      <style:paragraph-properties fo:margin-top="0.0598in" fo:margin-bottom="0.0598in" style:contextual-spacing="false" fo:line-height="100%"/>
    </style:style>
    <style:style style:name="P33" style:family="paragraph" style:parent-style-name="Text_20_body">
      <style:paragraph-properties fo:margin-top="0.0598in" fo:margin-bottom="0.0598in" style:contextual-spacing="false" fo:line-height="100%"/>
    </style:style>
    <style:style style:name="T1" style:family="text">
      <style:text-properties style:font-name="Liberation Serif" fo:font-size="13pt" style:font-size-asian="13pt" style:font-size-complex="13pt"/>
    </style:style>
    <style:style style:name="T2" style:family="text">
      <style:text-properties style:font-name="Liberation Serif" fo:font-size="13pt" officeooo:rsid="00259b95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Giới thiệu về Socket</text:h>
      <text:h text:style-name="P3" text:outline-level="2">1.1. Khái niệm Socket</text:h>
      <text:p text:style-name="P33"><text:span text:style-name="Strong_20_Emphasis"><text:span text:style-name="T1">Socket</text:span></text:span><text:span text:style-name="T1"> là một cơ chế giao tiếp (IPC) cho phép </text:span><text:span text:style-name="Strong_20_Emphasis"><text:span text:style-name="T1">trao đổi dữ liệu giữa các tiến trình</text:span></text:span><text:span text:style-name="T1">, có thể:</text:span></text:p>
      <text:list text:style-name="L1">
        <text:list-item>
          <text:p text:style-name="P16">Trên cùng một máy (local) </text:p>
        </text:list-item>
        <text:list-item>
          <text:p text:style-name="P16">Hoặc giữa các máy khác nhau qua mạng </text:p>
        </text:list-item>
      </text:list>
      <text:p text:style-name="P22">Có thể hiểu:</text:p>
      <text:p text:style-name="P15">Socket = “cổng giao tiếp” giữa ứng dụng và tầng mạng (TCP/IP)</text:p>
      <text:p text:style-name="P22">Theo kiến trúc Client–Server:</text:p>
      <text:list text:style-name="L2">
        <text:list-item>
          <text:p text:style-name="P24"><text:span text:style-name="Strong_20_Emphasis"><text:span text:style-name="T1">Server</text:span></text:span><text:span text:style-name="T1">: chờ kết nối </text:span></text:p>
        </text:list-item>
        <text:list-item>
          <text:p text:style-name="P24"><text:span text:style-name="Strong_20_Emphasis"><text:span text:style-name="T1">Client</text:span></text:span><text:span text:style-name="T1">: chủ động kết nối</text:span></text:p>
        </text:list-item>
      </text:list>
      <text:h text:style-name="P3" text:outline-level="2">1.2. Vai trò trong Embedded Linux</text:h>
      <text:p text:style-name="P22">Trong hệ thống Embedded Linux:</text:p>
      <text:list text:style-name="L3">
        <text:list-item>
          <text:p text:style-name="P17">Dùng để giao tiếp giữa các thiết bị (IoT, router, gateway…) </text:p>
        </text:list-item>
        <text:list-item>
          <text:p text:style-name="P17">Triển khai các dịch vụ: </text:p>
          <text:list>
            <text:list-item>
              <text:p text:style-name="P17">HTTP (web server) </text:p>
            </text:list-item>
            <text:list-item>
              <text:p text:style-name="P17">SSH </text:p>
            </text:list-item>
            <text:list-item>
              <text:p text:style-name="P17">Telnet </text:p>
            </text:list-item>
            <text:list-item>
              <text:p text:style-name="P17">MQTT, TCP/UDP custom protocol</text:p>
            </text:list-item>
          </text:list>
        </text:list-item>
      </text:list>
      <text:h text:style-name="P3" text:outline-level="2">1.3. Các loại Socket phổ biến</text:h>
      <text:h text:style-name="P6" text:outline-level="3">a. Phân theo domain (địa chỉ)</text:h>
      <text:list text:style-name="L4">
        <text:list-item>
          <text:p text:style-name="P25"><text:span text:style-name="Strong_20_Emphasis"><text:span text:style-name="T1">AF_UNIX (Local socket)</text:span></text:span><text:span text:style-name="T1">: giao tiếp trong cùng máy </text:span></text:p>
        </text:list-item>
        <text:list-item>
          <text:p text:style-name="P25"><text:span text:style-name="Strong_20_Emphasis"><text:span text:style-name="T1">AF_INET</text:span></text:span><text:span text:style-name="T1">: IPv4 </text:span></text:p>
        </text:list-item>
        <text:list-item>
          <text:p text:style-name="P25"><text:span text:style-name="Strong_20_Emphasis"><text:span text:style-name="T1">AF_INET6</text:span></text:span><text:span text:style-name="T1">: IPv6 </text:span></text:p>
        </text:list-item>
      </text:list>
      <text:h text:style-name="P6" text:outline-level="3">b. Phân theo kiểu truyền</text:h>
      <text:list text:style-name="L5">
        <text:list-item>
          <text:p text:style-name="P26"><text:span text:style-name="Strong_20_Emphasis"><text:span text:style-name="T1">SOCK_STREAM (TCP)</text:span></text:span><text:span text:style-name="T1"> </text:span></text:p>
          <text:list>
            <text:list-item>
              <text:p text:style-name="P18">Kết nối (connection-oriented) </text:p>
            </text:list-item>
            <text:list-item>
              <text:p text:style-name="P18">Đảm bảo dữ liệu, thứ tự </text:p>
            </text:list-item>
          </text:list>
        </text:list-item>
        <text:list-item>
          <text:p text:style-name="P26"><text:span text:style-name="Strong_20_Emphasis"><text:span text:style-name="T1">SOCK_DGRAM (UDP)</text:span></text:span><text:span text:style-name="T1"> </text:span></text:p>
          <text:list>
            <text:list-item>
              <text:p text:style-name="P18">Không kết nối (connectionless) </text:p>
            </text:list-item>
            <text:list-item>
              <text:p text:style-name="P18">Nhanh nhưng không đảm bảo</text:p>
            </text:list-item>
          </text:list>
        </text:list-item>
      </text:list>
      <text:h text:style-name="P1" text:outline-level="1"><text:soft-page-break/>2. Các thủ tục khi lập trình Socket</text:h>
      <text:p text:style-name="P22"><draw:frame draw:style-name="fr2" draw:name="Image1" text:anchor-type="char" svg:width="3.2055in" svg:height="2.9409in" draw:z-index="0"><draw:image xlink:href="Pictures/100000000000013A000001208B61B7AA.png" xlink:type="simple" xlink:show="embed" xlink:actuate="onLoad" draw:mime-type="image/png"/></draw:frame></text:p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Quy trình Socket với TCP</text:h>
      <text:p text:style-name="P23"><draw:frame draw:style-name="fr1" draw:name="Image2" text:anchor-type="char" svg:width="4.2701in" svg:height="3.4134in" draw:z-index="1"><draw:image xlink:href="Pictures/10000000000002060000019E0FA5317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Quy trình Socket với UDP</text:h>
      <text:h text:style-name="P1" text:outline-level="1">3. Các hàm cơ bản trong lập trình Socket</text:h>
      <text:p text:style-name="P22">Dưới đây là các hàm quan trọng nhất:</text:p>
      <text:h text:style-name="P4" text:outline-level="2"><text:span text:style-name="T1">3.1. </text:span><text:span text:style-name="Source_20_Text"><text:span text:style-name="T1">socket()</text:span></text:span></text:h>
      <text:h text:style-name="P6" text:outline-level="3">Chức năng:</text:h>
      <text:p text:style-name="P22">Tạo socket</text:p>
      <text:h text:style-name="P6" text:outline-level="3">Cú pháp: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int socket(int domain, int type, int protocol);</text:p>
          </table:table-cell>
        </table:table-row>
      </table:table>
      <text:h text:style-name="P6" text:outline-level="3"><text:soft-page-break/>Tham số:</text:h>
      <text:list text:style-name="L6">
        <text:list-item>
          <text:p text:style-name="P27"><text:span text:style-name="Source_20_Text"><text:span text:style-name="T1">domain</text:span></text:span><text:span text:style-name="T1">: AF_INET, AF_UNIX… </text:span></text:p>
        </text:list-item>
        <text:list-item>
          <text:p text:style-name="P27"><text:span text:style-name="Source_20_Text"><text:span text:style-name="T1">type</text:span></text:span><text:span text:style-name="T1">: SOCK_STREAM, SOCK_DGRAM </text:span></text:p>
        </text:list-item>
        <text:list-item>
          <text:p text:style-name="P27"><text:span text:style-name="Source_20_Text"><text:span text:style-name="T1">protocol</text:span></text:span><text:span text:style-name="T1">: thường = 0 </text:span></text:p>
        </text:list-item>
      </text:list>
      <text:h text:style-name="P6" text:outline-level="3">Kết quả:</text:h>
      <text:list text:style-name="L7">
        <text:list-item>
          <text:p text:style-name="P28"><text:span text:style-name="T1">Trả về </text:span><text:span text:style-name="Strong_20_Emphasis"><text:span text:style-name="T1">file descriptor</text:span></text:span><text:span text:style-name="T1"> (fd) </text:span></text:p>
        </text:list-item>
      </text:list>
      <text:p text:style-name="P22">Socket trong Linux được xử lý giống file descriptor </text:p>
      <text:h text:style-name="P4" text:outline-level="2"><text:span text:style-name="T1">3.2. </text:span><text:span text:style-name="Source_20_Text"><text:span text:style-name="T1">bind()</text:span></text:span></text:h>
      <text:h text:style-name="P6" text:outline-level="3">Chức năng:</text:h>
      <text:p text:style-name="P22">Gán địa chỉ IP + port cho socket</text:p>
      <text:h text:style-name="P6" text:outline-level="3">Cú pháp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7">int bind(int sockfd, const struct sockaddr *addr, socklen_t addrlen);</text:p>
          </table:table-cell>
        </table:table-row>
      </table:table>
      <text:h text:style-name="P6" text:outline-level="3">Ý nghĩa:</text:h>
      <text:list text:style-name="L8">
        <text:list-item>
          <text:p text:style-name="P19">Server phải bind để client biết địa chỉ kết nối</text:p>
        </text:list-item>
      </text:list>
      <text:h text:style-name="P4" text:outline-level="2"><text:span text:style-name="T1">3.3. </text:span><text:span text:style-name="Source_20_Text"><text:span text:style-name="T1">setsockopt()</text:span></text:span></text:h>
      <text:h text:style-name="P6" text:outline-level="3">Chức năng:</text:h>
      <text:p text:style-name="P22">Thiết lập tùy chọn cho socket</text:p>
      <text:h text:style-name="P6" text:outline-level="3">Cú pháp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8">int setsockopt(int sockfd, int level, int optname,</text:p>
            <text:p text:style-name="P9"><text:s text:c="15"/>const void *optval, socklen_t optlen);</text:p>
          </table:table-cell>
        </table:table-row>
      </table:table>
      <text:h text:style-name="P6" text:outline-level="3">Ví dụ phổ biến:</text:h>
      <text:list text:style-name="L9">
        <text:list-item>
          <text:p text:style-name="P29"><text:span text:style-name="Source_20_Text"><text:span text:style-name="T1">SO_REUSEADDR</text:span></text:span><text:span text:style-name="T1">: cho phép reuse port </text:span></text:p>
        </text:list-item>
        <text:list-item>
          <text:p text:style-name="P29"><text:span text:style-name="Source_20_Text"><text:span text:style-name="T1">SO_RCVTIMEO</text:span></text:span><text:span text:style-name="T1">: timeout nhận dữ liệu</text:span></text:p>
        </text:list-item>
      </text:list>
      <text:h text:style-name="P4" text:outline-level="2"><text:span text:style-name="T1">3.4. </text:span><text:span text:style-name="Source_20_Text"><text:span text:style-name="T1">listen()</text:span></text:span></text:h>
      <text:h text:style-name="P6" text:outline-level="3">Chức năng:</text:h>
      <text:p text:style-name="P33"><text:span text:style-name="T1">Đưa socket sang trạng thái </text:span><text:span text:style-name="Strong_20_Emphasis"><text:span text:style-name="T1">chờ kết nối</text:span></text:span></text:p>
      <text:h text:style-name="P6" text:outline-level="3">Cú pháp: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bookmark text:name="code-block-viewer"/>int listen(int sockfd, int backlog);</text:p>
          </table:table-cell>
        </table:table-row>
      </table:table>
      <text:h text:style-name="P6" text:outline-level="3">Tham số:</text:h>
      <text:list text:style-name="L10">
        <text:list-item>
          <text:p text:style-name="P30"><text:span text:style-name="Source_20_Text"><text:span text:style-name="T1">backlog</text:span></text:span><text:span text:style-name="T1">: số lượng client tối đa kết nối tới máy chủ cùng </text:span><text:span text:style-name="T2">1 lúc</text:span></text:p>
        </text:list-item>
      </text:list>
      <text:h text:style-name="P4" text:outline-level="2"><text:soft-page-break/><text:span text:style-name="T1">3.5. </text:span><text:span text:style-name="Source_20_Text"><text:span text:style-name="T1">accept()</text:span></text:span></text:h>
      <text:h text:style-name="P6" text:outline-level="3">Chức năng:</text:h>
      <text:p text:style-name="P22">Chấp nhận kết nối từ client</text:p>
      <text:h text:style-name="P6" text:outline-level="3">Cú pháp: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1">int accept(int sockfd, struct sockaddr *addr, socklen_t *addrlen);</text:p>
          </table:table-cell>
        </table:table-row>
      </table:table>
      <text:h text:style-name="P6" text:outline-level="3">Kết quả:</text:h>
      <text:list text:style-name="L11">
        <text:list-item>
          <text:p text:style-name="P31"><text:span text:style-name="T1">Trả về </text:span><text:span text:style-name="Strong_20_Emphasis"><text:span text:style-name="T1">socket mới</text:span></text:span><text:span text:style-name="T1"> cho client </text:span></text:p>
        </text:list-item>
      </text:list>
      <text:p text:style-name="P22">Lưu ý:</text:p>
      <text:list text:style-name="L12">
        <text:list-item>
          <text:p text:style-name="P20">socket ban đầu vẫn tiếp tục listen</text:p>
        </text:list-item>
      </text:list>
      <text:h text:style-name="P4" text:outline-level="2"><text:span text:style-name="T1">3.6. </text:span><text:span text:style-name="Source_20_Text"><text:span text:style-name="T1">connect()</text:span></text:span></text:h>
      <text:h text:style-name="P6" text:outline-level="3">Chức năng:</text:h>
      <text:p text:style-name="P22">Client kết nối đến server</text:p>
      <text:h text:style-name="P6" text:outline-level="3">Cú pháp: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2">int connect(int sockfd, const struct sockaddr *addr, socklen_t addrlen);</text:p>
          </table:table-cell>
        </table:table-row>
      </table:table>
      <text:h text:style-name="P4" text:outline-level="2"><text:span text:style-name="T1">3.7. </text:span><text:span text:style-name="Source_20_Text"><text:span text:style-name="T1">send()</text:span></text:span><text:span text:style-name="T1"> / </text:span><text:span text:style-name="Source_20_Text"><text:span text:style-name="T1">recv()</text:span></text:span></text:h>
      <text:h text:style-name="P6" text:outline-level="3">Chức năng:</text:h>
      <text:p text:style-name="P22">Gửi/nhận dữ liệu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<text:bookmark text:name="code-block-viewer Copy 1"/>ssize_t send(int sockfd, const void *buf, size_t len, int flags);</text:p>
            <text:p text:style-name="P14">ssize_t recv(int sockfd, void *buf, size_t len, int flags);</text:p>
          </table:table-cell>
        </table:table-row>
      </table:table>
      <text:h text:style-name="P4" text:outline-level="2"><text:span text:style-name="T1">3.8. </text:span><text:span text:style-name="Source_20_Text"><text:span text:style-name="T1">read()</text:span></text:span><text:span text:style-name="T1"> / </text:span><text:span text:style-name="Source_20_Text"><text:span text:style-name="T1">write()</text:span></text:span></text:h>
      <text:list text:style-name="L13">
        <text:list-item>
          <text:p text:style-name="P32"><text:span text:style-name="T1">Có thể dùng thay cho </text:span><text:span text:style-name="Source_20_Text"><text:span text:style-name="T1">recv()</text:span></text:span><text:span text:style-name="T1"> / </text:span><text:span text:style-name="Source_20_Text"><text:span text:style-name="T1">send()</text:span></text:span><text:span text:style-name="T1"> </text:span></text:p>
        </text:list-item>
        <text:list-item>
          <text:p text:style-name="P21">Do socket là file descriptor </text:p>
        </text:list-item>
      </text:list>
      <text:h text:style-name="P5" text:outline-level="2"><text:span text:style-name="T1">3.9. </text:span><text:span text:style-name="Source_20_Text"><text:span text:style-name="T1">close()</text:span></text:span></text:h>
      <text:h text:style-name="P6" text:outline-level="3">Chức năng:</text:h>
      <text:p text:style-name="P22">Đóng socke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3"><text:bookmark text:name="code-block-viewer Copy 2"/>int close(int sockfd);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6:26:51.649392911</meta:creation-date>
    <dc:date>2026-04-21T17:31:23.365037242</dc:date>
    <meta:editing-duration>PT50M53S</meta:editing-duration>
    <meta:editing-cycles>13</meta:editing-cycles>
    <meta:generator>LibreOffice/24.2.7.2$Linux_X86_64 LibreOffice_project/420$Build-2</meta:generator>
    <meta:document-statistic meta:table-count="8" meta:image-count="2" meta:object-count="0" meta:page-count="4" meta:paragraph-count="96" meta:word-count="486" meta:character-count="2556" meta:non-whitespace-character-count="2158"/>
  </office:meta>
</office:document-meta>
</file>