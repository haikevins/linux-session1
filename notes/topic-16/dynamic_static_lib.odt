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padding="0.0382in" fo:border="0.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6.6931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6.6931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6.6931in" style:rel-column-width="65535*"/>
    </style:style>
    <style:style style:name="Table22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.0201in" fo:margin-bottom="0.0201in" style:contextual-spacing="false" fo:line-height="100%"/>
    </style:style>
    <style:style style:name="P2" style:family="paragraph" style:parent-style-name="Heading_20_1">
      <style:paragraph-properties fo:margin-top="0.0201in" fo:margin-bottom="0.0201in" style:contextual-spacing="false" fo:line-height="100%"/>
      <style:text-properties style:font-name="Liberation Serif" fo:font-size="13pt" officeooo:rsid="001e4692" officeooo:paragraph-rsid="001e4692" style:font-size-asian="13pt" style:font-size-complex="13pt"/>
    </style:style>
    <style:style style:name="P3" style:family="paragraph" style:parent-style-name="Heading_20_1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4" style:family="paragraph" style:parent-style-name="Heading_20_1">
      <style:paragraph-properties fo:margin-top="0.0201in" fo:margin-bottom="0.0201in" style:contextual-spacing="false" fo:line-height="100%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5" style:family="paragraph" style:parent-style-name="Heading_20_2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6" style:family="paragraph" style:parent-style-name="Heading_20_3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7" style:family="paragraph" style:parent-style-name="Heading_20_3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8" style:family="paragraph" style:parent-style-name="Heading_20_3">
      <style:paragraph-properties fo:margin-top="0.0201in" fo:margin-bottom="0.0201in" style:contextual-spacing="false" fo:line-height="100%"/>
      <style:text-properties style:font-name="Liberation Serif" fo:font-size="13pt" officeooo:paragraph-rsid="0067e9f4" style:font-size-asian="13pt" style:font-size-complex="13pt"/>
    </style:style>
    <style:style style:name="P9" style:family="paragraph" style:parent-style-name="Heading_20_3">
      <style:paragraph-properties fo:margin-top="0.0201in" fo:margin-bottom="0.0201in" style:contextual-spacing="false" fo:line-height="100%"/>
    </style:style>
    <style:style style:name="P10" style:family="paragraph" style:parent-style-name="Preformatted_20_Text">
      <style:paragraph-properties fo:margin-left="0in" fo:margin-right="0in" fo:text-indent="0in" style:auto-text-indent="false"/>
    </style:style>
    <style:style style:name="P11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fo:font-weight="normal" officeooo:paragraph-rsid="0040db67" style:font-size-asian="13pt" style:font-weight-asian="normal" style:font-size-complex="13pt" style:font-weight-complex="normal"/>
    </style:style>
    <style:style style:name="P12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fo:font-weight="normal" officeooo:paragraph-rsid="00417cfa" style:font-size-asian="13pt" style:font-weight-asian="normal" style:font-size-complex="13pt" style:font-weight-complex="normal"/>
    </style:style>
    <style:style style:name="P13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fo:font-weight="normal" officeooo:paragraph-rsid="00468ecb" style:font-size-asian="13pt" style:font-weight-asian="normal" style:font-size-complex="13pt" style:font-weight-complex="normal"/>
    </style:style>
    <style:style style:name="P14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fo:font-weight="normal" officeooo:paragraph-rsid="0048f78d" style:font-size-asian="13pt" style:font-weight-asian="normal" style:font-size-complex="13pt" style:font-weight-complex="normal"/>
    </style:style>
    <style:style style:name="P15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fo:font-weight="normal" officeooo:paragraph-rsid="00745572" style:font-size-asian="13pt" style:font-weight-asian="normal" style:font-size-complex="13pt" style:font-weight-complex="normal"/>
    </style:style>
    <style:style style:name="P16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officeooo:paragraph-rsid="001e4692" style:font-size-asian="13pt" style:font-size-complex="13pt"/>
    </style:style>
    <style:style style:name="P17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officeooo:paragraph-rsid="001f0f2e" style:font-size-asian="13pt" style:font-size-complex="13pt"/>
    </style:style>
    <style:style style:name="P18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officeooo:paragraph-rsid="0020a8f5" style:font-size-asian="13pt" style:font-size-complex="13pt"/>
    </style:style>
    <style:style style:name="P19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officeooo:paragraph-rsid="0022d1ae" style:font-size-asian="13pt" style:font-size-complex="13pt"/>
    </style:style>
    <style:style style:name="P20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officeooo:paragraph-rsid="00247ef2" style:font-size-asian="13pt" style:font-size-complex="13pt"/>
    </style:style>
    <style:style style:name="P21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officeooo:paragraph-rsid="0044f7f9" style:font-size-asian="13pt" style:font-size-complex="13pt"/>
    </style:style>
    <style:style style:name="P22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style:font-size-asian="13pt" style:font-size-complex="13pt"/>
    </style:style>
    <style:style style:name="P23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officeooo:paragraph-rsid="005c6f09" style:font-size-asian="13pt" style:font-size-complex="13pt"/>
    </style:style>
    <style:style style:name="P24" style:family="paragraph" style:parent-style-name="Preformatted_20_Text">
      <style:paragraph-properties fo:margin-top="0.0201in" fo:margin-bottom="0.0201in" style:contextual-spacing="false" fo:line-height="100%"/>
      <style:text-properties style:font-name="Liberation Serif" fo:font-size="13pt" officeooo:paragraph-rsid="005c6f09" style:font-size-asian="13pt" style:font-size-complex="13pt"/>
    </style:style>
    <style:style style:name="P25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officeooo:paragraph-rsid="005d293b" style:font-size-asian="13pt" style:font-size-complex="13pt"/>
    </style:style>
    <style:style style:name="P26" style:family="paragraph" style:parent-style-name="Preformatted_20_Text">
      <style:paragraph-properties fo:margin-top="0.0201in" fo:margin-bottom="0.0201in" style:contextual-spacing="false" fo:line-height="100%"/>
      <style:text-properties style:font-name="Liberation Serif" fo:font-size="13pt" officeooo:paragraph-rsid="005d293b" style:font-size-asian="13pt" style:font-size-complex="13pt"/>
    </style:style>
    <style:style style:name="P27" style:family="paragraph" style:parent-style-name="Preformatted_20_Text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28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officeooo:paragraph-rsid="0067e9f4" style:font-size-asian="13pt" style:font-size-complex="13pt"/>
    </style:style>
    <style:style style:name="P29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officeooo:paragraph-rsid="00699bb5" style:font-size-asian="13pt" style:font-size-complex="13pt"/>
    </style:style>
    <style:style style:name="P30" style:family="paragraph" style:parent-style-name="Preformatted_20_Text">
      <style:paragraph-properties fo:margin-top="0.0201in" fo:margin-bottom="0.0201in" style:contextual-spacing="false" fo:line-height="100%"/>
      <style:text-properties style:font-name="Liberation Serif" fo:font-size="13pt" officeooo:paragraph-rsid="00699bb5" style:font-size-asian="13pt" style:font-size-complex="13pt"/>
    </style:style>
    <style:style style:name="P31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officeooo:paragraph-rsid="006b70ab" style:font-size-asian="13pt" style:font-size-complex="13pt"/>
    </style:style>
    <style:style style:name="P32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officeooo:paragraph-rsid="006ceb8a" style:font-size-asian="13pt" style:font-size-complex="13pt"/>
    </style:style>
    <style:style style:name="P33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officeooo:paragraph-rsid="0072894b" style:font-size-asian="13pt" style:font-size-complex="13pt"/>
    </style:style>
    <style:style style:name="P34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officeooo:paragraph-rsid="00771a69" style:font-size-asian="13pt" style:font-size-complex="13pt"/>
    </style:style>
    <style:style style:name="P35" style:family="paragraph" style:parent-style-name="Preformatted_20_Text">
      <style:paragraph-properties fo:margin-left="0in" fo:margin-right="0in" fo:margin-top="0.0201in" fo:margin-bottom="0.0201in" style:contextual-spacing="false" fo:line-height="100%" fo:text-indent="0in" style:auto-text-indent="false"/>
      <style:text-properties style:font-name="Liberation Serif" fo:font-size="13pt" officeooo:paragraph-rsid="00768743" style:font-size-asian="13pt" style:font-size-complex="13pt"/>
    </style:style>
    <style:style style:name="P36" style:family="paragraph" style:parent-style-name="Text_20_body" style:list-style-name="L1">
      <style:paragraph-properties fo:margin-top="0.0201in" fo:margin-bottom="0.0201in" style:contextual-spacing="false" fo:line-height="100%"/>
    </style:style>
    <style:style style:name="P37" style:family="paragraph" style:parent-style-name="Text_20_body" style:list-style-name="L2">
      <style:paragraph-properties fo:margin-top="0.0201in" fo:margin-bottom="0.0201in" style:contextual-spacing="false" fo:line-height="100%"/>
    </style:style>
    <style:style style:name="P38" style:family="paragraph" style:parent-style-name="Text_20_body" style:list-style-name="L3">
      <style:paragraph-properties fo:margin-top="0.0201in" fo:margin-bottom="0.0201in" style:contextual-spacing="false" fo:line-height="100%"/>
    </style:style>
    <style:style style:name="P39" style:family="paragraph" style:parent-style-name="Text_20_body" style:list-style-name="L4">
      <style:paragraph-properties fo:margin-top="0.0201in" fo:margin-bottom="0.0201in" style:contextual-spacing="false" fo:line-height="100%"/>
    </style:style>
    <style:style style:name="P40" style:family="paragraph" style:parent-style-name="Text_20_body" style:list-style-name="L5">
      <style:paragraph-properties fo:margin-top="0.0201in" fo:margin-bottom="0.0201in" style:contextual-spacing="false" fo:line-height="100%"/>
    </style:style>
    <style:style style:name="P41" style:family="paragraph" style:parent-style-name="Text_20_body" style:list-style-name="L6">
      <style:paragraph-properties fo:margin-top="0.0201in" fo:margin-bottom="0.0201in" style:contextual-spacing="false" fo:line-height="100%"/>
    </style:style>
    <style:style style:name="P42" style:family="paragraph" style:parent-style-name="Text_20_body" style:list-style-name="L7">
      <style:paragraph-properties fo:margin-top="0.0201in" fo:margin-bottom="0.0201in" style:contextual-spacing="false" fo:line-height="100%"/>
    </style:style>
    <style:style style:name="P43" style:family="paragraph" style:parent-style-name="Text_20_body" style:list-style-name="L8">
      <style:paragraph-properties fo:margin-top="0.0201in" fo:margin-bottom="0.0201in" style:contextual-spacing="false" fo:line-height="100%"/>
    </style:style>
    <style:style style:name="P44" style:family="paragraph" style:parent-style-name="Text_20_body" style:list-style-name="L9">
      <style:paragraph-properties fo:margin-top="0.0201in" fo:margin-bottom="0.0201in" style:contextual-spacing="false" fo:line-height="100%"/>
    </style:style>
    <style:style style:name="P45" style:family="paragraph" style:parent-style-name="Text_20_body" style:list-style-name="L11">
      <style:paragraph-properties fo:margin-top="0.0201in" fo:margin-bottom="0.0201in" style:contextual-spacing="false" fo:line-height="100%"/>
    </style:style>
    <style:style style:name="P46" style:family="paragraph" style:parent-style-name="Text_20_body" style:list-style-name="L19">
      <style:paragraph-properties fo:margin-top="0.0201in" fo:margin-bottom="0.0201in" style:contextual-spacing="false" fo:line-height="100%"/>
    </style:style>
    <style:style style:name="P47" style:family="paragraph" style:parent-style-name="Text_20_body" style:list-style-name="L21">
      <style:paragraph-properties fo:margin-top="0.0201in" fo:margin-bottom="0.0201in" style:contextual-spacing="false" fo:line-height="100%"/>
      <style:text-properties officeooo:paragraph-rsid="0044a587"/>
    </style:style>
    <style:style style:name="P48" style:family="paragraph" style:parent-style-name="Text_20_body" style:list-style-name="L22">
      <style:paragraph-properties fo:margin-top="0.0201in" fo:margin-bottom="0.0201in" style:contextual-spacing="false" fo:line-height="100%"/>
      <style:text-properties officeooo:paragraph-rsid="004c0f14"/>
    </style:style>
    <style:style style:name="P49" style:family="paragraph" style:parent-style-name="Text_20_body" style:list-style-name="L22">
      <style:paragraph-properties fo:margin-top="0.0201in" fo:margin-bottom="0.0201in" style:contextual-spacing="false" fo:line-height="100%"/>
    </style:style>
    <style:style style:name="P50" style:family="paragraph" style:parent-style-name="Text_20_body">
      <style:paragraph-properties fo:margin-top="0.0201in" fo:margin-bottom="0.0201in" style:contextual-spacing="false" fo:line-height="100%"/>
    </style:style>
    <style:style style:name="P51" style:family="paragraph" style:parent-style-name="Text_20_body">
      <style:paragraph-properties fo:margin-top="0.0201in" fo:margin-bottom="0.0201in" style:contextual-spacing="false" fo:line-height="100%"/>
      <style:text-properties officeooo:paragraph-rsid="00745572"/>
    </style:style>
    <style:style style:name="P52" style:family="paragraph" style:parent-style-name="Text_20_body" style:list-style-name="L23">
      <style:paragraph-properties fo:margin-top="0.0201in" fo:margin-bottom="0.0201in" style:contextual-spacing="false" fo:line-height="100%"/>
    </style:style>
    <style:style style:name="P53" style:family="paragraph" style:parent-style-name="Text_20_body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54" style:family="paragraph" style:parent-style-name="Text_20_body" style:list-style-name="L3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55" style:family="paragraph" style:parent-style-name="Text_20_body" style:list-style-name="L4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56" style:family="paragraph" style:parent-style-name="Text_20_body" style:list-style-name="L7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57" style:family="paragraph" style:parent-style-name="Text_20_body" style:list-style-name="L8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58" style:family="paragraph" style:parent-style-name="Text_20_body" style:list-style-name="L11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59" style:family="paragraph" style:parent-style-name="Text_20_body" style:list-style-name="L21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60" style:family="paragraph" style:parent-style-name="Text_20_body" style:list-style-name="L22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61" style:family="paragraph" style:parent-style-name="Text_20_body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62" style:family="paragraph" style:parent-style-name="Text_20_body" style:list-style-name="L5">
      <style:paragraph-properties fo:margin-top="0.0201in" fo:margin-bottom="0.0201in" style:contextual-spacing="false" fo:line-height="100%"/>
      <style:text-properties style:font-name="Liberation Serif" fo:font-size="13pt" officeooo:paragraph-rsid="001ed9e2" style:font-size-asian="13pt" style:font-size-complex="13pt"/>
    </style:style>
    <style:style style:name="P63" style:family="paragraph" style:parent-style-name="Text_20_body" style:list-style-name="L6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64" style:family="paragraph" style:parent-style-name="Text_20_body" style:list-style-name="L7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65" style:family="paragraph" style:parent-style-name="Text_20_body" style:list-style-name="L10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66" style:family="paragraph" style:parent-style-name="Text_20_body" style:list-style-name="L12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67" style:family="paragraph" style:parent-style-name="Text_20_body" style:list-style-name="L13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68" style:family="paragraph" style:parent-style-name="Text_20_body" style:list-style-name="L14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69" style:family="paragraph" style:parent-style-name="Text_20_body" style:list-style-name="L15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70" style:family="paragraph" style:parent-style-name="Text_20_body" style:list-style-name="L16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71" style:family="paragraph" style:parent-style-name="Text_20_body" style:list-style-name="L17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72" style:family="paragraph" style:parent-style-name="Text_20_body" style:list-style-name="L18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73" style:family="paragraph" style:parent-style-name="Text_20_body" style:list-style-name="L20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74" style:family="paragraph" style:parent-style-name="Text_20_body">
      <style:paragraph-properties fo:margin-top="0.0201in" fo:margin-bottom="0.0201in" style:contextual-spacing="false" fo:line-height="100%"/>
      <style:text-properties style:font-name="Liberation Serif" fo:font-size="13pt" officeooo:paragraph-rsid="0077470c" style:font-size-asian="13pt" style:font-size-complex="13pt"/>
    </style:style>
    <style:style style:name="P75" style:family="paragraph" style:parent-style-name="Text_20_body">
      <style:paragraph-properties fo:margin-top="0.0201in" fo:margin-bottom="0.0201in" style:contextual-spacing="false" fo:line-height="100%"/>
      <style:text-properties style:font-name="Liberation Serif" fo:font-size="13pt" officeooo:paragraph-rsid="0067e9f4" style:font-size-asian="13pt" style:font-size-complex="13pt"/>
    </style:style>
    <style:style style:name="P76" style:family="paragraph" style:parent-style-name="Text_20_body">
      <style:paragraph-properties fo:margin-top="0.0201in" fo:margin-bottom="0.0201in" style:contextual-spacing="false" fo:line-height="100%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77" style:family="paragraph" style:parent-style-name="Text_20_body">
      <style:paragraph-properties fo:margin-top="0.0201in" fo:margin-bottom="0.0201in" style:contextual-spacing="false" fo:line-height="100%"/>
      <style:text-properties style:font-name="Liberation Serif" fo:font-size="13pt" fo:font-weight="bold" officeooo:paragraph-rsid="0056bd2d" style:font-size-asian="13pt" style:font-weight-asian="bold" style:font-size-complex="13pt" style:font-weight-complex="bold"/>
    </style:style>
    <style:style style:name="P78" style:family="paragraph" style:parent-style-name="Text_20_body">
      <style:paragraph-properties fo:margin-top="0.0201in" fo:margin-bottom="0.0201in" style:contextual-spacing="false" fo:line-height="100%"/>
      <style:text-properties style:font-name="Liberation Serif" fo:font-size="13pt" fo:font-weight="bold" officeooo:paragraph-rsid="0077470c" style:font-size-asian="13pt" style:font-weight-asian="bold" style:font-size-complex="13pt" style:font-weight-complex="bold"/>
    </style:style>
    <style:style style:name="P79" style:family="paragraph" style:parent-style-name="Text_20_body">
      <style:paragraph-properties fo:margin-top="0.0201in" fo:margin-bottom="0.0201in" style:contextual-spacing="false" fo:line-height="100%"/>
      <style:text-properties style:font-name="Liberation Serif" fo:font-size="13pt" fo:font-weight="bold" officeooo:paragraph-rsid="00745572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6" style:family="text">
      <style:text-properties style:font-name="Liberation Serif" fo:font-size="13pt" style:font-size-asian="13pt" style:font-size-complex="13pt"/>
    </style:style>
    <style:style style:name="T7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officeooo:rsid="00702b00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1. Phân biệt thư viện tĩnh (.a) và thư viện động (.so)</text:h>
      <text:p text:style-name="P1"><text:span text:style-name="T5">Trong hệ thống Linux (và Embedded Linux), chương trình thường không tự chứa toàn bộ code mà sử dụng </text:span><text:span text:style-name="Strong_20_Emphasis"><text:span text:style-name="T5">library (thư viện)</text:span></text:span><text:span text:style-name="T5"> để tái sử dụng chức năng.</text:span></text:p>
      <text:h text:style-name="P5" text:outline-level="2">1.1 Thư viện tĩnh – Static Library (.a)</text:h>
      <text:list text:style-name="L1">
        <text:list-item>
          <text:p text:style-name="P36"><text:span text:style-name="T5">Định dạng: </text:span><text:span text:style-name="Source_20_Text"><text:span text:style-name="T5">.a</text:span></text:span><text:span text:style-name="T5"> (archive) </text:span></text:p>
        </text:list-item>
        <text:list-item>
          <text:p text:style-name="P36"><text:span text:style-name="T5">Ví dụ: </text:span><text:span text:style-name="Source_20_Text"><text:span text:style-name="T5">libm.a</text:span></text:span><text:span text:style-name="T5">, </text:span><text:span text:style-name="Source_20_Text"><text:span text:style-name="T5">libc.a</text:span></text:span><text:span text:style-name="T5"> </text:span></text:p>
        </text:list-item>
        <text:list-item>
          <text:p text:style-name="P36"><text:span text:style-name="T5">Được </text:span><text:span text:style-name="Strong_20_Emphasis"><text:span text:style-name="T5">liên kết (link)</text:span></text:span><text:span text:style-name="T5"> vào chương trình </text:span><text:span text:style-name="Strong_20_Emphasis"><text:span text:style-name="T5">ngay tại thời điểm biên dịch (compile time)</text:span></text:span><text:span text:style-name="T5"> </text:span></text:p>
        </text:list-item>
      </text:list>
      <text:p text:style-name="P53">Sau khi build:</text:p>
      <text:list text:style-name="L2">
        <text:list-item>
          <text:p text:style-name="P37"><text:span text:style-name="T5">Code của thư viện được </text:span><text:span text:style-name="Strong_20_Emphasis"><text:span text:style-name="T5">copy trực tiếp vào file thực thi (.exe / ELF)</text:span></text:span><text:span text:style-name="T5"> </text:span></text:p>
        </text:list-item>
      </text:list>
      <text:h text:style-name="P5" text:outline-level="2">1.2 Thư viện động – Shared Library (.so)</text:h>
      <text:list text:style-name="L3">
        <text:list-item>
          <text:p text:style-name="P38"><text:span text:style-name="T5">Định dạng: </text:span><text:span text:style-name="Source_20_Text"><text:span text:style-name="T5">.so</text:span></text:span><text:span text:style-name="T5"> (shared object) </text:span></text:p>
        </text:list-item>
        <text:list-item>
          <text:p text:style-name="P38"><text:span text:style-name="T5">Ví dụ: </text:span><text:span text:style-name="Source_20_Text"><text:span text:style-name="T5">libc.so</text:span></text:span><text:span text:style-name="T5">, </text:span><text:span text:style-name="Source_20_Text"><text:span text:style-name="T5">libpthread.so</text:span></text:span><text:span text:style-name="T5"> </text:span></text:p>
        </text:list-item>
        <text:list-item>
          <text:p text:style-name="P38"><text:span text:style-name="T5">Được </text:span><text:span text:style-name="Strong_20_Emphasis"><text:span text:style-name="T5">liên kết động (dynamic linking)</text:span></text:span><text:span text:style-name="T5">: </text:span></text:p>
          <text:list>
            <text:list-item>
              <text:p text:style-name="P54">Không copy code vào executable </text:p>
            </text:list-item>
            <text:list-item>
              <text:p text:style-name="P38"><text:span text:style-name="T5">Được </text:span><text:span text:style-name="Strong_20_Emphasis"><text:span text:style-name="T5">nạp vào bộ nhớ khi chương trình chạy (runtime)</text:span></text:span></text:p>
            </text:list-item>
          </text:list>
        </text:list-item>
      </text:list>
      <text:h text:style-name="P2" text:outline-level="1">2. Cách hoạt động của thư viện tĩnh (Static Linking)</text:h>
      <text:h text:style-name="P5" text:outline-level="2">2.1 Quy trình build</text:h>
      <text:p text:style-name="P61">Giả sử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gcc main.c -o app -static -lm</text:p>
          </table:table-cell>
        </table:table-row>
      </table:table>
      <text:h text:style-name="P6" text:outline-level="3">Các bước:</text:h>
      <text:list text:style-name="L4">
        <text:list-item>
          <text:p text:style-name="P39"><text:span text:style-name="Strong_20_Emphasis"><text:span text:style-name="T5">Compiler (gcc)</text:span></text:span><text:span text:style-name="T5">: </text:span></text:p>
          <text:list>
            <text:list-item>
              <text:p text:style-name="P39"><text:span text:style-name="T5">Biên dịch </text:span><text:span text:style-name="Source_20_Text"><text:span text:style-name="T5">main.c</text:span></text:span><text:span text:style-name="T5"> → </text:span><text:span text:style-name="Source_20_Text"><text:span text:style-name="T5">main.o</text:span></text:span><text:span text:style-name="T5"> </text:span></text:p>
            </text:list-item>
          </text:list>
        </text:list-item>
        <text:list-item>
          <text:p text:style-name="P39"><text:span text:style-name="Strong_20_Emphasis"><text:span text:style-name="T5">Linker (ld)</text:span></text:span><text:span text:style-name="T5">: </text:span></text:p>
          <text:list>
            <text:list-item>
              <text:p text:style-name="P39"><text:span text:style-name="T5">Tìm thư viện </text:span><text:span text:style-name="Source_20_Text"><text:span text:style-name="T5">libm.a</text:span></text:span><text:span text:style-name="T5"> </text:span></text:p>
            </text:list-item>
            <text:list-item>
              <text:p text:style-name="P55">Trích xuất các hàm cần thiết </text:p>
            </text:list-item>
            <text:list-item>
              <text:p text:style-name="P39"><text:span text:style-name="Strong_20_Emphasis"><text:span text:style-name="T5">Copy trực tiếp vào executable</text:span></text:span><text:span text:style-name="T5"> </text:span></text:p>
            </text:list-item>
          </text:list>
        </text:list-item>
      </text:list>
      <text:h text:style-name="P5" text:outline-level="2">2.2 Kết quả</text:h>
      <text:list text:style-name="L5">
        <text:list-item>
          <text:p text:style-name="P40"><text:span text:style-name="T6">File </text:span><text:span text:style-name="Source_20_Text"><text:span text:style-name="T6">app</text:span></text:span><text:span text:style-name="T6"> chứa: </text:span></text:p>
          <text:list>
            <text:list-item>
              <text:p text:style-name="P62">Code của chương trình </text:p>
            </text:list-item>
            <text:list-item>
              <text:p text:style-name="P62">Code của thư viện </text:p>
            </text:list-item>
          </text:list>
        </text:list-item>
      </text:list>
      <text:p text:style-name="P61">Không cần thư viện bên ngoài khi chạy</text:p>
      <text:h text:style-name="P5" text:outline-level="2">2.3 Đặc điểm kỹ thuật</text:h>
      <text:list text:style-name="L6">
        <text:list-item>
          <text:p text:style-name="P63">Không cần dynamic loader </text:p>
        </text:list-item>
        <text:list-item>
          <text:p text:style-name="P41"><text:span text:style-name="T6">Không phụ thuộc vào </text:span><text:span text:style-name="Source_20_Text"><text:span text:style-name="T6">/lib</text:span></text:span><text:span text:style-name="T6"> hoặc </text:span><text:span text:style-name="Source_20_Text"><text:span text:style-name="T6">/usr/lib</text:span></text:span><text:span text:style-name="T6"> </text:span></text:p>
        </text:list-item>
        <text:list-item>
          <text:p text:style-name="P63">Phù hợp với hệ thống Embedded nhỏ (không có runtime environment đầy đủ)</text:p>
        </text:list-item>
      </text:list>
      <text:h text:style-name="P2" text:outline-level="1">3. Cách hoạt động của thư viện động (Dynamic Linking)</text:h>
      <text:h text:style-name="P5" text:outline-level="2">3.1 Khi biên dịch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7"><text:bookmark text:name="code-block-viewer"/>gcc main.c -o app -lm</text:p>
          </table:table-cell>
        </table:table-row>
      </table:table>
      <text:list text:style-name="L7">
        <text:list-header>
          <text:p text:style-name="P64"/>
        </text:list-header>
        <text:list-item>
          <text:p text:style-name="P64">Không copy code thư viện </text:p>
        </text:list-item>
        <text:list-item>
          <text:p text:style-name="P64"><text:soft-page-break/>C<text:span text:style-name="T1">hỉ lưu: </text:span></text:p>
          <text:list>
            <text:list-item>
              <text:p text:style-name="P42"><text:span text:style-name="Strong_20_Emphasis"><text:span text:style-name="T5">symbol reference (tham chiếu hàm)</text:span></text:span><text:span text:style-name="T5"> </text:span></text:p>
            </text:list-item>
            <text:list-item>
              <text:p text:style-name="P56">tên thư viện cần dùng </text:p>
            </text:list-item>
          </text:list>
        </text:list-item>
      </text:list>
      <text:h text:style-name="P5" text:outline-level="2">3.2 Khi chạy (Runtime)</text:h>
      <text:p text:style-name="P53">Quy trình:</text:p>
      <text:list text:style-name="L8">
        <text:list-item>
          <text:p text:style-name="P43"><text:span text:style-name="T5">Loader (</text:span><text:span text:style-name="Source_20_Text"><text:span text:style-name="T5">ld-linux.so</text:span></text:span><text:span text:style-name="T5">) được kích hoạt </text:span></text:p>
        </text:list-item>
        <text:list-item>
          <text:p text:style-name="P43"><text:span text:style-name="T5">Tìm thư viện </text:span><text:span text:style-name="Source_20_Text"><text:span text:style-name="T5">.so</text:span></text:span><text:span text:style-name="T5">: </text:span></text:p>
          <text:list>
            <text:list-item>
              <text:p text:style-name="P43"><text:span text:style-name="Source_20_Text"><text:span text:style-name="T5">/lib</text:span></text:span><text:span text:style-name="T5"> </text:span></text:p>
            </text:list-item>
            <text:list-item>
              <text:p text:style-name="P43"><text:span text:style-name="Source_20_Text"><text:span text:style-name="T5">/usr/lib</text:span></text:span><text:span text:style-name="T5"> </text:span></text:p>
            </text:list-item>
            <text:list-item>
              <text:p text:style-name="P43"><text:span text:style-name="Source_20_Text"><text:span text:style-name="T5">LD_LIBRARY_PATH</text:span></text:span><text:span text:style-name="T5"> </text:span></text:p>
            </text:list-item>
          </text:list>
        </text:list-item>
        <text:list-item>
          <text:p text:style-name="P57">Nạp thư viện vào RAM </text:p>
        </text:list-item>
        <text:list-item>
          <text:p text:style-name="P43"><text:span text:style-name="Strong_20_Emphasis"><text:span text:style-name="T5">Resolve symbol</text:span></text:span><text:span text:style-name="T5"> (gán địa chỉ hàm thật) </text:span></text:p>
        </text:list-item>
      </text:list>
      <text:p text:style-name="P1"><text:span text:style-name="T5">Đây là cơ chế </text:span><text:span text:style-name="Strong_20_Emphasis"><text:span text:style-name="T5">dynamic linking</text:span></text:span><text:span text:style-name="T5"> </text:span></text:p>
      <text:h text:style-name="P5" text:outline-level="2">3.3 Cơ chế quan trọng</text:h>
      <text:h text:style-name="P7" text:outline-level="3">a. Dynamic Loader</text:h>
      <text:list text:style-name="L9">
        <text:list-item>
          <text:p text:style-name="P44"><text:span text:style-name="T6">Ví dụ: </text:span><text:span text:style-name="Source_20_Text"><text:span text:style-name="T6">/lib/ld-linux.so</text:span></text:span><text:span text:style-name="T6"> </text:span></text:p>
        </text:list-item>
      </text:list>
      <text:h text:style-name="P7" text:outline-level="3">b. Symbol Resolution</text:h>
      <text:list text:style-name="L10">
        <text:list-item>
          <text:p text:style-name="P65">Mapping: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8"><text:bookmark text:name="code-block-viewer Copy 1"/>printf → địa chỉ trong libc.so</text:p>
          </table:table-cell>
        </table:table-row>
      </table:table>
      <text:h text:style-name="P7" text:outline-level="3">c. Shared Memory</text:h>
      <text:list text:style-name="L11">
        <text:list-item>
          <text:p text:style-name="P45"><text:span text:style-name="T5">Một thư viện </text:span><text:span text:style-name="Source_20_Text"><text:span text:style-name="T5">.so</text:span></text:span><text:span text:style-name="T5"> chỉ load </text:span><text:span text:style-name="Strong_20_Emphasis"><text:span text:style-name="T5">1 lần</text:span></text:span><text:span text:style-name="T5"> </text:span></text:p>
        </text:list-item>
        <text:list-item>
          <text:p text:style-name="P58">Nhiều process cùng dùng</text:p>
        </text:list-item>
      </text:list>
      <text:h text:style-name="P2" text:outline-level="1">4. Ưu và nhược điểm</text:h>
      <text:h text:style-name="P5" text:outline-level="2">4.1 Thư viện tĩnh (.a)</text:h>
      <text:h text:style-name="P7" text:outline-level="3">Ưu điểm:</text:h>
      <text:list text:style-name="L12">
        <text:list-item>
          <text:p text:style-name="P66">Không phụ thuộc hệ thống </text:p>
        </text:list-item>
        <text:list-item>
          <text:p text:style-name="P66">Chạy được trên môi trường tối giản (embedded) </text:p>
        </text:list-item>
        <text:list-item>
          <text:p text:style-name="P66">Load nhanh hơn (không cần resolve) </text:p>
        </text:list-item>
      </text:list>
      <text:h text:style-name="P7" text:outline-level="3">Nhược điểm:</text:h>
      <text:list text:style-name="L13">
        <text:list-item>
          <text:p text:style-name="P67">File thực thi lớn </text:p>
        </text:list-item>
        <text:list-item>
          <text:p text:style-name="P67">Tốn RAM (mỗi process 1 bản copy) </text:p>
        </text:list-item>
        <text:list-item>
          <text:p text:style-name="P67">Khó cập nhật (phải build lại) </text:p>
        </text:list-item>
      </text:list>
      <text:h text:style-name="P5" text:outline-level="2">4.2 Thư viện động (.so)</text:h>
      <text:h text:style-name="P7" text:outline-level="3">Ưu điểm:</text:h>
      <text:list text:style-name="L14">
        <text:list-item>
          <text:p text:style-name="P68">Tiết kiệm bộ nhớ (shared) </text:p>
        </text:list-item>
        <text:list-item>
          <text:p text:style-name="P68">File executable nhỏ </text:p>
        </text:list-item>
        <text:list-item>
          <text:p text:style-name="P68">Dễ cập nhật (update thư viện là đủ) </text:p>
        </text:list-item>
      </text:list>
      <text:h text:style-name="P7" text:outline-level="3">Nhược điểm:</text:h>
      <text:list text:style-name="L15">
        <text:list-item>
          <text:p text:style-name="P69">Phụ thuộc hệ thống (version, path) </text:p>
        </text:list-item>
        <text:list-item>
          <text:p text:style-name="P69">Lỗi runtime nếu thiếu thư viện </text:p>
        </text:list-item>
        <text:list-item>
          <text:p text:style-name="P69"><text:soft-page-break/>Overhead khi load và resolve symbol </text:p>
        </text:list-item>
      </text:list>
      <text:h text:style-name="P3" text:outline-level="1">5. Cấu trúc thư viện trong Linux</text:h>
      <text:p text:style-name="P61">Một thư viện thường bao gồm 3 thành phần chính:</text:p>
      <text:h text:style-name="P5" text:outline-level="2">5.1 Header file (.h)</text:h>
      <text:list text:style-name="L16">
        <text:list-item>
          <text:p text:style-name="P70">Chứa: </text:p>
          <text:list>
            <text:list-item>
              <text:p text:style-name="P70">Khai báo hàm </text:p>
            </text:list-item>
            <text:list-item>
              <text:p text:style-name="P70">macro </text:p>
            </text:list-item>
            <text:list-item>
              <text:p text:style-name="P70">struct </text:p>
            </text:list-item>
          </text:list>
        </text:list-item>
      </text:list>
      <text:p text:style-name="P61">Ví dụ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9"><text:bookmark text:name="code-block-viewer Copy 2"/>int add(int a, int b);</text:p>
          </table:table-cell>
        </table:table-row>
      </table:table>
      <text:p text:style-name="P61">Dùng khi compile</text:p>
      <text:h text:style-name="P5" text:outline-level="2">5.2 Object file (.o)</text:h>
      <text:list text:style-name="L17">
        <text:list-item>
          <text:p text:style-name="P71">File trung gian </text:p>
        </text:list-item>
        <text:list-item>
          <text:p text:style-name="P71">Sinh ra từ source: 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0"><text:bookmark text:name="code-block-viewer Copy 3"/>gcc -c add.c → add.o</text:p>
          </table:table-cell>
        </table:table-row>
      </table:table>
      <text:p text:style-name="P61"/>
      <text:list text:style-name="L18">
        <text:list-item>
          <text:p text:style-name="P72">Chưa phải executable </text:p>
        </text:list-item>
      </text:list>
      <text:h text:style-name="P5" text:outline-level="2">5.3 Library file</text:h>
      <text:h text:style-name="P7" text:outline-level="3">a. Static library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20"><text:bookmark text:name="code-block-viewer Copy 4"/>ar rcs libmath.a add.o sub.o</text:p>
          </table:table-cell>
        </table:table-row>
      </table:table>
      <text:p text:style-name="P61"/>
      <text:list text:style-name="L19">
        <text:list-item>
          <text:p text:style-name="P46"><text:span text:style-name="T6">Là tập hợp nhiều </text:span><text:span text:style-name="Source_20_Text"><text:span text:style-name="T6">.o</text:span></text:span><text:span text:style-name="T6"> </text:span></text:p>
        </text:list-item>
      </text:list>
      <text:h text:style-name="P7" text:outline-level="3">b. Shared library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20"><text:bookmark text:name="code-block-viewer Copy 5"/>gcc -shared -o libmath.so add.o sub.o</text:p>
          </table:table-cell>
        </table:table-row>
      </table:table>
      <text:p text:style-name="P61"/>
      <text:list text:style-name="L20">
        <text:list-item>
          <text:p text:style-name="P73">Có thể load runtime</text:p>
        </text:list-item>
      </text:list>
      <text:p text:style-name="P61"/>
      <text:p text:style-name="P61"/>
      <text:p text:style-name="P76">Giải thích:</text:p>
      <text:h text:style-name="P4" text:outline-level="1">1. Bản chất cốt lõi: linker đang làm gì?</text:h>
      <text:p text:style-name="P53">Khi bạn viết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1">printf("Hello\n");</text:p>
          </table:table-cell>
        </table:table-row>
      </table:table>
      <text:p text:style-name="P1"><text:span text:style-name="T5">Thực ra trong file</text:span><text:span text:style-name="Source_20_Text"><text:span text:style-name="T5">.c</text:span></text:span><text:span text:style-name="T5"> </text:span><text:span text:style-name="Strong_20_Emphasis"><text:span text:style-name="T5">không có code của </text:span></text:span><text:span text:style-name="Strong_20_Emphasis"><text:span text:style-name="Source_20_Text"><text:span text:style-name="T5">printf</text:span></text:span></text:span><text:span text:style-name="T5">. Nó chỉ là </text:span><text:span text:style-name="Strong_20_Emphasis"><text:span text:style-name="T5">symbol (ký hiệu)</text:span></text:span><text:span text:style-name="T5">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2"><text:bookmark text:name="code-block-viewer Copy 6"/>printf <text:s/>(undefined symbol)</text:p>
          </table:table-cell>
        </table:table-row>
      </table:table>
      <text:p text:style-name="P1"><text:span text:style-name="T5">Nhiệm vụ của </text:span><text:span text:style-name="Strong_20_Emphasis"><text:span text:style-name="T5">linker (</text:span></text:span><text:span text:style-name="Strong_20_Emphasis"><text:span text:style-name="Source_20_Text"><text:span text:style-name="T5">ld</text:span></text:span></text:span><text:span text:style-name="Strong_20_Emphasis"><text:span text:style-name="T5">)</text:span></text:span><text:span text:style-name="T5"> là:</text:span></text:p>
      <text:list text:style-name="L21">
        <text:list-item>
          <text:p text:style-name="P47"><text:span text:style-name="T5">tìm xem </text:span><text:span text:style-name="Source_20_Text"><text:span text:style-name="T5">printf</text:span></text:span><text:span text:style-name="T5"> nằm ở đâu </text:span></text:p>
        </text:list-item>
        <text:list-item>
          <text:p text:style-name="P59">gán địa chỉ thật cho nó</text:p>
        </text:list-item>
      </text:list>
      <text:h text:style-name="P4" text:outline-level="1"><text:soft-page-break/>2. Static Linking (.a) - copy</text:h>
      <text:h text:style-name="P5" text:outline-level="2">2.1 Điều gì xảy ra bên trong?</text:h>
      <text:p text:style-name="P61">Ví dụ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1">gcc main.c -o app -static -lm</text:p>
          </table:table-cell>
        </table:table-row>
      </table:table>
      <text:h text:style-name="P6" text:outline-level="3">Bên trong linker làm:</text:h>
      <text:list text:style-name="L22">
        <text:list-item>
          <text:p text:style-name="P48"><text:span text:style-name="T5">Mở file </text:span><text:span text:style-name="Source_20_Text"><text:span text:style-name="T5">libm.a. </text:span></text:span><text:span text:style-name="T5">Đây thực chất là:</text:span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3"><text:bookmark text:name="code-block-viewer Copy 7"/>libm.a = tập hợp nhiều file .o</text:p>
          </table:table-cell>
        </table:table-row>
      </table:table>
      <text:p text:style-name="P53"/>
      <text:list text:continue-numbering="true" text:style-name="L22">
        <text:list-item>
          <text:p text:style-name="P60">Tìm symbol cần dùng: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4"><text:bookmark text:name="code-block-viewer Copy 8"/>sin, cos, sqrt...</text:p>
          </table:table-cell>
        </table:table-row>
      </table:table>
      <text:p text:style-name="P53"/>
      <text:list text:continue-numbering="true" text:style-name="L22">
        <text:list-item>
          <text:p text:style-name="P49"><text:span text:style-name="Strong_20_Emphasis"><text:span text:style-name="T5">Chỉ lấy những .o cần thiết</text:span></text:span><text:span text:style-name="T5">, không lấy toàn bộ thư viện </text:span></text:p>
        </text:list-item>
        <text:list-item>
          <text:p text:style-name="P49"><text:span text:style-name="T5">Copy code đó vào file </text:span><text:span text:style-name="Source_20_Text"><text:span text:style-name="T5">app</text:span></text:span><text:span text:style-name="T5"> </text:span></text:p>
        </text:list-item>
      </text:list>
      <text:h text:style-name="P5" text:outline-level="2">2.2 Kết quả trong executable</text:h>
      <text:p text:style-name="P61">File ELF lúc này:</text:p>
      <text:section text:style-name="Sect1" text:name="Section3">
        <text:p text:style-name="P22"><text:bookmark text:name="code-block-viewer Copy 9"/>[ code của main ]</text:p>
        <text:p text:style-name="P27">[ code của printf ]</text:p>
        <text:p text:style-name="P27">[ code của sin ]</text:p>
        <text:p text:style-name="P27">[ code của malloc ]</text:p>
        <text:p text:style-name="P27">...</text:p>
      </text:section>
      <text:p text:style-name="P77">2.3 Điều cực quan trọng</text:p>
      <text:h text:style-name="P9" text:outline-level="3"><text:span text:style-name="T5">Static linking KHÔNG copy toàn bộ thư viện→ chỉ copy </text:span><text:span text:style-name="Strong_20_Emphasis"><text:span text:style-name="T5">function nào dùng</text:span></text:span></text:h>
      <text:h text:style-name="P5" text:outline-level="2">2.4 RAM hoạt động như nào?</text:h>
      <text:p text:style-name="P61">Chạy 2 process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3"><text:bookmark text:name="code-block-viewer Copy 10"/>app1 (static)</text:p>
            <text:p text:style-name="P24">app2 (static)</text:p>
          </table:table-cell>
        </table:table-row>
      </table:table>
      <text:p text:style-name="P61">RAM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5"><text:bookmark text:name="code-block-viewer Copy 11"/>app1: libc copy riêng</text:p>
            <text:p text:style-name="P26">app2: libc copy riêng</text:p>
          </table:table-cell>
        </table:table-row>
      </table:table>
      <text:p text:style-name="P61">KHÔNG share được</text:p>
      <text:h text:style-name="P4" text:outline-level="1">3. Dynamic Linking (.so) - shared memory</text:h>
      <text:h text:style-name="P5" text:outline-level="2">3.1 Khi compile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8">gcc main.c -o app -lm</text:p>
          </table:table-cell>
        </table:table-row>
      </table:table>
      <text:p text:style-name="P1"><text:span text:style-name="T6">Executable không chứa code của </text:span><text:span text:style-name="Source_20_Text"><text:span text:style-name="T6">printf. </text:span></text:span><text:span text:style-name="T6">Thay vào đó chứa: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9"><text:bookmark text:name="code-block-viewer Copy 12"/>printf → cần resolve sau</text:p>
            <text:p text:style-name="P30">libc.so → cần load khi chạy</text:p>
          </table:table-cell>
        </table:table-row>
      </table:table>
      <text:p text:style-name="P61"/>
      <text:h text:style-name="P5" text:outline-level="2"><text:soft-page-break/>3.2 Bên trong file ELF có gì?</text:h>
      <text:p text:style-name="P61">Bạn có thể check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1"><text:bookmark text:name="code-block-viewer Copy 13"/>readelf -d app</text:p>
          </table:table-cell>
        </table:table-row>
      </table:table>
      <text:p text:style-name="P61">Sẽ thấy: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2"><text:bookmark text:name="code-block-viewer Copy 14"/>NEEDED: libc.so.6</text:p>
          </table:table-cell>
        </table:table-row>
      </table:table>
      <text:p text:style-name="P61">Nghĩa là: app cần libc.so.<text:span text:style-name="T9">6 khi chạy.</text:span></text:p>
      <text:h text:style-name="P5" text:outline-level="2">3.3 Runtime: chuyện gì thực sự xảy ra</text:h>
      <text:p text:style-name="P61">Khi bạn chạy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3"><text:bookmark text:name="code-block-viewer Copy 15"/>./app</text:p>
          </table:table-cell>
        </table:table-row>
      </table:table>
      <text:h text:style-name="P6" text:outline-level="3">Kernel load program vào RAM. Kernel thấy: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5"><text:bookmark text:name="code-block-viewer Copy 16"/>INTERP: /lib/ld-linux.so</text:p>
          </table:table-cell>
        </table:table-row>
      </table:table>
      <text:p text:style-name="P51"><text:span text:style-name="T5">Nó không chạy app ngay. Nó chạy </text:span><text:span text:style-name="Strong_20_Emphasis"><text:span text:style-name="T5">dynamic loader trước.</text:span></text:span></text:p>
      <text:p text:style-name="P79">3.4 Vai trò của Dynamic Loader</text:p>
      <text:p text:style-name="P61">Loader làm 4 việc chính:</text:p>
      <text:h text:style-name="P7" text:outline-level="3">a. Load tất cả thư viện cần thiết</text:h>
      <text:p text:style-name="P61">Tìm theo thứ tự:</text:p>
      <text:list text:style-name="L23">
        <text:list-item>
          <text:p text:style-name="P52"><text:span text:style-name="Source_20_Text"><text:span text:style-name="T6">LD_LIBRARY_PATH</text:span></text:span><text:span text:style-name="T6"> </text:span></text:p>
        </text:list-item>
        <text:list-item>
          <text:p text:style-name="P52"><text:span text:style-name="Source_20_Text"><text:span text:style-name="T6">/etc/ld.so.cache</text:span></text:span><text:span text:style-name="T6"> </text:span></text:p>
        </text:list-item>
        <text:list-item>
          <text:p text:style-name="P52"><text:span text:style-name="Source_20_Text"><text:span text:style-name="T6">/lib</text:span></text:span><text:span text:style-name="T6">, </text:span><text:span text:style-name="Source_20_Text"><text:span text:style-name="T6">/usr/lib</text:span></text:span><text:span text:style-name="T6"> </text:span></text:p>
        </text:list-item>
      </text:list>
      <text:h text:style-name="P7" text:outline-level="3">b. Map vào memory</text:h>
      <text:p text:style-name="P1"><text:span text:style-name="T6">Dùng </text:span><text:span text:style-name="Source_20_Text"><text:span text:style-name="T6">mmap</text:span></text:span><text:span text:style-name="T6">: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4"><text:bookmark text:name="code-block-viewer Copy 17"/>libc.so → mapped vào RAM</text:p>
          </table:table-cell>
        </table:table-row>
      </table:table>
      <text:p text:style-name="P74">Không copy → chỉ map</text:p>
      <text:p text:style-name="P78">c. Symbol Resolution</text:p>
      <text:p text:style-name="P61">Ví dụ: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5"><text:bookmark text:name="code-block-viewer Copy 18"/>printf → 0x7f123456</text:p>
          </table:table-cell>
        </table:table-row>
      </table:table>
      <text:p text:style-name="P75">Gán địa chỉ thật</text:p>
      <text:h text:style-name="P8" text:outline-level="3">d. Nhảy vào main()</text:h>
      <text:p text:style-name="P61">Sau khi setup xo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8:29:32.797020847</meta:creation-date>
    <dc:date>2026-04-22T01:49:35.820936625</dc:date>
    <meta:editing-duration>PT54M56S</meta:editing-duration>
    <meta:editing-cycles>87</meta:editing-cycles>
    <meta:generator>LibreOffice/24.2.7.2$Linux_X86_64 LibreOffice_project/420$Build-2</meta:generator>
    <meta:document-statistic meta:table-count="22" meta:image-count="0" meta:object-count="0" meta:page-count="5" meta:paragraph-count="174" meta:word-count="920" meta:character-count="4424" meta:non-whitespace-character-count="3682"/>
  </office:meta>
</office:document-meta>
</file>