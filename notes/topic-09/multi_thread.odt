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598in" fo:margin-bottom="0.0598in" style:contextual-spacing="false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margin-top="0.0598in" fo:margin-bottom="0.0598in" style:contextual-spacing="false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09ff0f"/>
    </style:style>
    <style:style style:name="T2" style:family="text">
      <style:text-properties officeooo:rsid="000b5656"/>
    </style:style>
    <style:style style:name="T3" style:family="text">
      <style:text-properties officeooo:rsid="000be016"/>
    </style:style>
    <style:style style:name="T4" style:family="text">
      <style:text-properties officeooo:rsid="000dde6c"/>
    </style:style>
    <style:style style:name="T5" style:family="text">
      <style:text-properties officeooo:rsid="000eb288"/>
    </style:style>
    <style:style style:name="T6" style:family="text">
      <style:text-properties officeooo:rsid="000f1c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️. Khái niệm Thread trong hệ điều hành</text:p>
      <text:p text:style-name="P1">- Định nghĩa chung</text:p>
      <text:p text:style-name="P1">Thread (luồng) là: Một đơn vị thực thi nhỏ nhất được hệ điều hành lập lịch.</text:p>
      <text:p text:style-name="P1">Nó bao gồm:</text:p>
      <text:p text:style-name="P1"><text:s text:c="4"/>• Program counter</text:p>
      <text:p text:style-name="P1"><text:s text:c="4"/>• Thanh ghi CPU</text:p>
      <text:p text:style-name="P1"><text:s text:c="4"/>• Stack riêng</text:p>
      <text:p text:style-name="P1">Nhưng chia sẻ tài nguyên với các thread khác trong cùng process.</text:p>
      <text:p text:style-name="P1">- Theo Linux kernel (rất quan trọng)</text:p>
      <text:p text:style-name="P1">Linux không phân biệt rõ process và thread như một số hệ điều hành khác.</text:p>
      <text:p text:style-name="P1">Trong Linux: Thread thực chất là một process được tạo bởi clone() với các tài nguyên được chia sẻ.</text:p>
      <text:p text:style-name="P1">Tất cả đều được biểu diễn bằng:</text:p>
      <text:p text:style-name="P1">struct task_struct</text:p>
      <text:p text:style-name="P1">Vì vậy:</text:p>
      <text:p text:style-name="P1"><text:s text:c="4"/>• Process và thread đều là “task”</text:p>
      <text:p text:style-name="P1"><text:s text:c="4"/>• Khác nhau ở mức độ chia sẻ tài nguyên</text:p>
      <text:p text:style-name="P2">2️. Multi-thread là gì?</text:p>
      <text:p text:style-name="P1">Multithread là:</text:p>
      <text:p text:style-name="P1">Một process có nhiều thread cùng tồn tại và thực thi song song.</text:p>
      <text:p text:style-name="P1">Các thread trong cùng process:</text:p>
      <text:p text:style-name="P1"><text:s text:c="4"/>• Chia sẻ cùng không gian địa chỉ</text:p>
      <text:p text:style-name="P1"><text:s text:c="4"/>• Chia sẻ file descriptor table</text:p>
      <text:p text:style-name="P1"><text:s text:c="4"/>• Chia sẻ signal handlers</text:p>
      <text:p text:style-name="P1"><text:s text:c="4"/>• Chia sẻ heap và global variables</text:p>
      <text:p text:style-name="P1">Nhưng mỗi thread có:</text:p>
      <text:p text:style-name="P1"><text:s text:c="4"/>• Stack riêng</text:p>
      <text:p text:style-name="P1"><text:s text:c="4"/>• Thanh ghi riêng</text:p>
      <text:p text:style-name="P1"><text:s text:c="4"/>• Program counter riêng</text:p>
      <text:p text:style-name="P2"><text:span text:style-name="T1">3</text:span>. Cách Linux tạo Thread (mức kernel)</text:p>
      <text:p text:style-name="P1">Linux dùng:</text:p>
      <text:p text:style-name="P1"><text:soft-page-break/>clone()</text:p>
      <text:p text:style-name="P1">Thay vì fork().</text:p>
      <text:p text:style-name="P1">fork()</text:p>
      <text:p text:style-name="P1"><text:s text:c="4"/>• Tạo process mới</text:p>
      <text:p text:style-name="P1"><text:s text:c="4"/>• Không chia sẻ address space</text:p>
      <text:p text:style-name="P1">clone()</text:p>
      <text:p text:style-name="P1"><text:s text:c="4"/>• Có thể chọn chia sẻ:</text:p>
      <text:p text:style-name="P1"><text:s text:c="8"/>◦ VM (CLONE_VM)</text:p>
      <text:p text:style-name="P1"><text:s text:c="8"/>◦ Files (CLONE_FILES)</text:p>
      <text:p text:style-name="P1"><text:s text:c="8"/>◦ Signal handlers (CLONE_SIGHAND)</text:p>
      <text:p text:style-name="P2"><text:span text:style-name="T1">4</text:span>. Hướng dẫn lập trình multithread cơ bản (user level – POSIX)</text:p>
      <text:p text:style-name="P1">Mặc dù sách tập trung vào kernel, ở user space ta thường dùng POSIX threads (pthreads).</text:p>
      <text:p text:style-name="P1">- Thư viện cần dùng</text:p>
      <text:p text:style-name="P1">#include &lt;pthread.h&gt;</text:p>
      <text:p text:style-name="P1">- Tạo thread</text:p>
      <text:p text:style-name="P1">void* thread_func(void* arg) {</text:p>
      <text:p text:style-name="P1"><text:s text:c="4"/>printf("Hello from thread\n");</text:p>
      <text:p text:style-name="P1"><text:s text:c="4"/>return NULL;</text:p>
      <text:p text:style-name="P1">}</text:p>
      <text:p text:style-name="P1">int main() {</text:p>
      <text:p text:style-name="P1"><text:s text:c="4"/>pthread_t tid;</text:p>
      <text:p text:style-name="P1"><text:s text:c="4"/>pthread_create(&amp;tid, NULL, thread_func, NULL);</text:p>
      <text:p text:style-name="P1"><text:s text:c="4"/>pthread_join(tid, NULL);</text:p>
      <text:p text:style-name="P1"><text:s text:c="4"/>return 0;</text:p>
      <text:p text:style-name="P1">}</text:p>
      <text:p text:style-name="P1">- Giải thích</text:p>
      <text:p text:style-name="P1">pthread_create()</text:p>
      <text:p text:style-name="P1"><text:s text:c="4"/>• Tạo thread mới</text:p>
      <text:p text:style-name="P1"><text:s text:c="4"/>• Kernel thực chất sẽ gọi clone() bên dưới</text:p>
      <text:p text:style-name="P1">pthread_join()</text:p>
      <text:p text:style-name="P1"><text:s text:c="4"/>• Đợi thread kết thúc</text:p>
      <text:p text:style-name="P1"><text:soft-page-break/><text:s text:c="4"/>• Thu hồi tài nguyên</text:p>
      <text:p text:style-name="P2"><text:span text:style-name="T2">5</text:span>. Đồng bộ trong multithread</text:p>
      <text:p text:style-name="P1">Vì các thread chia sẻ memory → có nguy cơ race condition.</text:p>
      <text:p text:style-name="P1">Cách cơ bản:</text:p>
      <text:p text:style-name="P1">Mutex</text:p>
      <text:p text:style-name="P1">pthread_mutex_t lock;</text:p>
      <text:p text:style-name="P1">pthread_mutex_init(&amp;lock, NULL);</text:p>
      <text:p text:style-name="P1">pthread_mutex_lock(&amp;lock);</text:p>
      <text:p text:style-name="P1">/* critical section */</text:p>
      <text:p text:style-name="P1">pthread_mutex_unlock(&amp;lock);</text:p>
      <text:p text:style-name="P2"><text:span text:style-name="T3">6</text:span>. Vòng đời của một thread trong Linux</text:p>
      <text:p text:style-name="P1"><text:s text:c="4"/>1. Thread được tạo (clone)</text:p>
      <text:p text:style-name="P1"><text:s text:c="4"/>2. Được đưa vào run queue</text:p>
      <text:p text:style-name="P1"><text:s text:c="4"/>3. Được scheduler chọn chạy</text:p>
      <text:p text:style-name="P1"><text:s text:c="4"/>4. Có thể sleep / block</text:p>
      <text:p text:style-name="P1"><text:s text:c="4"/>5. Kết thúc bằng:</text:p>
      <text:p text:style-name="P1"><text:s text:c="8"/>◦ return</text:p>
      <text:p text:style-name="P1"><text:s text:c="8"/>◦ pthread_exit()</text:p>
      <text:p text:style-name="P1">Kernel giải phóng task_struct khi hoàn tất.</text:p>
      <text:p text:style-name="P2"><text:span text:style-name="T4">7</text:span>. Cấu trúc bộ nhớ khi có multithread</text:p>
      <text:p text:style-name="P1">Ví dụ:</text:p>
      <text:p text:style-name="P1">Process Address Space</text:p>
      <text:p text:style-name="P1"><text:s/>├── Text (shared)</text:p>
      <text:p text:style-name="P1"><text:s/>├── Data (shared)</text:p>
      <text:p text:style-name="P1"><text:s/>├── Heap (shared)</text:p>
      <text:p text:style-name="P1"><text:s/>├── Thread 1 Stack</text:p>
      <text:p text:style-name="P1"><text:s/>├── Thread 2 Stack</text:p>
      <text:p text:style-name="P1"><text:s/>└── Shared Libraries</text:p>
      <text:p text:style-name="P2"><text:span text:style-name="T5">8</text:span>. Ưu điểm của multithreading</text:p>
      <text:p text:style-name="P1"><text:s text:c="4"/>• Tận dụng đa CPU</text:p>
      <text:p text:style-name="P1"><text:s text:c="4"/>• Chuyển context nhanh hơn process</text:p>
      <text:p text:style-name="P1"><text:soft-page-break/><text:s text:c="4"/>• Chia sẻ dữ liệu dễ dàng</text:p>
      <text:p text:style-name="P1"><text:s text:c="4"/>• Phù hợp server, I/O, song song hóa</text:p>
      <text:p text:style-name="P2"><text:span text:style-name="T6">9</text:span>. Nhược điểm</text:p>
      <text:p text:style-name="P1"><text:s text:c="4"/>• Race condition</text:p>
      <text:p text:style-name="P1"><text:s text:c="4"/>• Deadlock</text:p>
      <text:p text:style-name="P1"><text:s text:c="4"/>• Khó debug</text:p>
      <text:p text:style-name="P1"><text:s text:c="4"/>• Phải đồng bộ thủ công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0T14:22:55.379957839</dc:date>
    <meta:editing-duration>PT7M54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4" meta:paragraph-count="99" meta:word-count="474" meta:character-count="2688" meta:non-whitespace-character-count="2114"/>
  </office:meta>
</office:document-meta>
</file>