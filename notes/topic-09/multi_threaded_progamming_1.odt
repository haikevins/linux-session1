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P1" style:family="paragraph" style:parent-style-name="Heading_20_4">
      <style:paragraph-properties fo:text-align="justify" style:justify-single-word="false"/>
      <style:text-properties style:font-name="Liberation Serif" fo:font-size="13pt" style:font-size-asian="13pt" style:font-size-complex="13pt"/>
    </style:style>
    <style:style style:name="P2" style:family="paragraph" style:parent-style-name="Table_20_Contents">
      <style:paragraph-properties fo:text-align="justify" style:justify-single-word="false"/>
      <style:text-properties style:font-name="Liberation Serif" fo:font-size="13pt" style:font-size-asian="13pt" style:font-size-complex="13pt"/>
    </style:style>
    <style:style style:name="P3" style:family="paragraph" style:parent-style-name="Preformatted_20_Text">
      <style:text-properties style:font-name="Liberation Serif" fo:font-size="13pt" style:font-size-asian="13pt" style:font-size-complex="13pt"/>
    </style:style>
    <style:style style:name="P4" style:family="paragraph" style:parent-style-name="Preformatted_20_Text">
      <style:paragraph-properties fo:margin-top="0in" fo:margin-bottom="0.1965in" style:contextual-spacing="false"/>
      <style:text-properties style:font-name="Liberation Serif" fo:font-size="13pt" style:font-size-asian="13pt" style:font-size-complex="13pt"/>
    </style:style>
    <style:style style:name="P5"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officeooo:paragraph-rsid="000d3281" style:font-size-asian="13pt" style:font-size-complex="13pt"/>
    </style:style>
    <style:style style:name="P6"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7"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8" style:family="paragraph" style:parent-style-name="Text_20_body">
      <style:paragraph-properties fo:margin-top="0.0598in" fo:margin-bottom="0.0598in" style:contextual-spacing="false" fo:line-height="100%" fo:text-align="justify" style:justify-single-word="false"/>
    </style:style>
    <style:style style:name="P9" style:family="paragraph" style:parent-style-name="Text_20_body">
      <style:paragraph-properties fo:margin-top="0.0598in" fo:margin-bottom="0.0598in" style:contextual-spacing="false" fo:line-height="100%" fo:text-align="justify" style:justify-single-word="false"/>
      <style:text-properties officeooo:paragraph-rsid="000dc118"/>
    </style:style>
    <style:style style:name="P10" style:family="paragraph" style:parent-style-name="Text_20_body">
      <style:paragraph-properties fo:margin-top="0.0598in" fo:margin-bottom="0.0598in" style:contextual-spacing="false" fo:line-height="100%" fo:text-align="justify" style:justify-single-word="false"/>
      <style:text-properties officeooo:paragraph-rsid="000fc3b0"/>
    </style:style>
    <style:style style:name="P11" style:family="paragraph" style:parent-style-name="Text_20_body">
      <style:paragraph-properties fo:margin-top="0.0598in" fo:margin-bottom="0.0598in" style:contextual-spacing="false" fo:line-height="100%" fo:text-align="justify" style:justify-single-word="false"/>
      <style:text-properties officeooo:paragraph-rsid="001fc495"/>
    </style:style>
    <style:style style:name="P12" style:family="paragraph" style:parent-style-name="Text_20_body">
      <style:paragraph-properties fo:margin-top="0.0598in" fo:margin-bottom="0.0598in" style:contextual-spacing="false" fo:line-height="100%" fo:text-align="start" style:justify-single-word="false"/>
      <style:text-properties officeooo:paragraph-rsid="000fb562"/>
    </style:style>
    <style:style style:name="P13" style:family="paragraph" style:parent-style-name="Text_20_body">
      <style:paragraph-properties fo:margin-top="0.0598in" fo:margin-bottom="0.0598in" style:contextual-spacing="false" fo:line-height="100%" fo:text-align="start" style:justify-single-word="false"/>
    </style:style>
    <style:style style:name="T1" style:family="text">
      <style:text-properties fo:font-weight="bold"/>
    </style:style>
    <style:style style:name="T2" style:family="text">
      <style:text-properties style:font-name="Liberation Serif" fo:font-size="13pt" style:font-size-asian="13pt" style:font-size-complex="13pt"/>
    </style:style>
    <style:style style:name="T3" style:family="text">
      <style:text-properties style:font-name="Liberation Serif" fo:font-size="13pt" officeooo:rsid="0011b101" style:font-size-asian="13pt" style:font-size-complex="13pt"/>
    </style:style>
    <style:style style:name="T4" style:family="text">
      <style:text-properties style:font-name="Liberation Serif" fo:font-size="13pt" officeooo:rsid="001f60ba" style:font-size-asian="13pt" style:font-size-complex="13pt"/>
    </style:style>
    <style:style style:name="T5" style:family="text">
      <style:text-properties style:font-name="Liberation Serif" fo:font-size="13pt" officeooo:rsid="002442b7" style:font-size-asian="13pt" style:font-size-complex="13pt"/>
    </style:style>
    <style:style style:name="T6" style:family="text">
      <style:text-properties style:font-name="Liberation Serif" fo:font-size="13pt" fo:font-weight="bold"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Nguồn tham khảo: </text:span><text:a xlink:type="simple" xlink:href="https://www.linuxjournal.com/article/3138" text:style-name="Internet_20_link" text:visited-style-name="Visited_20_Internet_20_Link"><text:span text:style-name="T5">https://www.linuxjournal.com/article/3138</text:span></text:a></text:p>
      <text:p text:style-name="P7">Mục đích của bài viết này là cung cấp một nền tảng cơ bản vững chắc về lập trình đa luồng (<text:span text:style-name="T1">threaded programming</text:span>) sử dụng POSIX threads, chứ không nhằm mục đích trở thành một tài liệu đầy đủ về lập trình luồng. Bài viết giả định người đọc đã có kiến thức nền tảng tốt về lập trình ngôn ngữ C.</text:p>
      <text:p text:style-name="P8"><text:span text:style-name="T2">Một luồng (</text:span><text:span text:style-name="T6">thread</text:span><text:span text:style-name="T2">) đôi khi được gọi là một tiến trình nhẹ (</text:span><text:span text:style-name="T6">lightweight process</text:span><text:span text:style-name="T2">). Một luồng sẽ chia sẻ tất cả các biến toàn cục và các mô tả tệp (</text:span><text:span text:style-name="T6">file descriptors</text:span><text:span text:style-name="T2">) của tiến trình cha, cho phép lập trình viên dễ dàng tách biệt nhiều tác vụ khác nhau trong cùng một tiến trình. Ví dụ, bạn có thể viết một máy chủ web đa luồng và tạo ra một luồng cho mỗi yêu cầu kết nối gửi đến. Điều này sẽ giúp mã nguồn xử lý mạng bên trong luồng trở nên tương đối đơn giản. Việc sử dụng đa luồng cũng tiêu tốn ít tài nguyên hệ thống hơn so với việc sử dụng lệnh </text:span><text:span text:style-name="Source_20_Text"><text:span text:style-name="T2">fork()</text:span></text:span><text:span text:style-name="T2"> để tạo một tiến trình con xử lý yêu cầu kết nối. Một ưu điểm khác của việc sử dụng luồng là chúng sẽ tự động tận dụng được sức mạnh của các máy tính có nhiều bộ vi xử lý.</text:span></text:p>
      <text:p text:style-name="P8"><text:span text:style-name="T2">Như tôi đã đề cập trước đó, một luồng chia sẻ hầu hết tài nguyên với tiến trình cha, vì vậy một luồng sẽ sử dụng ít tài nguyên hơn một tiến trình. Nó chia sẻ mọi thứ, ngoại trừ việc mỗi luồng sẽ có bộ đếm chương trình (</text:span><text:span text:style-name="T6">program counter</text:span><text:span text:style-name="T2">), ngăn xếp (</text:span><text:span text:style-name="T6">stack</text:span><text:span text:style-name="T2">) và các thanh ghi (</text:span><text:span text:style-name="T6">registers</text:span><text:span text:style-name="T2">) riêng. Vì mỗi luồng có ngăn xếp riêng, các biến cục bộ sẽ không được chia sẻ giữa các luồng. Các biến tĩnh (</text:span><text:span text:style-name="T6">static variables</text:span><text:span text:style-name="T2">) được lưu trữ trong vùng nhớ data segment của tiến trình. Do đó, các biến tĩnh bên trong luồng vẫn sẽ được chia sẻ giữa các luồng với nhau. Các hàm như </text:span><text:span text:style-name="Source_20_Text"><text:span text:style-name="T2">strok</text:span></text:span><text:span text:style-name="T2"> sẽ không hoạt động chính xác bên trong các luồng nếu không được sửa đổi. Chúng có các phiên bản có khả năng tái nhập (</text:span><text:span text:style-name="T6">re-entrant</text:span><text:span text:style-name="T2">) dành riêng cho luồng, thường có định dạng </text:span><text:span text:style-name="Source_20_Text"><text:span text:style-name="T2">tên_hàm_r</text:span></text:span><text:span text:style-name="T2">. Vì vậy, phiên bản tái nhập của </text:span><text:span text:style-name="Source_20_Text"><text:span text:style-name="T2">strtok</text:span></text:span><text:span text:style-name="T2"> sẽ là </text:span><text:span text:style-name="Source_20_Text"><text:span text:style-name="T2">strtok_r</text:span></text:span><text:span text:style-name="T2">. Ví dụ: strtok <text:s/>char* token = strtok(str, ","); Bên trong strtok dùng biến static, để nhớ vị trí cắt tiếp theo. Vấn đề khi dùng trong multi-thread: Thread A gọi strtok → dùng static; Thread B gọi strtok → ghi đè static. Gây lỗi lung tung. Giải pháp là dùng hàm re-ent</text:span><text:span text:style-name="T3">rant có dạng tên hàm_r. </text:span><text:span text:style-name="T2">Ví dụ: strtok_r(str, ",", &amp;saveptr); Lúc này, không dùng biến static chung, bạn tự quản lý state </text:span><text:span text:style-name="T3">(saveptr).</text:span></text:p>
      <text:p text:style-name="P8"><text:span text:style-name="T2">Vì tất cả các luồng của một tiến trình đều chia sẻ cùng các biến toàn cục, một vấn đề nảy sinh liên quan đến việc đồng bộ hóa truy cập (</text:span><text:span text:style-name="T6">synchronization of access</text:span><text:span text:style-name="T2">) vào các biến toàn cục đó. Ví dụ, giả sử bạn có một biến toàn cục </text:span><text:span text:style-name="Source_20_Text"><text:span text:style-name="T2">X</text:span></text:span><text:span text:style-name="T2"> và hai luồng </text:span><text:span text:style-name="Source_20_Text"><text:span text:style-name="T2">A</text:span></text:span><text:span text:style-name="T2">, </text:span><text:span text:style-name="Source_20_Text"><text:span text:style-name="T2">B</text:span></text:span><text:span text:style-name="T2">. Giả sử luồng </text:span><text:span text:style-name="Source_20_Text"><text:span text:style-name="T2">A</text:span></text:span><text:span text:style-name="T2"> và </text:span><text:span text:style-name="Source_20_Text"><text:span text:style-name="T2">B</text:span></text:span><text:span text:style-name="T2"> chỉ đơn thuần là tăng giá trị của </text:span><text:span text:style-name="Source_20_Text"><text:span text:style-name="T2">X</text:span></text:span><text:span text:style-name="T2">. Khi luồng </text:span><text:span text:style-name="Source_20_Text"><text:span text:style-name="T2">A</text:span></text:span><text:span text:style-name="T2"> bắt đầu thực thi, nó sao chép giá trị của </text:span><text:span text:style-name="Source_20_Text"><text:span text:style-name="T2">X</text:span></text:span><text:span text:style-name="T2"> vào các thanh ghi và tăng giá trị đó lên. Trước khi nó kịp ghi giá trị đó trở lại bộ nhớ, luồng này bị tạm dừng. Luồng tiếp theo bắt đầu, đọc cùng một giá trị </text:span><text:span text:style-name="Source_20_Text"><text:span text:style-name="T2">X</text:span></text:span><text:span text:style-name="T2"> mà luồng đầu tiên đã đọc, tăng nó lên và ghi lại vào bộ nhớ. Sau đó, luồng đầu tiên hoàn tất thực thi và ghi giá trị từ thanh ghi của nó trở lại bộ nhớ. Sau khi hai luồng này kết thúc, giá trị của </text:span><text:span text:style-name="Source_20_Text"><text:span text:style-name="T2">X</text:span></text:span><text:span text:style-name="T2"> chỉ tăng thêm 1 thay vì tăng thêm 2 như kỳ vọng.</text:span></text:p>
      <text:p text:style-name="P7">Những lỗi như thế này có thể không xảy ra thường xuyên và do đó rất khó để truy vết (<text:span text:style-name="T1">track down</text:span>). Đây thậm chí còn là vấn đề lớn hơn đối với các máy tính được trang bị nhiều bộ vi xử lý, vì nhiều luồng có thể chạy cùng lúc trên các bộ vi xử lý khác nhau, mỗi luồng đều sửa đổi cùng một biến. Giải pháp cho vấn đề này là sử dụng một <text:span text:style-name="T1">mutex</text:span> (viết tắt của <text:span text:style-name="T1">mutual exclusion</text:span> - loại trừ tương hỗ) để đảm bảo rằng tại một thời điểm chỉ có duy nhất một luồng được truy cập vào một đoạn mã cụ thể. Khi một luồng khóa (lock) mutex, nó có quyền truy cập độc quyền vào đoạn mã đó cho đến khi nó mở khóa (unlock) mutex. Nếu một luồng thứ hai cố gắng khóa mutex trong khi một luồng khác đang khóa nó, luồng thứ hai sẽ bị chặn (<text:span text:style-name="T1">block</text:span>) cho đến khi mutex được mở khóa và sẵn dụng trở lại.</text:p>
      <text:p text:style-name="P8"><text:soft-page-break/><text:span text:style-name="T2">Trong ví dụ trước, bạn có thể khóa một mutex trước khi tăng giá trị biến </text:span><text:span text:style-name="Source_20_Text"><text:span text:style-name="T2">X</text:span></text:span><text:span text:style-name="T2">, sau đó mở khóa sau khi đã tăng xong. Hãy quay lại ví dụ đó: Luồng </text:span><text:span text:style-name="Source_20_Text"><text:span text:style-name="T2">A</text:span></text:span><text:span text:style-name="T2"> sẽ khóa mutex, nạp giá trị của </text:span><text:span text:style-name="Source_20_Text"><text:span text:style-name="T2">X</text:span></text:span><text:span text:style-name="T2"> vào các thanh ghi, sau đó tăng nó lên. Một lần nữa, trước khi nó kịp ghi lại vào bộ nhớ, luồng </text:span><text:span text:style-name="Source_20_Text"><text:span text:style-name="T2">B</text:span></text:span><text:span text:style-name="T2"> giành được quyền kiểm soát CPU. Nó sẽ cố gắng khóa mutex, nhưng luồng </text:span><text:span text:style-name="Source_20_Text"><text:span text:style-name="T2">A</text:span></text:span><text:span text:style-name="T2"> đã giữ quyền kiểm soát, vì vậy luồng </text:span><text:span text:style-name="Source_20_Text"><text:span text:style-name="T2">B</text:span></text:span><text:span text:style-name="T2"> sẽ phải chờ. Luồng </text:span><text:span text:style-name="Source_20_Text"><text:span text:style-name="T2">A</text:span></text:span><text:span text:style-name="T2"> lấy lại quyền CPU và ghi giá trị của </text:span><text:span text:style-name="Source_20_Text"><text:span text:style-name="T2">X</text:span></text:span><text:span text:style-name="T2"> vào bộ nhớ từ các thanh ghi, sau đó giải phóng mutex. Lần tới khi luồng </text:span><text:span text:style-name="Source_20_Text"><text:span text:style-name="T2">B</text:span></text:span><text:span text:style-name="T2"> chạy và cố gắng khóa mutex, nó sẽ thực hiện được vì mutex hiện đã tự do. Luồng </text:span><text:span text:style-name="Source_20_Text"><text:span text:style-name="T2">B</text:span></text:span><text:span text:style-name="T2"> sẽ tăng </text:span><text:span text:style-name="Source_20_Text"><text:span text:style-name="T2">X</text:span></text:span><text:span text:style-name="T2"> và ghi giá trị của nó trở lại </text:span><text:span text:style-name="Source_20_Text"><text:span text:style-name="T2">X</text:span></text:span><text:span text:style-name="T2"> từ các thanh ghi. Giờ đây, sau khi cả hai luồng đã hoàn tất, giá trị của </text:span><text:span text:style-name="Source_20_Text"><text:span text:style-name="T2">X</text:span></text:span><text:span text:style-name="T2"> tăng thêm 2, đúng như mong đợi.</text:span></text:p>
      <text:p text:style-name="P8"><text:span text:style-name="T2">Bây giờ hãy cùng xem cách viết các ứng dụng đa luồng trong thực tế. Hàm đầu tiên bạn cần là </text:span><text:span text:style-name="Source_20_Text"><text:span text:style-name="T2">pthread_create</text:span></text:span><text:span text:style-name="T2">. Nó có nguyên mẫu như sau:</text:span></text:p>
      <table:table table:name="Table1" table:style-name="Table1">
        <table:table-column table:style-name="Table1.A"/>
        <table:table-row>
          <table:table-cell table:style-name="Table1.A1" office:value-type="string">
            <text:p text:style-name="P5">int pthread_create(pthread_t *tid,</text:p>
            <text:p text:style-name="P5"><text:s text:c="3"/>const pthread_attr_t *attr,</text:p>
            <text:p text:style-name="P5"><text:s text:c="3"/>void *(*func)(void *), void *arg)</text:p>
          </table:table-cell>
        </table:table-row>
      </table:table>
      <text:p text:style-name="P8"><text:span text:style-name="T2">Tham số đầu tiên là biến nơi định danh luồng (</text:span><text:span text:style-name="T6">thread ID</text:span><text:span text:style-name="T2">) sẽ được lưu trữ. Mỗi luồng sẽ có một định danh duy nhất. Tham số thứ hai chứa các thuộc tính mô tả luồng; thông thường bạn chỉ cần truyền vào một con trỏ </text:span><text:span text:style-name="Source_20_Text"><text:span text:style-name="T2">NULL</text:span></text:span><text:span text:style-name="T2">. Tham số thứ ba là một con trỏ hàm trỏ đến hàm mà bạn muốn chạy dưới dạng một luồng. Tham số cuối cùng là con trỏ trỏ tới dữ liệu mà bạn muốn truyền vào hàm đó.</text:span></text:p>
      <text:p text:style-name="P8"><text:span text:style-name="T2">Để thoát khỏi một luồng, bạn có thể sử dụng hàm </text:span><text:span text:style-name="Source_20_Text"><text:span text:style-name="T2">pthread_exit</text:span></text:span><text:span text:style-name="T2">. Hàm này có cú pháp như sau:</text:span></text:p>
      <table:table table:name="Table2" table:style-name="Table2">
        <table:table-column table:style-name="Table2.A"/>
        <table:table-row>
          <table:table-cell table:style-name="Table2.A1" office:value-type="string">
            <text:p text:style-name="P9"><text:span text:style-name="Source_20_Text"><text:span text:style-name="T2">void pthread_exit(void *status)</text:span></text:span></text:p>
          </table:table-cell>
        </table:table-row>
      </table:table>
      <text:p text:style-name="P7">Hàm này sẽ trả về một con trỏ mà sau đó có thể được truy xuất lại (xem phần dưới). Bạn không được phép trả về một con trỏ trỏ tới biến cục bộ của luồng đó, vì dữ liệu này sẽ bị hủy khi luồng kết thúc.</text:p>
      <text:p text:style-name="P8"><text:span text:style-name="T2">Nguyên mẫu của hàm thực thi luồng cho thấy nó trả về một con trỏ kiểu </text:span><text:span text:style-name="Source_20_Text"><text:span text:style-name="T2">void *</text:span></text:span><text:span text:style-name="T2">. Ứng dụng của bạn có thể sử dụng hàm </text:span><text:span text:style-name="Source_20_Text"><text:span text:style-name="T2">pthread_join</text:span></text:span><text:span text:style-name="T2"> để lấy giá trị mà luồng đã trả về. Hàm </text:span><text:span text:style-name="Source_20_Text"><text:span text:style-name="T2">pthread_join</text:span></text:span><text:span text:style-name="T2"> có cú pháp như sau:</text:span></text:p>
      <table:table table:name="Table3" table:style-name="Table3">
        <table:table-column table:style-name="Table3.A"/>
        <table:table-row>
          <table:table-cell table:style-name="Table3.A1" office:value-type="string">
            <text:p text:style-name="P9"><text:span text:style-name="Source_20_Text"><text:span text:style-name="T2">int pthread_join(pthread_t tid, void **status)</text:span></text:span></text:p>
          </table:table-cell>
        </table:table-row>
      </table:table>
      <text:p text:style-name="P8"><text:span text:style-name="T2">Tham số đầu tiên là định danh luồng (</text:span><text:span text:style-name="T6">thread ID</text:span><text:span text:style-name="T2">). Tham số thứ hai là con trỏ trỏ đến dữ liệu mà hàm thực thi luồng trả về. Hệ thống sẽ theo vết các giá trị trả về từ các luồng cho đến khi bạn truy xuất chúng bằng </text:span><text:span text:style-name="Source_20_Text"><text:span text:style-name="T2">pthread_join</text:span></text:span><text:span text:style-name="T2">. Nếu bạn không quan tâm đến giá trị trả về, bạn có thể gọi hàm </text:span><text:span text:style-name="Source_20_Text"><text:span text:style-name="T2">pthread_detach</text:span></text:span><text:span text:style-name="T2"> với tham số duy nhất là định danh luồng để yêu cầu hệ thống hủy bỏ giá trị trả về đó. Hàm thực thi luồng có thể sử dụng hàm </text:span><text:span text:style-name="Source_20_Text"><text:span text:style-name="T2">pthread_self</text:span></text:span><text:span text:style-name="T2"> để lấy định danh của chính nó. Nếu không muốn nhận giá trị trả về, bạn có thể gọi </text:span><text:span text:style-name="Source_20_Text"><text:span text:style-name="T2">pthread_detach(pthread_self())</text:span></text:span><text:span text:style-name="T2"> ngay bên trong hàm thực thi luồng. Khi dùng detach rồi thì không dùng thread</text:span><text:span text:style-name="T4">_join sẽ gây lỗi.</text:span></text:p>
      <text:p text:style-name="P7">Ví dụ về ptrthread_join:</text:p>
      <table:table table:name="Table6" table:style-name="Table6">
        <table:table-column table:style-name="Table6.A"/>
        <table:table-row>
          <table:table-cell table:style-name="Table6.A1" office:value-type="string">
            <text:p text:style-name="P2">#include &lt;pthread.h&gt;</text:p>
            <text:p text:style-name="P2"><text:soft-page-break/>#include &lt;stdio.h&gt;</text:p>
            <text:p text:style-name="P2"/>
            <text:p text:style-name="P2">void* thread_func(void* arg) {</text:p>
            <text:p text:style-name="P2"><text:s text:c="4"/>int* result = malloc(sizeof(int));</text:p>
            <text:p text:style-name="P2"><text:s text:c="4"/>*result = 42;</text:p>
            <text:p text:style-name="P2"><text:s text:c="4"/>pthread_exit(result);</text:p>
            <text:p text:style-name="P2">}</text:p>
            <text:p text:style-name="P2"/>
            <text:p text:style-name="P2">int main() {</text:p>
            <text:p text:style-name="P2"><text:s text:c="4"/>pthread_t thread;</text:p>
            <text:p text:style-name="P2"><text:s text:c="4"/>void* status;</text:p>
            <text:p text:style-name="P2"/>
            <text:p text:style-name="P2"><text:s text:c="4"/>pthread_create(&amp;thread, NULL, thread_func, NULL);</text:p>
            <text:p text:style-name="P2"><text:s text:c="4"/>pthread_join(thread, &amp;status);</text:p>
            <text:p text:style-name="P2"/>
            <text:p text:style-name="P2"><text:s text:c="4"/>printf("Thread returned: %d\n", *(int*)status);</text:p>
            <text:p text:style-name="P2"/>
            <text:p text:style-name="P2"><text:s text:c="4"/>free(status);</text:p>
            <text:p text:style-name="P2"><text:s text:c="4"/>return 0;</text:p>
            <text:p text:style-name="P2">}</text:p>
          </table:table-cell>
        </table:table-row>
      </table:table>
      <text:p text:style-name="P7">Ví dụ về pthread_detach:</text:p>
      <table:table table:name="Table7" table:style-name="Table7">
        <table:table-column table:style-name="Table7.A"/>
        <table:table-row>
          <table:table-cell table:style-name="Table7.A1" office:value-type="string">
            <text:p text:style-name="P2">void* thread_func(void* arg) {</text:p>
            <text:p text:style-name="P2"><text:s text:c="4"/>pthread_detach(pthread_self()); // tu detach</text:p>
            <text:p text:style-name="P2"/>
            <text:p text:style-name="P2"><text:s text:c="4"/>printf("Thread running\n");</text:p>
            <text:p text:style-name="P2"><text:s text:c="4"/>sleep(1);</text:p>
            <text:p text:style-name="P2"/>
            <text:p text:style-name="P2"><text:s text:c="4"/>printf("Thread done\n");</text:p>
            <text:p text:style-name="P2"><text:s text:c="4"/>return NULL;</text:p>
            <text:p text:style-name="P2">}</text:p>
            <text:p text:style-name="P2"/>
            <text:p text:style-name="P2">// Main</text:p>
            <text:p text:style-name="P2">pthread_create(&amp;t, NULL, thread_func, NULL);</text:p>
            <text:p text:style-name="P2">// khong can pthread_join</text:p>
          </table:table-cell>
        </table:table-row>
      </table:table>
      <text:p text:style-name="P8"><text:span text:style-name="T2">Quay trở lại với mutex, chúng ta có hai hàm sau: </text:span><text:span text:style-name="Source_20_Text"><text:span text:style-name="T2">pthread_mutex_lock</text:span></text:span><text:span text:style-name="T2"> và </text:span><text:span text:style-name="Source_20_Text"><text:span text:style-name="T2">pthread_mutex_unlock</text:span></text:span><text:span text:style-name="T2">. Chúng có nguyên mẫu như sau:</text:span></text:p>
      <table:table table:name="Table4" table:style-name="Table4">
        <table:table-column table:style-name="Table4.A"/>
        <table:table-row>
          <table:table-cell table:style-name="Table4.A1" office:value-type="string">
            <text:p text:style-name="P12"><text:span text:style-name="Source_20_Text"><text:span text:style-name="T2">int pthread_mutex_lock(pthread_mutex_t *mptr)</text:span></text:span><text:span text:style-name="T2"> <text:line-break/></text:span><text:span text:style-name="Source_20_Text"><text:span text:style-name="T2">int pthread_mutex_unlock(pthread_mutex_t *mptr)</text:span></text:span></text:p>
          </table:table-cell>
        </table:table-row>
      </table:table>
      <text:p text:style-name="P11"><text:span text:style-name="T2">Đối với các biến được cấp phát tĩnh, trước tiên bạn phải khởi tạo biến mutex bằng hằng số </text:span><text:span text:style-name="Source_20_Text"><text:span text:style-name="T2">PTHREAD_MUTEX_INITIALIZER</text:span></text:span><text:span text:style-name="T2">.</text:span></text:p>
      <table:table table:name="Table8" table:style-name="Table8">
        <table:table-column table:style-name="Table8.A"/>
        <table:table-row>
          <table:table-cell table:style-name="Table8.A1" office:value-type="string">
            <text:p text:style-name="P2">pthread_mutex_t mutex = PTHREAD_MUTEX_INITIALIZER;</text:p>
          </table:table-cell>
        </table:table-row>
      </table:table>
      <text:p text:style-name="P11"><text:span text:style-name="T2">Đối với các biến được cấp phát động, bạn có thể sử dụng hàm </text:span><text:span text:style-name="Source_20_Text"><text:span text:style-name="T2">pthread_mutex_init</text:span></text:span><text:span text:style-name="T2"> để khởi tạo. Hàm này có nguyên mẫu:</text:span></text:p>
      <table:table table:name="Table5" table:style-name="Table5">
        <table:table-column table:style-name="Table5.A"/>
        <text:soft-page-break/>
        <table:table-row>
          <table:table-cell table:style-name="Table5.A1" office:value-type="string">
            <text:p text:style-name="P10"><text:span text:style-name="Source_20_Text"><text:span text:style-name="T2">int pthread_mutex_init(pthread_mutex_t *mutex, const pthread_mutexattr_t *mutexattr)</text:span></text:span></text:p>
          </table:table-cell>
        </table:table-row>
      </table:table>
      <text:p text:style-name="P8"><text:span text:style-name="T2">Bây giờ chúng ta có thể xem xét mã nguồn thực tế trong </text:span><text:span text:style-name="T6">Listing 1</text:span><text:span text:style-name="T2">. Tôi đã thêm chú thích vào mã nguồn để giúp người đọc theo dõi các bước thực hiện. Tôi cũng giữ cho chương trình ở mức cơ bản nhất; nó không làm điều gì thực sự hữu ích nhưng sẽ giúp minh họa ý tưởng về luồng. Chương trình này chỉ khởi tạo 10 luồng, mỗi luồng tăng biến </text:span><text:span text:style-name="Source_20_Text"><text:span text:style-name="T2">X</text:span></text:span><text:span text:style-name="T2"> cho đến khi </text:span><text:span text:style-name="Source_20_Text"><text:span text:style-name="T2">X</text:span></text:span><text:span text:style-name="T2"> đạt giá trị 4,000. Bạn có thể thử xóa các lệnh gọi </text:span><text:span text:style-name="Source_20_Text"><text:span text:style-name="T2">pthread_mutex_lock</text:span></text:span><text:span text:style-name="T2"> và </text:span><text:span text:style-name="Source_20_Text"><text:span text:style-name="T2">unlock</text:span></text:span><text:span text:style-name="T2"> để thấy rõ hơn công dụng của mutex.</text:span></text:p>
      <table:table table:name="Table9" table:style-name="Table9">
        <table:table-column table:style-name="Table9.A"/>
        <table:table-row>
          <table:table-cell table:style-name="Table9.A1" office:value-type="string">
            <text:h text:style-name="P1" text:outline-level="4">Listing 1. Example Program</text:h>
            <text:p text:style-name="P3">/* You can compile this program with:</text:p>
            <text:p text:style-name="P3"><text:s/>* gcc -Wall -D_REENTRANT -o thread thread.c&lt;\n&gt;</text:p>
            <text:p text:style-name="P3"><text:s/>* -lpthread */</text:p>
            <text:p text:style-name="P3">/* We always need to include this header file for&lt;\n&gt;</text:p>
            <text:p text:style-name="P3"><text:s/>* the threads */</text:p>
            <text:p text:style-name="P3">#include &lt;pthread.h&gt;</text:p>
            <text:p text:style-name="P3">#include &lt;stdio.h&gt;</text:p>
            <text:p text:style-name="P3">#include &lt;stdlib.h&gt;</text:p>
            <text:p text:style-name="P3">/* This is the prototype for our thread function */</text:p>
            <text:p text:style-name="P3">void *mythread(void *data);</text:p>
            <text:p text:style-name="P3">/* We must initialize our mutex */</text:p>
            <text:p text:style-name="P3">pthread_mutex_t count_mutex = PTHREAD_MUTEX_INITIALIZER;</text:p>
            <text:p text:style-name="P3">/* This will be a shared variable between all of&lt;\n&gt;</text:p>
            <text:p text:style-name="P3"><text:s/>* the threads */</text:p>
            <text:p text:style-name="P3">int x = 0;</text:p>
            <text:p text:style-name="P3">int main(void) {</text:p>
            <text:p text:style-name="P3"><text:s text:c="3"/>/* This will be an array holding the thread ids&lt;\n&gt;</text:p>
            <text:p text:style-name="P3"><text:s text:c="4"/>* for each thread */</text:p>
            <text:p text:style-name="P3"><text:s text:c="3"/>/* We keep track of all the tids so that we can&lt;\n&gt;</text:p>
            <text:p text:style-name="P3"><text:s text:c="4"/>* call pthread_join()later to retrieve</text:p>
            <text:p text:style-name="P3"><text:s text:c="4"/>* the return value from the thread */</text:p>
            <text:p text:style-name="P3"><text:s text:c="3"/>pthread_t tid[10];</text:p>
            <text:p text:style-name="P3"><text:s text:c="3"/>int i;</text:p>
            <text:p text:style-name="P3"><text:s text:c="3"/>/* We will now create the 10 threads. Each&lt;\n&gt;</text:p>
            <text:p text:style-name="P3"><text:s text:c="4"/>* thread will increment x until x is 4000.</text:p>
            <text:p text:style-name="P3"><text:s text:c="4"/>* On our last argument ot pthread_create</text:p>
            <text:p text:style-name="P3"><text:s text:c="4"/>* we could have passed an argument to the</text:p>
            <text:p text:style-name="P3"><text:s text:c="4"/>* thread function */</text:p>
            <text:p text:style-name="P3"><text:s text:c="3"/>for(i=0; i&lt;10; i++) {</text:p>
            <text:p text:style-name="P3"><text:s text:c="6"/>pthread_create(&amp;tids[i], NULL, mythread, NULL);</text:p>
            <text:p text:style-name="P3"><text:s text:c="3"/>}</text:p>
            <text:p text:style-name="P3"><text:s text:c="3"/>/* We will now wait for each thread to&lt;\n&gt;</text:p>
            <text:p text:style-name="P3"><text:s text:c="4"/>* terminate */</text:p>
            <text:p text:style-name="P3"><text:s text:c="3"/>for(i=0; i&lt;10; i++) {</text:p>
            <text:p text:style-name="P3"><text:s text:c="3"/>/* This will block until the specified</text:p>
            <text:p text:style-name="P3"><text:s text:c="4"/>* thread finishes execution. Our second</text:p>
            <text:p text:style-name="P3"><text:s text:c="4"/>* argument to pthread_join can be a pointer</text:p>
            <text:p text:style-name="P3"><text:soft-page-break/><text:s text:c="4"/>* that will have the return value of the</text:p>
            <text:p text:style-name="P3"><text:s text:c="4"/>* thread stored in it */</text:p>
            <text:p text:style-name="P3"><text:s text:c="6"/>pthread_join(tids[i], NULL);</text:p>
            <text:p text:style-name="P3"><text:s text:c="6"/>printf("Thread id %ld returned\n", tids[i]);</text:p>
            <text:p text:style-name="P3"><text:s text:c="3"/>}</text:p>
            <text:p text:style-name="P3"><text:s text:c="3"/>return(1);</text:p>
            <text:p text:style-name="P3">}</text:p>
            <text:p text:style-name="P3"><text:s text:c="3"/>/* This is our actual thread function */</text:p>
            <text:p text:style-name="P3">void *mythread(void *data) {</text:p>
            <text:p text:style-name="P3"><text:s text:c="3"/>while(x &lt; 4000) {</text:p>
            <text:p text:style-name="P3"><text:s text:c="6"/>/* We will now try to lock the mutex. If</text:p>
            <text:p text:style-name="P3"><text:s text:c="7"/>* another thread already has it locked, we</text:p>
            <text:p text:style-name="P3"><text:s text:c="7"/>* block until it is available again. After</text:p>
            <text:p text:style-name="P3"><text:s text:c="7"/>* you first run this program, you should</text:p>
            <text:p text:style-name="P3"><text:s text:c="7"/>* comment out the lock/unlock lines in this</text:p>
            <text:p text:style-name="P3"><text:s text:c="7"/>* function so that you can see why you need</text:p>
            <text:p text:style-name="P3"><text:s text:c="7"/>* mutexes. */</text:p>
            <text:p text:style-name="P3"><text:s text:c="6"/>pthread_mutex_lock(&amp;count_mutex);</text:p>
            <text:p text:style-name="P3"><text:s text:c="6"/>x++;</text:p>
            <text:p text:style-name="P3"><text:s text:c="6"/>/* We will have it print out the thread ID</text:p>
            <text:p text:style-name="P3"><text:s text:c="7"/>* and the value of X */</text:p>
            <text:p text:style-name="P3"><text:s text:c="6"/>printf("Thread ID%ld: X is now %d.\n",</text:p>
            <text:p text:style-name="P3"><text:s text:c="9"/>pthread_self(), x);</text:p>
            <text:p text:style-name="P3"><text:s text:c="6"/>/* We will now release the mutex so that</text:p>
            <text:p text:style-name="P3"><text:s text:c="7"/>* another thread gets the chance to run. */</text:p>
            <text:p text:style-name="P3"><text:s text:c="6"/>pthread_mutex_unlock(&amp;count_mutex);</text:p>
            <text:p text:style-name="P3"><text:s text:c="3"/>}</text:p>
            <text:p text:style-name="P3"><text:s text:c="3"/>/* We can return a pointer. Whatever pointer</text:p>
            <text:p text:style-name="P3"><text:s text:c="4"/>* we return can later be retrieved using the</text:p>
            <text:p text:style-name="P3"><text:s text:c="4"/>* pthread_join function */</text:p>
            <text:p text:style-name="P3"><text:s text:c="3"/>pthread_exit(NULL);</text:p>
            <text:p text:style-name="P4">}</text:p>
          </table:table-cell>
        </table:table-row>
      </table:table>
      <text:p text:style-name="P8"><text:span text:style-name="T2">Có thêm một vài điểm cần giải thích về chương trình này. Các luồng trên hệ thống của bạn có thể chạy theo thứ tự mà chúng được tạo ra, và chúng có thể chạy cho đến khi hoàn tất trước khi luồng tiếp theo bắt đầu. Tuy nhiên, </text:span><text:span text:style-name="T6">không có gì đảm bảo</text:span><text:span text:style-name="T2"> về thứ tự thực thi của các luồng, hoặc việc các luồng sẽ chạy liên tục đến khi kết thúc mà không bị ngắt. Nếu bạn đưa các "tác vụ thực tế" vào trong hàm thực thi luồng, bạn sẽ thấy bộ lập lịch (</text:span><text:span text:style-name="T6">scheduler</text:span><text:span text:style-name="T2">) hoán chuyển giữa các luồng. Bạn cũng có thể nhận thấy rằng, nếu bỏ khóa mutex, giá trị của </text:span><text:span text:style-name="Source_20_Text"><text:span text:style-name="T2">X</text:span></text:span><text:span text:style-name="T2"> vẫn có thể đúng như mong đợi. Điều này hoàn toàn phụ thuộc vào thời điểm các luồng bị tạm dừng (</text:span><text:span text:style-name="T6">suspended</text:span><text:span text:style-name="T2">) và được tiếp tục (</text:span><text:span text:style-name="T6">resumed</text:span><text:span text:style-name="T2">). Một ứng dụng đa luồng có thể trông có vẻ hoạt động tốt lúc đầu, nhưng khi chạy trên một máy tính đang xử lý nhiều tác vụ khác cùng lúc, chương trình có thể bị treo hoặc lỗi. Việc tìm ra những loại lỗi này có thể rất phiền toái đối với lập trình viên; đó là lý do tại sao lập trình viên phải đảm bảo các biến dùng chung (</text:span><text:span text:style-name="T6">shared variables</text:span><text:span text:style-name="T2">) luôn được bảo vệ bằng mutex.</text:span></text:p>
      <text:p text:style-name="P8"><text:span text:style-name="T2">Còn về giá trị của biến toàn cục </text:span><text:span text:style-name="Source_20_Text"><text:span text:style-name="T2">errno</text:span></text:span><text:span text:style-name="T2"> thì sao? Giả sử chúng ta có hai luồng A và B. Cả hai đang chạy và nằm ở các vị trí khác nhau trong luồng. Luồng A gọi một hàm khiến giá trị </text:span><text:soft-page-break/><text:span text:style-name="Source_20_Text"><text:span text:style-name="T2">errno</text:span></text:span><text:span text:style-name="T2"> bị thay đổi. Sau đó, luồng B được đánh thức và kiểm tra giá trị </text:span><text:span text:style-name="Source_20_Text"><text:span text:style-name="T2">errno</text:span></text:span><text:span text:style-name="T2">. Khi đó, nó sẽ nhận được giá trị không như mong đợi vì đó là giá trị </text:span><text:span text:style-name="Source_20_Text"><text:span text:style-name="T2">errno</text:span></text:span><text:span text:style-name="T2"> vừa được thiết lập từ luồng A. Để giải quyết vấn đề này, chúng ta phải định nghĩa macro </text:span><text:span text:style-name="Source_20_Text"><text:span text:style-name="T2">_REENTRANT</text:span></text:span><text:span text:style-name="T2">. Việc này sẽ thay đổi hành vi của </text:span><text:span text:style-name="Source_20_Text"><text:span text:style-name="T2">errno</text:span></text:span><text:span text:style-name="T2">, khiến nó trỏ đến một vùng nhớ </text:span><text:span text:style-name="Source_20_Text"><text:span text:style-name="T2">errno</text:span></text:span><text:span text:style-name="T2"> riêng biệt cho mỗi luồng (</text:span><text:span text:style-name="T6">per-thread errno location</text:span><text:span text:style-name="T2">). Quá trình này diễn ra hoàn toàn minh bạch đối với lập trình viên. Macro </text:span><text:span text:style-name="Source_20_Text"><text:span text:style-name="T2">_REENTRANT</text:span></text:span><text:span text:style-name="T2"> cũng sẽ thay đổi hành vi của một số hàm C tiêu chuẩn khác.</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0T14:24:22.745582644</meta:creation-date>
    <dc:date>2026-04-10T15:28:32.356969247</dc:date>
    <meta:editing-duration>PT53M1S</meta:editing-duration>
    <meta:editing-cycles>27</meta:editing-cycles>
    <meta:generator>LibreOffice/24.2.7.2$Linux_X86_64 LibreOffice_project/420$Build-2</meta:generator>
    <meta:document-statistic meta:table-count="9" meta:image-count="0" meta:object-count="0" meta:page-count="6" meta:paragraph-count="125" meta:word-count="2386" meta:character-count="12157" meta:non-whitespace-character-count="9592"/>
  </office:meta>
</office:document-meta>
</file>