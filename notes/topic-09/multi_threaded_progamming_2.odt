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6.6931in" style:rel-column-width="9638*"/>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P1" style:family="paragraph" style:parent-style-name="Heading_20_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 style:family="paragraph" style:parent-style-name="Heading_20_2">
      <style:paragraph-properties fo:margin-top="0.0598in" fo:margin-bottom="0.0598in" style:contextual-spacing="false" fo:line-height="100%" fo:text-align="justify" style:justify-single-word="false"/>
      <style:text-properties style:font-name="Liberation Serif" fo:font-size="13pt" fo:font-weight="bold" style:font-size-asian="13pt" style:font-weight-asian="bold" style:font-size-complex="13pt" style:font-weight-complex="bold"/>
    </style:style>
    <style:style style:name="P3" style:family="paragraph" style:parent-style-name="Heading_20_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4" style:family="paragraph" style:parent-style-name="Heading_20_3">
      <style:paragraph-properties fo:margin-top="0.0598in" fo:margin-bottom="0.0598in" style:contextual-spacing="false" fo:line-height="100%" fo:text-align="justify"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Heading_20_3">
      <style:paragraph-properties fo:margin-top="0.0598in" fo:margin-bottom="0.0598in" style:contextual-spacing="false" fo:line-height="100%" fo:text-align="justify" style:justify-single-word="false"/>
    </style:style>
    <style:style style:name="P6" style:family="paragraph" style:parent-style-name="Standard">
      <style:paragraph-properties fo:margin-top="0.0598in" fo:margin-bottom="0.0598in" style:contextual-spacing="false" fo:line-height="100%" fo:text-align="justify" style:justify-single-word="false"/>
      <style:text-properties style:font-name="Liberation Serif" fo:font-size="13pt" officeooo:paragraph-rsid="001dc2af" style:font-size-asian="13pt" style:font-size-complex="13pt"/>
    </style:style>
    <style:style style:name="P7" style:family="paragraph" style:parent-style-name="Standard">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8" style:family="paragraph" style:parent-style-name="Standard">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9" style:family="paragraph" style:parent-style-name="Standard">
      <style:paragraph-properties fo:margin-top="0.0598in" fo:margin-bottom="0.0598in" style:contextual-spacing="false" fo:line-height="100%" fo:text-align="justify" style:justify-single-word="false"/>
    </style:style>
    <style:style style:name="P10" style:family="paragraph" style:parent-style-name="Table_20_Contents">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1" style:family="paragraph" style:parent-style-name="Table_20_Contents">
      <style:paragraph-properties fo:margin-top="0.0598in" fo:margin-bottom="0.0598in" style:contextual-spacing="false" fo:line-height="100%" fo:text-align="start" style:justify-single-word="false"/>
      <style:text-properties style:font-name="Liberation Serif" fo:font-size="13pt" style:font-size-asian="13pt" style:font-size-complex="13pt"/>
    </style:style>
    <style:style style:name="P12" style:family="paragraph" style:parent-style-name="Text_20_body" style:list-style-name="L1">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3" style:family="paragraph" style:parent-style-name="Text_20_body" style:list-style-name="L2">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4" style:family="paragraph" style:parent-style-name="Text_20_body" style:list-style-name="L3">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5" style:family="paragraph" style:parent-style-name="Text_20_body" style:list-style-name="L5">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6" style:family="paragraph" style:parent-style-name="Text_20_body" style:list-style-name="L6">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7" style:family="paragraph" style:parent-style-name="Text_20_body" style:list-style-name="L7">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18" style:family="paragraph" style:parent-style-name="Text_20_body">
      <style:paragraph-properties fo:margin-left="0in" fo:margin-right="0in" fo:margin-top="0.0598in" fo:margin-bottom="0.0598in" style:contextual-spacing="false" fo:line-height="100%" fo:text-align="justify" style:justify-single-word="false" fo:text-indent="0in" style:auto-text-indent="false"/>
      <style:text-properties style:font-name="Liberation Serif" fo:font-size="13pt" style:font-size-asian="13pt" style:font-size-complex="13pt"/>
    </style:style>
    <style:style style:name="P19" style:family="paragraph" style:parent-style-name="Text_20_body" style:list-style-name="L18">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0" style:family="paragraph" style:parent-style-name="Text_20_body" style:list-style-name="L19">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1" style:family="paragraph" style:parent-style-name="Text_20_body" style:list-style-name="L24">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2" style:family="paragraph" style:parent-style-name="Text_20_body" style:list-style-name="L25">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3" style:family="paragraph" style:parent-style-name="Text_20_body" style:list-style-name="L26">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4" style:family="paragraph" style:parent-style-name="Text_20_body" style:list-style-name="L27">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5" style:family="paragraph" style:parent-style-name="Text_20_body">
      <style:paragraph-properties fo:margin-top="0.0598in" fo:margin-bottom="0.0598in" style:contextual-spacing="false" fo:line-height="100%" fo:text-align="justify" style:justify-single-word="false"/>
      <style:text-properties style:font-name="Liberation Serif" fo:font-size="13pt" style:font-size-asian="13pt" style:font-size-complex="13pt"/>
    </style:style>
    <style:style style:name="P26" style:family="paragraph" style:parent-style-name="Text_20_body">
      <style:paragraph-properties fo:margin-top="0.0598in" fo:margin-bottom="0.0598in" style:contextual-spacing="false" fo:line-height="100%" fo:text-align="start" style:justify-single-word="false"/>
      <style:text-properties style:font-name="Liberation Serif" fo:font-size="13pt" style:font-size-asian="13pt" style:font-size-complex="13pt"/>
    </style:style>
    <style:style style:name="P27"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style:font-size-asian="13pt" style:font-size-complex="13pt"/>
    </style:style>
    <style:style style:name="P28"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bold" style:font-size-asian="13pt" style:font-weight-asian="normal" style:font-size-complex="13pt" style:font-weight-complex="normal"/>
    </style:style>
    <style:style style:name="P29"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normal" officeooo:paragraph-rsid="00250379" style:font-size-asian="13pt" style:font-weight-asian="normal" style:font-size-complex="13pt" style:font-weight-complex="normal"/>
    </style:style>
    <style:style style:name="P30" style:family="paragraph" style:parent-style-name="Text_20_body" style:list-style-name="L17">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1"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weight="normal" style:font-size-asian="13pt" style:font-weight-asian="normal" style:font-size-complex="13pt" style:font-weight-complex="normal"/>
    </style:style>
    <style:style style:name="P32" style:family="paragraph" style:parent-style-name="Text_20_body">
      <style:paragraph-properties fo:margin-top="0.0598in" fo:margin-bottom="0.0598in" style:contextual-spacing="false" fo:line-height="100%" fo:text-align="justify" style:justify-single-word="false"/>
      <style:text-properties style:font-name="Liberation Serif" fo:font-size="13pt" fo:font-style="italic" style:font-size-asian="13pt" style:font-size-complex="13pt"/>
    </style:style>
    <style:style style:name="P33" style:family="paragraph" style:parent-style-name="Text_20_body" style:list-style-name="L5">
      <style:paragraph-properties fo:margin-top="0.0598in" fo:margin-bottom="0.0598in" style:contextual-spacing="false" fo:line-height="100%" fo:text-align="justify" style:justify-single-word="false"/>
    </style:style>
    <style:style style:name="P34" style:family="paragraph" style:parent-style-name="Text_20_body" style:list-style-name="L6">
      <style:paragraph-properties fo:margin-top="0.0598in" fo:margin-bottom="0.0598in" style:contextual-spacing="false" fo:line-height="100%" fo:text-align="justify" style:justify-single-word="false"/>
      <style:text-properties officeooo:paragraph-rsid="0023249f"/>
    </style:style>
    <style:style style:name="P35" style:family="paragraph" style:parent-style-name="Text_20_body" style:list-style-name="L8">
      <style:paragraph-properties fo:margin-top="0.0598in" fo:margin-bottom="0.0598in" style:contextual-spacing="false" fo:line-height="100%" fo:text-align="justify" style:justify-single-word="false"/>
    </style:style>
    <style:style style:name="P36" style:family="paragraph" style:parent-style-name="Text_20_body" style:list-style-name="L8">
      <style:paragraph-properties fo:margin-top="0.0598in" fo:margin-bottom="0.0598in" style:contextual-spacing="false" fo:line-height="100%" fo:text-align="justify" style:justify-single-word="false"/>
      <style:text-properties officeooo:paragraph-rsid="0031a6b4"/>
    </style:style>
    <style:style style:name="P37" style:family="paragraph" style:parent-style-name="Text_20_body">
      <style:paragraph-properties fo:margin-top="0.0598in" fo:margin-bottom="0.0598in" style:contextual-spacing="false" fo:line-height="100%" fo:text-align="justify" style:justify-single-word="false"/>
      <style:text-properties officeooo:paragraph-rsid="00250379"/>
    </style:style>
    <style:style style:name="P38" style:family="paragraph" style:parent-style-name="Text_20_body" style:list-style-name="L17">
      <style:paragraph-properties fo:margin-top="0.0598in" fo:margin-bottom="0.0598in" style:contextual-spacing="false" fo:line-height="100%" fo:text-align="justify" style:justify-single-word="false"/>
    </style:style>
    <style:style style:name="P39" style:family="paragraph" style:parent-style-name="Text_20_body" style:list-style-name="L19">
      <style:paragraph-properties fo:margin-top="0.0598in" fo:margin-bottom="0.0598in" style:contextual-spacing="false" fo:line-height="100%" fo:text-align="justify" style:justify-single-word="false"/>
    </style:style>
    <style:style style:name="P40" style:family="paragraph" style:parent-style-name="Text_20_body" style:list-style-name="L24">
      <style:paragraph-properties fo:margin-top="0.0598in" fo:margin-bottom="0.0598in" style:contextual-spacing="false" fo:line-height="100%" fo:text-align="justify" style:justify-single-word="false"/>
    </style:style>
    <style:style style:name="P41" style:family="paragraph" style:parent-style-name="Text_20_body" style:list-style-name="L25">
      <style:paragraph-properties fo:margin-top="0.0598in" fo:margin-bottom="0.0598in" style:contextual-spacing="false" fo:line-height="100%" fo:text-align="justify" style:justify-single-word="false"/>
    </style:style>
    <style:style style:name="P42" style:family="paragraph" style:parent-style-name="Text_20_body" style:list-style-name="L26">
      <style:paragraph-properties fo:margin-top="0.0598in" fo:margin-bottom="0.0598in" style:contextual-spacing="false" fo:line-height="100%" fo:text-align="justify" style:justify-single-word="false"/>
    </style:style>
    <style:style style:name="P43" style:family="paragraph" style:parent-style-name="Text_20_body" style:list-style-name="L27">
      <style:paragraph-properties fo:margin-top="0.0598in" fo:margin-bottom="0.0598in" style:contextual-spacing="false" fo:line-height="100%" fo:text-align="justify" style:justify-single-word="false"/>
    </style:style>
    <style:style style:name="P44" style:family="paragraph" style:parent-style-name="Text_20_body">
      <style:paragraph-properties fo:margin-top="0.0598in" fo:margin-bottom="0.0598in" style:contextual-spacing="false" fo:line-height="100%" fo:text-align="justify" style:justify-single-word="false"/>
    </style:style>
    <style:style style:name="P45" style:family="paragraph" style:parent-style-name="Text_20_body">
      <style:paragraph-properties fo:margin-top="0.0598in" fo:margin-bottom="0.0598in" style:contextual-spacing="false" fo:line-height="100%" fo:text-align="start" style:justify-single-word="false"/>
      <style:text-properties officeooo:paragraph-rsid="00263d4c"/>
    </style:style>
    <style:style style:name="P46" style:family="paragraph" style:parent-style-name="Text_20_body">
      <style:paragraph-properties fo:margin-top="0.0598in" fo:margin-bottom="0.0598in" style:contextual-spacing="false" fo:line-height="100%"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style:font-name="Liberation Serif" fo:font-size="13pt" fo:font-weight="bold" style:font-size-asian="13pt" style:font-size-complex="13pt"/>
    </style:style>
    <style:style style:name="T5" style:family="text">
      <style:text-properties style:font-name="Liberation Serif" fo:font-size="13pt" style:font-size-asian="13pt" style:font-size-complex="13pt"/>
    </style:style>
    <style:style style:name="T6" style:family="text">
      <style:text-properties style:font-name="Liberation Serif" fo:font-size="13pt" officeooo:rsid="002ff8b0" style:font-size-asian="13pt" style:font-size-complex="13pt"/>
    </style:style>
    <style:style style:name="T7" style:family="text">
      <style:text-properties style:font-name="Liberation Serif" fo:font-size="13pt" fo:font-weight="normal" style:font-size-asian="13pt" style:font-weight-asian="normal" style:font-size-complex="13pt" style:font-weight-complex="normal"/>
    </style:style>
    <style:style style:name="T8" style:family="text">
      <style:text-properties fo:font-style="italic"/>
    </style:style>
    <style:style style:name="T9" style:family="text">
      <style:text-properties officeooo:rsid="00349c9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5.1 Các khái niệm cơ bản về lập trình đa luồng</text:h>
      <text:p text:style-name="P25">Luồng (<text:span text:style-name="T1">thread</text:span>) là một trong những đơn vị cơ bản để thực hiện đa nhiệm (<text:span text:style-name="T1">multitasking</text:span>) trong một hệ thống máy tính. Nó đại diện cho một luồng thực thi bên trong một tiến trình. Một tiến trình có thể chứa nhiều luồng, và mỗi luồng có thể chạy độc lập trong khi vẫn chia sẻ cùng một không gian bộ nhớ và tài nguyên hệ thống của tiến trình đó.</text:p>
      <text:p text:style-name="P25">Các luồng có đặc tính nhẹ (<text:span text:style-name="T1">lightweight</text:span>), với chi phí tạo và hủy thấp hơn so với tiến trình. Thêm vào đó, việc chuyển ngữ cảnh giữa các luồng (<text:span text:style-name="T1">thread context switch</text:span>) nhanh hơn so với chuyển tiến trình, khiến chúng trở thành lựa chọn ưu tiên khi cần thực thi đồng thời nhiều tác vụ. Sử dụng luồng có thể cải thiện hiệu suất và khả năng đáp ứng của chương trình.</text:p>
      <text:p text:style-name="P25">Các luồng thường được lập lịch và thực thi bởi hệ điều hành; chúng có thể được điều phối và đồng bộ hóa bằng nhiều cơ chế khác nhau như: mutex (loại trừ tương hỗ), biến điều kiện (<text:span text:style-name="T1">condition variables</text:span>) và semaphore. Có hai mô hình triển khai luồng chính: luồng mức người dùng (<text:span text:style-name="T1">user-level threads</text:span>) được quản lý bởi chính ứng dụng, và luồng mức nhân (<text:span text:style-name="T1">kernel-level threads</text:span>) được quản lý bởi hệ điều hành.</text:p>
      <text:h text:style-name="P3" text:outline-level="3">5.2 Lợi ích của việc sử dụng đa luồng</text:h>
      <text:list text:style-name="L1">
        <text:list-item>
          <text:p text:style-name="P12"><text:span text:style-name="T1">Tăng tính đồng hành và khả năng đáp ứng:</text:span> Đa luồng cho phép nhiều tác vụ trong một chương trình chạy song song, từ đó tăng cường tính đồng hành (<text:span text:style-name="T1">concurrency</text:span>) và khả năng phản hồi. Ví dụ, trong một máy chủ mạng, nhiều luồng có thể được sử dụng để xử lý các yêu cầu từ khách hàng, giúp cải thiện năng lực xử lý và thời gian phản hồi của máy chủ.</text:p>
        </text:list-item>
        <text:list-item>
          <text:p text:style-name="P12"><text:span text:style-name="T1">Giảm chi phí hệ thống:</text:span> Các luồng chạy trong cùng một tiến trình, dẫn đến chi phí chuyển ngữ cảnh và giao tiếp thấp hơn so với việc sử dụng nhiều tiến trình. Các cơ chế giao tiếp liên tiến trình (<text:span text:style-name="T1">IPC - Inter-process communication</text:span>) là bắt buộc để truyền dữ liệu và đồng bộ hóa giữa các tiến trình, trong khi các luồng có thể trực tiếp truy cập vào bộ nhớ dùng chung, giúp giảm thiểu chi phí IPC.</text:p>
        </text:list-item>
        <text:list-item>
          <text:p text:style-name="P12"><text:span text:style-name="T1">Tận dụng CPU đa nhân:</text:span> Đa luồng có thể tận dụng hiệu quả hiệu năng của các CPU đa nhân, cho phép nhiều luồng thực thi song song trên các nhân CPU khác nhau, từ đó cải thiện hiệu suất chương trình. Ví dụ, trong các kịch bản tính toán chuyên sâu như xử lý hình ảnh và mã hóa video, đa luồng có thể tăng tốc độ tính toán.</text:p>
        </text:list-item>
        <text:list-item>
          <text:p text:style-name="P12"><text:span text:style-name="T1">Cải thiện hiệu quả sử dụng tài nguyên:</text:span> Đa luồng cho phép các luồng chia sẻ cùng một phân đoạn mã (<text:span text:style-name="T1">code segment</text:span>), phân đoạn dữ liệu (<text:span text:style-name="T1">data segment</text:span>) và vùng nhớ heap của tiến trình, giúp giảm lãng phí tài nguyên. Ví dụ, trong một chương trình nén tệp, đa luồng có thể xử lý đồng thời nhiều tệp, nâng cao hiệu suất sử dụng đĩa và CPU.</text:p>
        </text:list-item>
        <text:list-item>
          <text:p text:style-name="P12"><text:span text:style-name="T1">Đơn giản hóa thiết kế chương trình:</text:span> Đa luồng có thể chia nhỏ các tác vụ phức tạp thành nhiều tác vụ con đơn giản hơn, mỗi tác vụ được xử lý bởi một luồng riêng biệt, giúp đơn giản hóa việc thiết kế và triển khai. Ví dụ, trong một ứng dụng giao diện người dùng đồ họa (GUI), đa luồng có thể tách biệt việc xử lý giao diện khỏi các tác vụ nền, giúp chương trình có tổ chức và dễ bảo trì hơn.</text:p>
        </text:list-item>
      </text:list>
      <text:p text:style-name="P25">Tuy nhiên, cần phải thận trọng khi sử dụng đa luồng do các vấn đề tiềm ẩn như: an toàn luồng (<text:span text:style-name="T1">thread safety</text:span>), tranh chấp tài nguyên (<text:span text:style-name="T1">resource contention</text:span>) và tắc nghẽn <text:soft-page-break/>(<text:span text:style-name="T1">deadlock</text:span>). Thiết kế cẩn thận và sử dụng các cơ chế đồng bộ hóa là cần thiết để đảm bảo sự phối hợp chính xác giữa các luồng. Đa luồng không phù hợp cho mọi tình huống; các trường hợp sử dụng thích hợp bao gồm:</text:p>
      <text:list text:style-name="L2">
        <text:list-item>
          <text:p text:style-name="P13">Thực thi đồng thời nhiều tác vụ.</text:p>
        </text:list-item>
        <text:list-item>
          <text:p text:style-name="P13">Xử lý các tác vụ tốn thời gian.</text:p>
        </text:list-item>
        <text:list-item>
          <text:p text:style-name="P13">Các tác vụ có mức ưu tiên khác nhau.</text:p>
        </text:list-item>
        <text:list-item>
          <text:p text:style-name="P13">Triển khai các hoạt động bất đồng bộ (<text:span text:style-name="T1">asynchronous operations</text:span>).</text:p>
        </text:list-item>
      </text:list>
      <text:h text:style-name="P3" text:outline-level="3">5.3 Các trạng thái của luồng</text:h>
      <text:p text:style-name="P25">Một luồng đi qua một vòng đời từ khi được tạo ra đến khi kết thúc, luôn nằm trong một trong các trạng thái sau:</text:p>
      <text:list text:style-name="L3">
        <text:list-item>
          <text:p text:style-name="P14"><text:span text:style-name="T1">Trạng thái Sẵn sàng (Ready State):</text:span> Khi một luồng đã sẵn sàng để chạy nhưng chưa được lập lịch để thực thi. Lúc này, luồng đã được cấp phát tất cả các tài nguyên hệ thống cần thiết và đang chờ bộ lập lịch của hệ điều hành cấp phát tài nguyên CPU.</text:p>
        </text:list-item>
        <text:list-item>
          <text:p text:style-name="P14"><text:span text:style-name="T1">Trạng thái Đang chạy (Running State):</text:span> Khi một luồng đã được lập lịch thực thi và đang tích cực hoạt động.</text:p>
        </text:list-item>
        <text:list-item>
          <text:p text:style-name="P14"><text:span text:style-name="T1">Trạng thái Bị chặn (Blocked State):</text:span> Khi một luồng cần chờ đợi các sự kiện nhất định xảy ra, chẳng hạn như chờ hoàn tất thao tác I/O, chờ semaphore hoặc chờ khóa (lock). Ở trạng thái này, luồng không tiêu thụ tài nguyên CPU.</text:p>
        </text:list-item>
        <text:list-item>
          <text:p text:style-name="P14"><text:span text:style-name="T1">Trạng thái Kết thúc (Terminated State):</text:span> Khi một luồng đã hoàn tất việc thực thi hoặc gặp phải một ngoại lệ không được xử lý. Tại thời điểm này, các tài nguyên hệ thống do luồng chiếm dụng sẽ được giải phóng và đối tượng luồng bị hủy bỏ.</text:p>
        </text:list-item>
      </text:list>
      <text:h text:style-name="P3" text:outline-level="3">5.4 Định danh luồng (Thread Identification)</text:h>
      <text:p text:style-name="P25">Trong lập trình đa luồng, định danh của luồng (<text:span text:style-name="T1">Thread ID</text:span>) được sử dụng để xác định duy nhất một luồng. Thread ID thường là một giá trị số nguyên được tạo ra bởi nhân hệ điều hành và được trả về bởi các hàm thư viện của ngôn ngữ lập trình. Thread ID tồn tại từ khi luồng được tạo ra và tự động biến mất sau khi luồng kết thúc.</text:p>
      <text:p text:style-name="P7"><text:span text:style-name="T2">5.5 Tạo Threads</text:span></text:p>
      <text:p text:style-name="P7">Trong các hệ thống Linux, đa luồng tuân theo tiêu chuẩn POSIX. Trước khi đi sâu vào phát triển, chúng ta hãy tự làm quen với một số chức năng API chủ đề POSIX:</text:p>
      <table:table table:name="Table1" table:style-name="Table1">
        <table:table-column table:style-name="Table1.A"/>
        <table:table-column table:style-name="Table1.B"/>
        <table:table-row>
          <table:table-cell table:style-name="Table1.A1" office:value-type="string">
            <text:p text:style-name="P10"><text:tab/>API Function</text:p>
          </table:table-cell>
          <table:table-cell table:style-name="Table1.B1" office:value-type="string">
            <text:p text:style-name="P10">Mô tả</text:p>
          </table:table-cell>
        </table:table-row>
        <table:table-row>
          <table:table-cell table:style-name="Table1.A2" office:value-type="string">
            <text:p text:style-name="P10">pthread_create</text:p>
          </table:table-cell>
          <table:table-cell table:style-name="Table1.B2" office:value-type="string">
            <text:p text:style-name="P10">Tạo một thread mới</text:p>
          </table:table-cell>
        </table:table-row>
        <table:table-row>
          <table:table-cell table:style-name="Table1.A2" office:value-type="string">
            <text:p text:style-name="P10">pthread_join</text:p>
          </table:table-cell>
          <table:table-cell table:style-name="Table1.B2" office:value-type="string">
            <text:p text:style-name="P10">Chờ một thread để kết thúc và lấy lại giá trị trả về của nó</text:p>
          </table:table-cell>
        </table:table-row>
        <table:table-row>
          <table:table-cell table:style-name="Table1.A2" office:value-type="string">
            <text:p text:style-name="P10">pthread_self</text:p>
          </table:table-cell>
          <table:table-cell table:style-name="Table1.B2" office:value-type="string">
            <text:p text:style-name="P10">Lấy thread ID</text:p>
          </table:table-cell>
        </table:table-row>
        <table:table-row>
          <table:table-cell table:style-name="Table1.A2" office:value-type="string">
            <text:p text:style-name="P10">pthread_cancel</text:p>
          </table:table-cell>
          <table:table-cell table:style-name="Table1.B2" office:value-type="string">
            <text:p text:style-name="P10">Hủy một thread khác</text:p>
          </table:table-cell>
        </table:table-row>
        <text:soft-page-break/>
        <table:table-row>
          <table:table-cell table:style-name="Table1.A2" office:value-type="string">
            <text:p text:style-name="P10">pthread_exit</text:p>
          </table:table-cell>
          <table:table-cell table:style-name="Table1.B2" office:value-type="string">
            <text:p text:style-name="P10">Gọi để thoát khỏi chức năng thread trong một thread</text:p>
          </table:table-cell>
        </table:table-row>
        <table:table-row>
          <table:table-cell table:style-name="Table1.A2" office:value-type="string">
            <text:p text:style-name="P10">pthread_kill</text:p>
          </table:table-cell>
          <table:table-cell table:style-name="Table1.B2" office:value-type="string">
            <text:p text:style-name="P10">Gửi tín hiệu đến một thread</text:p>
          </table:table-cell>
        </table:table-row>
      </table:table>
      <text:h text:style-name="P3" text:outline-level="3"><text:bookmark text:name="551-pthread_create-function"/>5.5.1 pthread_create </text:h>
      <text:p text:style-name="P6">Để tạo một thread bằng API POSIX, hàm pthread_create() được sử dụng. Khai báo của nó như sau:</text:p>
      <table:table table:name="Table2" table:style-name="Table2">
        <table:table-column table:style-name="Table2.A"/>
        <table:table-row>
          <table:table-cell table:style-name="Table2.A1" office:value-type="string">
            <text:p text:style-name="P10">#include &lt;pthread.h&gt;</text:p>
            <text:p text:style-name="P10">int pthread_create(pthread_t *thread, const pthread_attr_t *attr,</text:p>
            <text:p text:style-name="P10"><text:s text:c="19"/>void *(*start_routine) (void *), void *arg);</text:p>
          </table:table-cell>
        </table:table-row>
      </table:table>
      <text:p text:style-name="P27">Tham số:</text:p>
      <text:list text:style-name="L5">
        <text:list-item>
          <text:p text:style-name="P15"><text:span text:style-name="T1">thread:</text:span> Con trỏ trỏ đến định danh luồng (<text:span text:style-name="T1">thread identifier</text:span>).</text:p>
        </text:list-item>
        <text:list-item>
          <text:p text:style-name="P33"><text:span text:style-name="T4">attr:</text:span><text:span text:style-name="T5"> Thiết lập các thuộc tính của luồng; chi tiết sẽ được giải thích ở phần sau. Thông thường truyền </text:span><text:span text:style-name="Source_20_Text"><text:span text:style-name="T5">NULL</text:span></text:span><text:span text:style-name="T5"> để sử dụng thuộc tính mặc định.</text:span></text:p>
        </text:list-item>
        <text:list-item>
          <text:p text:style-name="P15"><text:span text:style-name="T1">start_routine:</text:span> Một con trỏ hàm trỏ đến điểm nhập (<text:span text:style-name="T1">entry point</text:span>) của luồng, tức là mã hàm sẽ được thực thi khi luồng chạy.</text:p>
        </text:list-item>
        <text:list-item>
          <text:p text:style-name="P15"><text:span text:style-name="T1">arg:</text:span> Tham số được truyền vào hàm thực thi luồng.</text:p>
        </text:list-item>
      </text:list>
      <text:p text:style-name="P44"><text:span text:style-name="T4">Giá trị trả về:</text:span><text:span text:style-name="T5"> Nếu luồng được tạo thành công, hàm trả về </text:span><text:span text:style-name="Source_20_Text"><text:span text:style-name="T5">0</text:span></text:span><text:span text:style-name="T5">. Nếu thất bại, hàm trả về mã lỗi tương ứng.</text:span></text:p>
      <text:h text:style-name="P5" text:outline-level="3"><text:span text:style-name="T5">5.5.2 Hàm </text:span><text:span text:style-name="Source_20_Text"><text:span text:style-name="T5">pthread_join</text:span></text:span></text:h>
      <text:p text:style-name="P44"><text:span text:style-name="T5">Hàm </text:span><text:span text:style-name="Source_20_Text"><text:span text:style-name="T5">pthread_join()</text:span></text:span><text:span text:style-name="T5"> được sử dụng để chờ một luồng cụ thể kết thúc và thu thập trạng thái thoát (</text:span><text:span text:style-name="T4">exit status</text:span><text:span text:style-name="T5">) của luồng đó. Khai báo của hàm như sau:</text:span></text:p>
      <table:table table:name="Table3" table:style-name="Table3">
        <table:table-column table:style-name="Table3.A"/>
        <table:table-row>
          <table:table-cell table:style-name="Table3.A1" office:value-type="string">
            <text:p text:style-name="P10">#include &lt;pthread.h&gt;</text:p>
            <text:p text:style-name="P10">int pthread_join(pthread_t thread, void **retval);</text:p>
          </table:table-cell>
        </table:table-row>
      </table:table>
      <text:p text:style-name="P27">Tham số:</text:p>
      <text:list text:style-name="L6">
        <text:list-item>
          <text:p text:style-name="P16"><text:span text:style-name="T1">thread:</text:span> Định danh của luồng cần chờ.</text:p>
        </text:list-item>
        <text:list-item>
          <text:p text:style-name="P34"><text:span text:style-name="T4">retval:</text:span><text:span text:style-name="T5"> Một con trỏ cấp hai (con trỏ trỏ đến con trỏ), dùng để lưu trữ trạng thái thoát của luồng. Nếu bạn không cần lấy trạng thái thoát, có thể đặt </text:span><text:span text:style-name="Source_20_Text"><text:span text:style-name="T5">retval</text:span></text:span><text:span text:style-name="T5"> là </text:span><text:span text:style-name="Source_20_Text"><text:span text:style-name="T5">NULL</text:span></text:span><text:span text:style-name="T5">.</text:span></text:p>
        </text:list-item>
      </text:list>
      <text:h text:style-name="P5" text:outline-level="3"><text:span text:style-name="T5">5.5.3 Hàm </text:span><text:span text:style-name="Source_20_Text"><text:span text:style-name="T5">pthread_exit</text:span></text:span></text:h>
      <text:p text:style-name="P44"><text:span text:style-name="T5">Hàm </text:span><text:span text:style-name="Source_20_Text"><text:span text:style-name="T5">pthread_exit()</text:span></text:span><text:span text:style-name="T5"> được sử dụng để kết thúc thực thi luồng hiện tại một cách rõ ràng. Khai báo như sau:</text:span></text:p>
      <table:table table:name="Table4" table:style-name="Table4">
        <table:table-column table:style-name="Table4.A"/>
        <table:table-row>
          <table:table-cell table:style-name="Table4.A1" office:value-type="string">
            <text:p text:style-name="P10">#include &lt;pthread.h&gt;</text:p>
            <text:p text:style-name="P10">void pthread_exit(void *retval);</text:p>
          </table:table-cell>
        </table:table-row>
      </table:table>
      <text:p text:style-name="P27"><text:soft-page-break/>Tham số:</text:p>
      <text:list text:style-name="L7">
        <text:list-item>
          <text:p text:style-name="P17"><text:span text:style-name="T1">retval:</text:span> Con trỏ trỏ đến dữ liệu thuộc bất kỳ kiểu nào đại diện cho trạng thái thoát của luồng. Nếu bạn không cần truy xuất trạng thái thoát của thread, bạn có thể đặt retval thành NULL.</text:p>
        </text:list-item>
      </text:list>
      <text:p text:style-name="P44"><text:span text:style-name="T5">Trong quá trình thực thi luồng, nếu gặp lệnh </text:span><text:span text:style-name="Source_20_Text"><text:span text:style-name="T5">return</text:span></text:span><text:span text:style-name="T5">, luồng cũng sẽ kết thúc. Vậy tại sao thư viện </text:span><text:span text:style-name="Source_20_Text"><text:span text:style-name="T5">&lt;pthread.h&gt;</text:span></text:span><text:span text:style-name="T5"> lại cung cấp thêm hàm </text:span><text:span text:style-name="Source_20_Text"><text:span text:style-name="T5">pthread_exit()</text:span></text:span><text:span text:style-name="T5">? Sự khác biệt giữa chúng như sau:</text:span></text:p>
      <text:list text:style-name="L8">
        <text:list-item>
          <text:p text:style-name="P35"><text:span text:style-name="T5">Sự khác biệt chính giữa </text:span><text:span text:style-name="Source_20_Text"><text:span text:style-name="T5">return (void*)0;</text:span></text:span><text:span text:style-name="T5"> và </text:span><text:span text:style-name="Source_20_Text"><text:span text:style-name="T5">pthread_exit((void*)0);</text:span></text:span><text:span text:style-name="T5"> là lệnh </text:span><text:span text:style-name="Source_20_Text"><text:span text:style-name="T5">return</text:span></text:span><text:span text:style-name="T5"> chỉ thoát khỏi luồng khi nằm trong hàm thực thi luồng chính, nếu bạn đang ở hàm con </text:span><text:span text:style-name="T6">(được gọi bởi luồng)</text:span><text:span text:style-name="T5"> thì chỉ thoát hàm con đó chứ không thoát hàm thực thi luồng chính, trong khi </text:span><text:span text:style-name="Source_20_Text"><text:span text:style-name="T5">pthread_exit()</text:span></text:span><text:span text:style-name="T5"> có thể được gọi ở </text:span><text:span text:style-name="T4">bất kỳ đâu</text:span><text:span text:style-name="T5"> (ví dụ: trong một hàm con được gọi bởi luồng) để kết thúc luồng ngay lập tức.</text:span></text:p>
        </text:list-item>
        <text:list-item>
          <text:p text:style-name="P36"><text:span text:style-name="T5">Hàm </text:span><text:span text:style-name="Source_20_Text"><text:span text:style-name="T5">pthread_exit()</text:span></text:span><text:span text:style-name="T5"> cung cấp tính năng xử lý dọn dẹp luồng (</text:span><text:span text:style-name="T4">thread cleanup processing</text:span><text:span text:style-name="T5">), cho phép gọi các hàm đã đăng ký bằng pthread_cleanup_push(…), pthread_cleanup_pop(…) khi luồng thoát, giúp quản lý tài nguyên luồng tốt hơn.</text:span></text:p>
        </text:list-item>
      </text:list>
      <text:p text:style-name="P44">Lưu ý: nếu trong main thread, return <text:span text:style-name="T9">0 sẽ kết thúc luôn process, tất cả các thread khác chết theo. Còn pthread_exit(NULL) chỉ kết thúc main thread còn các thread khác vẫn chạy tiếp.</text:span></text:p>
      <text:h text:style-name="P3" text:outline-level="3">5.5.4 Ví dụ ứng dụng luồng</text:h>
      <text:p text:style-name="P25">Ví dụ tạo một luồng và truyền vào một tham số kiểu số nguyên:</text:p>
      <table:table table:name="Table5" table:style-name="Table5">
        <table:table-column table:style-name="Table5.A"/>
        <table:table-row>
          <table:table-cell table:style-name="Table5.A1" office:value-type="string">
            <text:p text:style-name="P10">#include &lt;stdio.h&gt;</text:p>
            <text:p text:style-name="P10">#include &lt;pthread.h&gt;</text:p>
            <text:p text:style-name="P10">#include &lt;unistd.h&gt;</text:p>
            <text:p text:style-name="P10"/>
            <text:p text:style-name="P10">// Hàm thực thi luồng</text:p>
            <text:p text:style-name="P10">void *thread_func(void *arg)</text:p>
            <text:p text:style-name="P10">{</text:p>
            <text:p text:style-name="P10"><text:s text:c="4"/>int *count = (int*)arg;</text:p>
            <text:p text:style-name="P10"><text:s text:c="4"/>for (int i = 1; i &lt;= *count; ++i)</text:p>
            <text:p text:style-name="P10"><text:s text:c="4"/>{</text:p>
            <text:p text:style-name="P10"><text:s text:c="8"/>printf("Thread: %d\n", i);</text:p>
            <text:p text:style-name="P10"><text:s text:c="8"/>sleep(1);</text:p>
            <text:p text:style-name="P10"><text:s text:c="4"/>}</text:p>
            <text:p text:style-name="P10"><text:s text:c="4"/>pthread_exit(NULL); // Thoát luồng</text:p>
            <text:p text:style-name="P10">}</text:p>
            <text:p text:style-name="P10"/>
            <text:p text:style-name="P10"><text:soft-page-break/>int main(int argc, char *argv[]) </text:p>
            <text:p text:style-name="P10">{</text:p>
            <text:p text:style-name="P10"><text:s text:c="4"/>pthread_t tid;</text:p>
            <text:p text:style-name="P10"><text:s text:c="4"/>int ret;</text:p>
            <text:p text:style-name="P10"><text:s text:c="4"/>int count = 5;</text:p>
            <text:p text:style-name="P10"/>
            <text:p text:style-name="P10"><text:s text:c="4"/>// Tạo luồng</text:p>
            <text:p text:style-name="P10"><text:s text:c="4"/>ret = pthread_create(&amp;tid, NULL, thread_func, &amp;count);</text:p>
            <text:p text:style-name="P10"><text:s text:c="4"/>if (ret != 0)</text:p>
            <text:p text:style-name="P10"><text:s text:c="4"/>{</text:p>
            <text:p text:style-name="P10"><text:s text:c="8"/>printf("pthread_create failed:%d\n", ret);</text:p>
            <text:p text:style-name="P10"><text:s text:c="8"/>return -1;</text:p>
            <text:p text:style-name="P10"><text:s text:c="4"/>}</text:p>
            <text:p text:style-name="P10"><text:s text:c="4"/>printf("create threads success\n");</text:p>
            <text:p text:style-name="P10"/>
            <text:p text:style-name="P10"><text:s text:c="4"/>// Chờ luồng kết thúc</text:p>
            <text:p text:style-name="P10"><text:s text:c="4"/>ret = pthread_join(tid, NULL);</text:p>
            <text:p text:style-name="P10"><text:s text:c="4"/>if (ret != 0)</text:p>
            <text:p text:style-name="P10"><text:s text:c="4"/>{</text:p>
            <text:p text:style-name="P10"><text:s text:c="8"/>printf("pthread_join failed\n");</text:p>
            <text:p text:style-name="P10"><text:s text:c="8"/>return -1;</text:p>
            <text:p text:style-name="P10"><text:s text:c="4"/>}</text:p>
            <text:p text:style-name="P10"><text:s text:c="4"/>printf("Thread finished.\n");</text:p>
            <text:p text:style-name="P10"><text:s text:c="4"/>return 0;</text:p>
            <text:p text:style-name="P10">}</text:p>
          </table:table-cell>
        </table:table-row>
      </table:table>
      <text:p text:style-name="P7">Biên dịch và chạy chương trình:</text:p>
      <table:table table:name="Table6" table:style-name="Table6">
        <table:table-column table:style-name="Table6.A"/>
        <table:table-row>
          <table:table-cell table:style-name="Table6.A1" office:value-type="string">
            <text:p text:style-name="P10">linaro@linaro-alip:~/Linux/thread$ gcc -o thread thread.c -lpthread</text:p>
            <text:p text:style-name="P10">linaro@linaro-alip:~/Linux/thread$ ./thread</text:p>
            <text:p text:style-name="P10">create threads success</text:p>
            <text:p text:style-name="P10">Thread: 1</text:p>
            <text:p text:style-name="P10"><text:soft-page-break/>Thread: 2</text:p>
            <text:p text:style-name="P10">Thread: 3</text:p>
            <text:p text:style-name="P10">Thread: 4</text:p>
            <text:p text:style-name="P10">Thread: 5</text:p>
            <text:p text:style-name="P10">Thread finished.</text:p>
          </table:table-cell>
        </table:table-row>
      </table:table>
      <text:p text:style-name="P9"><text:span text:style-name="T5">Lưu ý: Khi biên dịch các chương trình sử dụng thư viện pthread trên Linux, bạn luôn phải thêm tùy chọn </text:span><text:span text:style-name="Source_20_Text"><text:span text:style-name="T5">-lpthread</text:span></text:span><text:span text:style-name="T5"> để liên kết thư viện.</text:span></text:p>
      <text:h text:style-name="P1" text:outline-level="2">5.6 Thuộc tính Luồng (Thread Attributes)</text:h>
      <text:p text:style-name="P25">Tiêu chuẩn POSIX định nghĩa nhiều thuộc tính cho luồng, bao gồm: trạng thái tách rời (detach state), chính sách và tham số lập lịch (scheduling policy and parameters), phạm vi (scope), kích thước ngăn xếp (stack size), địa chỉ ngăn xếp (stack address), độ ưu tiên (priority), và nhiều thuộc tính khác.</text:p>
      <text:h text:style-name="P3" text:outline-level="3">5.6.1 Trạng thái Tách rời (Detach State)</text:h>
      <text:p text:style-name="P44"><text:span text:style-name="T5">Trong thư viện luồng POSIX (pthread), một luồng có thể ở trạng thái </text:span><text:span text:style-name="T4">tách rời (detached)</text:span><text:span text:style-name="T5"> hoặc </text:span><text:span text:style-name="T4">không tách rời (non-detached/joinable)</text:span><text:span text:style-name="T5">. Trạng thái tách rời của một luồng quyết định cách tài nguyên của luồng đó được xử lý khi nó kết thúc. Nếu một luồng được tách rời, nó sẽ không để lại bất kỳ tài nguyên nào, bao gồm định danh luồng (ID) và tài nguyên bộ nhớ. Điều này có nghĩa là các luồng khác không thể kết nối (join) với nó để lấy trạng thái kết thúc, và trạng thái của nó cũng không thể bị truy vấn. Trạng thái tách rời của một luồng có thể được thiết lập bằng hàm </text:span><text:span text:style-name="Source_20_Text"><text:span text:style-name="T5">pthread_attr_setdetachstate()</text:span></text:span><text:span text:style-name="T5">, với các tùy chọn </text:span><text:span text:style-name="Source_20_Text"><text:span text:style-name="T5">PTHREAD_CREATE_JOINABLE</text:span></text:span><text:span text:style-name="T5"> cho trạng thái không tách rời và </text:span><text:span text:style-name="Source_20_Text"><text:span text:style-name="T5">PTHREAD_CREATE_DETACHED</text:span></text:span><text:span text:style-name="T5"> cho trạng thái tách rời. Thông thường, nếu một luồng chỉ thực hiện các nhiệm vụ độc lập và không cần được kết nối bởi các luồng khác, việc thiết lập nó ở trạng thái tách rời có thể giảm mức tiêu thụ tài nguyên. Tuy nhiên, việc xử lý kết thúc luồng một cách thích hợp trong mã nguồn là rất quan trọng đối với các luồng tách rời vì không có cơ chế tự động dọn dẹp tài nguyên thông qua việc join.</text:span></text:p>
      <text:p text:style-name="P31">Thiết lập trạng thái tách rời của một luồng bằng cách sử dụng các thuộc tính luồng:</text:p>
      <text:p text:style-name="P31">Khởi tạo đối tượng thuộc tính luồng: </text:p>
      <table:table table:name="Table7" table:style-name="Table7">
        <table:table-column table:style-name="Table7.A"/>
        <table:table-row>
          <table:table-cell table:style-name="Table7.A1" office:value-type="string">
            <text:p text:style-name="P37"><text:span text:style-name="Source_20_Text"><text:span text:style-name="T7">int pthread_attr_init(pthread_attr_t *attr);</text:span></text:span></text:p>
          </table:table-cell>
        </table:table-row>
      </table:table>
      <text:p text:style-name="P29">Hủy các tài nguyên liên quan đến thuộc tính luồng: </text:p>
      <table:table table:name="Table8" table:style-name="Table8">
        <table:table-column table:style-name="Table8.A"/>
        <table:table-row>
          <table:table-cell table:style-name="Table8.A1" office:value-type="string">
            <text:p text:style-name="P37"><text:span text:style-name="Source_20_Text"><text:span text:style-name="T7">int pthread_attr_destroy(pthread_attr_t *attr);</text:span></text:span></text:p>
          </table:table-cell>
        </table:table-row>
      </table:table>
      <text:p text:style-name="P29"><text:span text:style-name="T8">Giá trị trả về: Thành công: 0; Thất bại: mã lỗi.</text:span></text:p>
      <text:p text:style-name="P31">Thiết lập trạng thái tách rời của luồng (tách rời hoặc không tách rời): </text:p>
      <table:table table:name="Table9" table:style-name="Table9">
        <table:table-column table:style-name="Table9.A"/>
        <table:table-row>
          <table:table-cell table:style-name="Table9.A1" office:value-type="string">
            <text:p text:style-name="P37"><text:span text:style-name="Source_20_Text"><text:span text:style-name="T7">int pthread_attr_setdetachstate(pthread_attr_t *attr, int detachstate);</text:span></text:span></text:p>
          </table:table-cell>
        </table:table-row>
      </table:table>
      <text:p text:style-name="P37"><text:span text:style-name="Source_20_Text"><text:span text:style-name="T7"/></text:span></text:p>
      <text:list text:style-name="L17">
        <text:list-item>
          <text:p text:style-name="P30"><text:soft-page-break/>attr: Con trỏ tới đối tượng thuộc tính luồng đã khởi tạo (tham số đầu vào).</text:p>
        </text:list-item>
        <text:list-item>
          <text:p text:style-name="P38"><text:span text:style-name="T7">detachstate: </text:span><text:span text:style-name="Source_20_Text"><text:span text:style-name="T7">PTHREAD_CREATE_DETACHED</text:span></text:span><text:span text:style-name="T7"> cho luồng tách rời hoặc </text:span><text:span text:style-name="Source_20_Text"><text:span text:style-name="T7">PTHREAD_CREATE_JOINABLE</text:span></text:span><text:span text:style-name="T7"> cho luồng có thể kết nối.</text:span></text:p>
        </text:list-item>
      </text:list>
      <text:p text:style-name="P31">Ví dụ tạo một luồng con với trạng thái tách rời được thiết lập là <text:s/>PTHREAD_CREATE_DETACHED, đảm bảo tự động giải phóng tài nguyên khi luồng kết thúc:</text:p>
      <table:table table:name="Table10" table:style-name="Table10">
        <table:table-column table:style-name="Table10.A"/>
        <table:table-row>
          <table:table-cell table:style-name="Table10.A1" office:value-type="string">
            <text:p text:style-name="P10">#include &lt;stdio.h&gt;</text:p>
            <text:p text:style-name="P10">#include &lt;stdlib.h&gt;</text:p>
            <text:p text:style-name="P10">#include &lt;pthread.h&gt;</text:p>
            <text:p text:style-name="P10">#include &lt;unistd.h&gt;</text:p>
            <text:p text:style-name="P10"/>
            <text:p text:style-name="P10">void *thread_func(void *arg) </text:p>
            <text:p text:style-name="P10">{</text:p>
            <text:p text:style-name="P10"><text:s text:c="4"/>printf("Child thread is running.\n");</text:p>
            <text:p text:style-name="P10"><text:s text:c="4"/>pthread_exit(NULL);</text:p>
            <text:p text:style-name="P10">}</text:p>
            <text:p text:style-name="P10"/>
            <text:p text:style-name="P10">int main() </text:p>
            <text:p text:style-name="P10">{</text:p>
            <text:p text:style-name="P10"><text:s text:c="4"/>pthread_t tid;</text:p>
            <text:p text:style-name="P10"><text:s text:c="4"/>pthread_attr_t attr;</text:p>
            <text:p text:style-name="P10"><text:s text:c="4"/>int detachstate;</text:p>
            <text:p text:style-name="P10"/>
            <text:p text:style-name="P10"><text:s text:c="4"/>// Khởi tạo đối tượng thuộc tính luồng</text:p>
            <text:p text:style-name="P10"><text:s text:c="4"/>pthread_attr_init(&amp;attr);</text:p>
            <text:p text:style-name="P10"/>
            <text:p text:style-name="P10"><text:s text:c="4"/>// Lấy trạng thái tách rời mặc định</text:p>
            <text:p text:style-name="P10"><text:s text:c="4"/>pthread_attr_getdetachstate(&amp;attr, &amp;detachstate);</text:p>
            <text:p text:style-name="P10"><text:s text:c="4"/>printf("Default detach state: %s\n", detachstate == PTHREAD_CREATE_JOINABLE ? "joinable" : "detached");</text:p>
            <text:p text:style-name="P10"/>
            <text:p text:style-name="P10"><text:s text:c="4"/>// Thiết lập trạng thái tách rời của luồng thành detached</text:p>
            <text:p text:style-name="P10"><text:soft-page-break/><text:s text:c="4"/>pthread_attr_setdetachstate(&amp;attr, PTHREAD_CREATE_DETACHED);</text:p>
            <text:p text:style-name="P10"><text:s text:c="4"/>pthread_create(&amp;tid, &amp;attr, thread_func, NULL);</text:p>
            <text:p text:style-name="P10"/>
            <text:p text:style-name="P10"><text:s text:c="4"/>// Hủy đối tượng thuộc tính luồng</text:p>
            <text:p text:style-name="P10"><text:s text:c="4"/>pthread_attr_destroy(&amp;attr);</text:p>
            <text:p text:style-name="P10"/>
            <text:p text:style-name="P10"><text:s text:c="4"/>// Cho phép một khoảng thời gian để luồng con chạy</text:p>
            <text:p text:style-name="P10"><text:s text:c="4"/>sleep(1);</text:p>
            <text:p text:style-name="P10"/>
            <text:p text:style-name="P10"><text:s text:c="4"/>printf("Main thread is exiting.\n");</text:p>
            <text:p text:style-name="P10"><text:s text:c="4"/>pthread_exit(NULL);</text:p>
            <text:p text:style-name="P10">}</text:p>
          </table:table-cell>
        </table:table-row>
      </table:table>
      <text:h text:style-name="P4" text:outline-level="3">5.6.2 Kích thước Ngăn xếp (Stack Size)</text:h>
      <text:p text:style-name="P18"><text:bookmark text:name="p-rc_78262187930abd63-20"/>Ngăn xếp (stack) là một cấu trúc dữ liệu được sử dụng để lưu trữ thông tin về các lời gọi hàm, biến cục bộ và dữ liệu tạm thời trong quá trình thực thi chương trình. Mỗi luồng có ngăn xếp riêng để lưu trữ thông tin cần thiết trong quá trình thực thi của nó.</text:p>
      <text:p text:style-name="P25">Kích thước ngăn xếp đề cập đến lượng không gian ngăn xếp được cấp phát cho một luồng khi nó được tạo ra. Kích thước này ảnh hưởng trực tiếp đến lượng dữ liệu mà một luồng có thể xử lý và thời gian thực thi của nó. Nếu kích thước ngăn xếp quá nhỏ, nó có thể gây ra hiện tượng <text:span text:style-name="T1">tràn ngăn xếp (stack overflow)</text:span> và làm hỏng chương trình. Ngược lại, nếu kích thước quá lớn, nó sẽ gây lãng phí tài nguyên hệ thống.</text:p>
      <text:p text:style-name="P44"><text:span text:style-name="T5">Khi tạo một luồng, bạn có thể thiết lập kích thước ngăn xếp của luồng bằng cách chỉ định các thuộc tính luồng. Ví dụ, trong thư viện luồng POSIX, bạn có thể sử dụng hàm </text:span><text:span text:style-name="Source_20_Text"><text:span text:style-name="T5">pthread_attr_setstacksize()</text:span></text:span><text:span text:style-name="T5"> để thiết lập kích thước ngăn xếp theo đơn vị byte.</text:span></text:p>
      <text:p text:style-name="P25">Kích thước ngăn xếp nên được điều chỉnh dựa trên nhu cầu cụ thể của ứng dụng. Nếu ứng dụng cần xử lý lượng dữ liệu lớn hoặc yêu cầu các lời gọi hàm đệ quy, không gian ngăn xếp lớn hơn có thể là cần thiết. Ngược lại, nếu ứng dụng chỉ xử lý lượng dữ liệu nhỏ, kích thước ngăn xếp nhỏ hơn có thể được sử dụng để tiết kiệm tài nguyên.</text:p>
      <text:p text:style-name="P25">Trong thư viện POSIX, bạn có thể sử dụng các hàm sau để thiết lập và lấy kích thước ngăn xếp:</text:p>
      <table:table table:name="Table11" table:style-name="Table11">
        <table:table-column table:style-name="Table11.A"/>
        <table:table-row>
          <table:table-cell table:style-name="Table11.A1" office:value-type="string">
            <text:p text:style-name="P11"><text:span text:style-name="Source_20_Text"><text:span text:style-name="T3">int pthread_attr_setstacksize(pthread_attr_t *attr, size_t stacksize);</text:span></text:span> <text:line-break/><text:span text:style-name="Source_20_Text"><text:span text:style-name="T3">int pthread_attr_getstacksize(const pthread_attr_t *attr, size_t *stacksize);</text:span></text:span></text:p>
          </table:table-cell>
        </table:table-row>
      </table:table>
      <text:p text:style-name="P28">Mô tả tham số:</text:p>
      <text:list text:style-name="L18">
        <text:list-item>
          <text:p text:style-name="P19"><text:span text:style-name="T1">attr</text:span>: Con trỏ tới thuộc tính luồng.</text:p>
        </text:list-item>
        <text:list-item>
          <text:p text:style-name="P19"><text:span text:style-name="T1">stacksize</text:span>: Kích thước ngăn xếp của luồng tính bằng byte.</text:p>
        </text:list-item>
      </text:list>
      <text:h text:style-name="P4" text:outline-level="3"><text:soft-page-break/>5.6.3 Chính sách Lập lịch (Scheduling Policy)</text:h>
      <text:p text:style-name="P25">Chính sách lập lịch của một luồng đề cập đến cách hệ điều hành sắp xếp thứ tự thực thi của các luồng trên CPU. Các chính sách lập lịch khác nhau sẽ ảnh hưởng đến độ ưu tiên và hành vi thực thi của luồng.</text:p>
      <text:p text:style-name="P25">Thư viện luồng POSIX định nghĩa ba chính sách lập lịch:</text:p>
      <text:list text:style-name="L19">
        <text:list-item>
          <text:p text:style-name="P20"><text:span text:style-name="T1">SCHED_FIFO (First In, First Out):</text:span> Các luồng được thực thi theo thứ tự chúng được đưa vào hàng đợi, và chúng chạy cho đến khi hoàn thành hoặc bị chiếm dụng (preempted). Các luồng có độ ưu tiên cao hơn được thực thi trước, và các luồng có cùng độ ưu tiên được thực thi theo thứ tự chúng được đưa vào hàng đợi.</text:p>
        </text:list-item>
        <text:list-item>
          <text:p text:style-name="P39"><text:span text:style-name="T4">SCHED_RR (Round Robin):</text:span><text:span text:style-name="T5"> Mỗi luồng được gán một lát cắt thời gian (time slice) cố định để thực thi. Khi hết thời gian, luồng sẽ được chuyển xuống cuối hàng đợi để chờ lượt lập lịch tiếp theo. Tương tự như </text:span><text:span text:style-name="Source_20_Text"><text:span text:style-name="T5">SCHED_FIFO</text:span></text:span><text:span text:style-name="T5">, các luồng có độ ưu tiên cao hơn được thực thi trước.</text:span></text:p>
        </text:list-item>
        <text:list-item>
          <text:p text:style-name="P20"><text:span text:style-name="T1">SCHED_OTHER (Other):</text:span> Hệ thống tự quyết định việc lập lịch cho luồng. Chính sách này thường được sử dụng làm mặc định cho lập trình đa luồng và thường không yêu cầu chỉ định rõ ràng.</text:p>
        </text:list-item>
      </text:list>
      <text:p text:style-name="P44"><text:span text:style-name="T5">Chính sách lập lịch có thể được thiết lập bằng hàm </text:span><text:span text:style-name="Source_20_Text"><text:span text:style-name="T5">pthread_attr_setschedpolicy()</text:span></text:span><text:span text:style-name="T5"> hoặc sửa đổi động bằng hàm </text:span><text:span text:style-name="Source_20_Text"><text:span text:style-name="T5">pthread_setschedparam()</text:span></text:span><text:span text:style-name="T5">.</text:span></text:p>
      <text:p text:style-name="P8">Các hàm để thiết lập và lấy chính sách lập lịch:</text:p>
      <table:table table:name="Table12" table:style-name="Table12">
        <table:table-column table:style-name="Table12.A"/>
        <table:table-row>
          <table:table-cell table:style-name="Table12.A1" office:value-type="string">
            <text:p text:style-name="P26"><text:span text:style-name="Source_20_Text"><text:span text:style-name="T3">int pthread_attr_setinheritsched(pthread_attr_t *attr, int inheritsched);</text:span></text:span> <text:line-break/><text:span text:style-name="Source_20_Text"><text:span text:style-name="T3">int pthread_attr_getinheritsched(const pthread_attr_t *attr, int *inheritsched);</text:span></text:span></text:p>
            <text:p text:style-name="P46"><text:span text:style-name="Source_20_Text"><text:span text:style-name="T5">int pthread_attr_setschedpolicy(pthread_attr_t *attr, int policy);</text:span></text:span><text:span text:style-name="T5"> </text:span><text:span text:style-name="Source_20_Text"><text:span text:style-name="T5">int pthread_attr_getschedpolicy(const pthread_attr_t *attr, int *policy);</text:span></text:span></text:p>
          </table:table-cell>
        </table:table-row>
      </table:table>
      <text:p text:style-name="P28">Mô tả tham số:</text:p>
      <text:list text:style-name="L24">
        <text:list-item>
          <text:p text:style-name="P21"><text:span text:style-name="T1">attr</text:span>: Con trỏ tới thuộc tính luồng.</text:p>
        </text:list-item>
        <text:list-item>
          <text:p text:style-name="P21"><text:span text:style-name="T1">inheritsched</text:span>: Xác định việc luồng có kế thừa các thuộc tính lập lịch hay không:</text:p>
          <text:list>
            <text:list-item>
              <text:p text:style-name="P40"><text:span text:style-name="Source_20_Text"><text:span text:style-name="T5">PTHREAD_INHERIT_SCHED</text:span></text:span><text:span text:style-name="T5">: Các thuộc tính lập lịch được kế thừa từ luồng tạo ra nó, các thiết lập trong </text:span><text:span text:style-name="Source_20_Text"><text:span text:style-name="T5">attr</text:span></text:span><text:span text:style-name="T5"> sẽ bị bỏ qua.</text:span></text:p>
            </text:list-item>
            <text:list-item>
              <text:p text:style-name="P40"><text:span text:style-name="Source_20_Text"><text:span text:style-name="T5">PTHREAD_EXPLICIT_SCHED</text:span></text:span><text:span text:style-name="T5">: Sử dụng các thuộc tính lập lịch được chỉ định cụ thể trong </text:span><text:span text:style-name="Source_20_Text"><text:span text:style-name="T5">attr</text:span></text:span><text:span text:style-name="T5">.</text:span></text:p>
            </text:list-item>
          </text:list>
        </text:list-item>
        <text:list-item>
          <text:p text:style-name="P40"><text:span text:style-name="T4">policy</text:span><text:span text:style-name="T5">: Chính sách lập lịch (</text:span><text:span text:style-name="Source_20_Text"><text:span text:style-name="T5">SCHED_OTHER</text:span></text:span><text:span text:style-name="T5">, </text:span><text:span text:style-name="Source_20_Text"><text:span text:style-name="T5">SCHED_FIFO</text:span></text:span><text:span text:style-name="T5">, hoặc </text:span><text:span text:style-name="Source_20_Text"><text:span text:style-name="T5">SCHED_RR</text:span></text:span><text:span text:style-name="T5">).</text:span></text:p>
        </text:list-item>
      </text:list>
      <text:p text:style-name="P32">Giá trị trả về: Thành công trả về 0; ngược lại trả về mã lỗi tương ứng.</text:p>
      <text:h text:style-name="P4" text:outline-level="3">5.6.4 Độ ưu tiên (Priority)</text:h>
      <text:p text:style-name="P18"><text:bookmark text:name="p-rc_78262187930abd63-21"/>Trong các hệ thống Linux, độ ưu tiên luồng được chia thành hai loại: độ ưu tiên tĩnh và độ ưu tiên động.</text:p>
      <text:p text:style-name="P44"><text:span text:style-name="T4">Độ ưu tiên tĩnh (Static priority)</text:span><text:span text:style-name="T5"> được gán khi luồng được tạo và có thể thiết lập bằng hàm </text:span><text:span text:style-name="Source_20_Text"><text:span text:style-name="T5">pthread_attr_setschedparam()</text:span></text:span><text:span text:style-name="T5">. Giá trị độ ưu tiên tĩnh càng nhỏ thì độ ưu tiên thực tế của </text:span><text:soft-page-break/><text:span text:style-name="T5">luồng càng cao và ngược lại. Đối với các luồng sử dụng chính sách </text:span><text:span text:style-name="Source_20_Text"><text:span text:style-name="T5">SCHED_OTHER</text:span></text:span><text:span text:style-name="T5">, độ ưu tiên tĩnh của chúng phải được thiết lập là 0 (đây là chính sách mặc định của Linux), và các luồng này được lập lịch dựa trên độ ưu tiên động. Trong các chính sách lập lịch thời gian thực (real-time), độ ưu tiên tĩnh quyết định thứ tự lập lịch cơ bản.</text:span></text:p>
      <text:p text:style-name="P25"><text:span text:style-name="T1">Độ ưu tiên động (Dynamic priority)</text:span> được điều chỉnh linh hoạt trong quá trình thực thi dựa trên hành vi của luồng và yêu cầu tài nguyên. Trong Linux, độ ưu tiên động được tính toán dựa trên <text:span text:style-name="T1">giá trị nice</text:span>, là một số nguyên từ -20 đến +19. Giá trị nice thấp hơn biểu thị độ ưu tiên cao hơn. Khi một luồng ở trạng thái sẵn sàng (ready) nhưng không thể được lập lịch, độ ưu tiên động của nó sẽ tăng lên để đảm bảo sự cạnh tranh công bằng. Khi một luồng được lập lịch chạy, độ ưu tiên động của nó giảm xuống để tránh việc một luồng chiếm dụng CPU quá lâu gây ra tình trạng "bỏ đói" (starvation) cho các luồng khác.</text:p>
      <text:p text:style-name="P44"><text:span text:style-name="T5">Để lấy giá trị độ ưu tiên tối thiểu và tối đa, bạn có thể sử dụng các hàm:</text:span><text:span text:style-name="Source_20_Text"><text:span text:style-name="T5"> </text:span></text:span></text:p>
      <table:table table:name="Table13" table:style-name="Table13">
        <table:table-column table:style-name="Table13.A"/>
        <table:table-row>
          <table:table-cell table:style-name="Table13.A1" office:value-type="string">
            <text:p text:style-name="P45"><text:span text:style-name="Source_20_Text"><text:span text:style-name="T5">int sched_get_priority_max(int policy);</text:span></text:span><text:span text:style-name="T5"> <text:line-break/></text:span><text:span text:style-name="Source_20_Text"><text:span text:style-name="T5">int sched_get_priority_min(int policy);</text:span></text:span></text:p>
          </table:table-cell>
        </table:table-row>
      </table:table>
      <text:p text:style-name="P25"><text:span text:style-name="T1">Ví dụ lấy dải độ ưu tiên khả dụng cho ba chính sách lập lịch:</text:span></text:p>
      <table:table table:name="Table14" table:style-name="Table14">
        <table:table-column table:style-name="Table14.A"/>
        <table:table-row>
          <table:table-cell table:style-name="Table14.A1" office:value-type="string">
            <text:p text:style-name="P10">#include &lt;stdio.h&gt;</text:p>
            <text:p text:style-name="P10">#include &lt;unistd.h&gt;</text:p>
            <text:p text:style-name="P10">#include &lt;sched.h&gt;</text:p>
            <text:p text:style-name="P10"><text:s/></text:p>
            <text:p text:style-name="P10">int main()</text:p>
            <text:p text:style-name="P10">{</text:p>
            <text:p text:style-name="P10"><text:s text:c="4"/>printf("Valid priority range for SCHED_OTHER: %d - %d\n",</text:p>
            <text:p text:style-name="P10"><text:s text:c="8"/>sched_get_priority_min(SCHED_OTHER),</text:p>
            <text:p text:style-name="P10"><text:s text:c="8"/>sched_get_priority_max(SCHED_OTHER));</text:p>
            <text:p text:style-name="P10"><text:s text:c="4"/>printf("Valid priority range for SCHED_FIFO: %d - %d\n",</text:p>
            <text:p text:style-name="P10"><text:s text:c="8"/>sched_get_priority_min(SCHED_FIFO),</text:p>
            <text:p text:style-name="P10"><text:s text:c="8"/>sched_get_priority_max(SCHED_FIFO));</text:p>
            <text:p text:style-name="P10"><text:s text:c="4"/>printf("Valid priority range for SCHED_RR: %d - %d\n",</text:p>
            <text:p text:style-name="P10"><text:s text:c="8"/>sched_get_priority_min(SCHED_RR),</text:p>
            <text:p text:style-name="P10"><text:s text:c="8"/>sched_get_priority_max(SCHED_RR));</text:p>
            <text:p text:style-name="P10"><text:s text:c="4"/></text:p>
            <text:p text:style-name="P10"><text:s text:c="4"/>return 0; <text:s text:c="7"/></text:p>
            <text:p text:style-name="P10">}</text:p>
          </table:table-cell>
        </table:table-row>
      </table:table>
      <text:p text:style-name="P31"><text:soft-page-break/>Đối với chính sách <text:span text:style-name="Source_20_Text"><text:span text:style-name="T3">SCHED_OTHER</text:span></text:span>, độ ưu tiên (tĩnh) không được hỗ trợ, trong khi <text:span text:style-name="Source_20_Text"><text:span text:style-name="T3">SCHED_FIFO</text:span></text:span> và <text:span text:style-name="Source_20_Text"><text:span text:style-name="T3">SCHED_RR</text:span></text:span> hỗ trợ sử dụng độ ưu tiên với dải giá trị từ 1 đến 99 (giá trị càng lớn, độ ưu tiên càng cao).</text:p>
      <text:p text:style-name="P25">Các hàm để thiết lập và lấy tham số lập lịch:</text:p>
      <table:table table:name="Table15" table:style-name="Table15">
        <table:table-column table:style-name="Table15.A"/>
        <table:table-row>
          <table:table-cell table:style-name="Table15.A1" office:value-type="string">
            <text:p text:style-name="P10"><text:span text:style-name="Source_20_Text"><text:span text:style-name="T3">int pthread_attr_setschedparam(pthread_attr_t *attr, const struct sched_param *param);</text:span></text:span> <text:line-break/><text:span text:style-name="Source_20_Text"><text:span text:style-name="T3">int pthread_attr_getschedparam(const pthread_attr_t *attr, struct sched_param *param);</text:span></text:span></text:p>
          </table:table-cell>
        </table:table-row>
      </table:table>
      <text:p text:style-name="P8">Ví dụ thiết lập và lấy các tham số lập lịch của luồng:</text:p>
      <table:table table:name="Table16" table:style-name="Table16">
        <table:table-column table:style-name="Table16.A"/>
        <table:table-row>
          <table:table-cell table:style-name="Table16.A1" office:value-type="string">
            <text:p text:style-name="P10">#include &lt;pthread.h&gt;</text:p>
            <text:p text:style-name="P10">#include &lt;sched.h&gt;</text:p>
            <text:p text:style-name="P10">#include &lt;stdio.h&gt;</text:p>
            <text:p text:style-name="P10"/>
            <text:p text:style-name="P10">int main() {</text:p>
            <text:p text:style-name="P10"><text:s text:c="4"/>pthread_attr_t attr;</text:p>
            <text:p text:style-name="P10"><text:s text:c="4"/>struct sched_param param;</text:p>
            <text:p text:style-name="P10"><text:s text:c="4"/>int policy;</text:p>
            <text:p text:style-name="P10"/>
            <text:p text:style-name="P10"><text:s text:c="4"/>// Khởi tạo đối tượng thuộc tính luồng</text:p>
            <text:p text:style-name="P10"><text:s text:c="4"/>pthread_attr_init(&amp;attr);</text:p>
            <text:p text:style-name="P10"/>
            <text:p text:style-name="P10"><text:s text:c="4"/>// Lấy chính sách lập lịch mặc định</text:p>
            <text:p text:style-name="P10"><text:s text:c="4"/>pthread_attr_getschedpolicy(&amp;attr, &amp;policy);</text:p>
            <text:p text:style-name="P10"/>
            <text:p text:style-name="P10"><text:s text:c="4"/>// In chính sách mặc định</text:p>
            <text:p text:style-name="P10"><text:s text:c="4"/>if (policy == SCHED_OTHER) {</text:p>
            <text:p text:style-name="P10"><text:s text:c="8"/>printf("Default scheduling policy is SCHED_OTHER\n");</text:p>
            <text:p text:style-name="P10"><text:s text:c="4"/>} else if (policy == SCHED_RR) {</text:p>
            <text:p text:style-name="P10"><text:s text:c="8"/>printf("Default scheduling policy is SCHED_RR\n");</text:p>
            <text:p text:style-name="P10"><text:s text:c="4"/>} else if (policy == SCHED_FIFO) {</text:p>
            <text:p text:style-name="P10"><text:s text:c="8"/>printf("Default scheduling policy is SCHED_FIFO\n");</text:p>
            <text:p text:style-name="P10"><text:s text:c="4"/>}</text:p>
            <text:p text:style-name="P10"/>
            <text:p text:style-name="P10"><text:soft-page-break/><text:s text:c="4"/>// Lấy các tham số lập lịch mặc định</text:p>
            <text:p text:style-name="P10"><text:s text:c="4"/>pthread_attr_getschedparam(&amp;attr, &amp;param);</text:p>
            <text:p text:style-name="P10"><text:s text:c="4"/>printf("Default priority is %d\n", param.sched_priority);</text:p>
            <text:p text:style-name="P10"/>
            <text:p text:style-name="P10"><text:s text:c="4"/>// Thiết lập chính sách lập lịch và độ ưu tiên mới</text:p>
            <text:p text:style-name="P10"><text:s text:c="4"/>param.sched_priority = 50;</text:p>
            <text:p text:style-name="P10"><text:s text:c="4"/>pthread_attr_setschedpolicy(&amp;attr, SCHED_FIFO);</text:p>
            <text:p text:style-name="P10"><text:s text:c="4"/>pthread_attr_setschedparam(&amp;attr, &amp;param);</text:p>
            <text:p text:style-name="P10"/>
            <text:p text:style-name="P10"><text:s text:c="4"/>// Lấy lại chính sách và độ ưu tiên mới để kiểm tra</text:p>
            <text:p text:style-name="P10"><text:s text:c="4"/>pthread_attr_getschedpolicy(&amp;attr, &amp;policy);</text:p>
            <text:p text:style-name="P10"><text:s text:c="4"/>pthread_attr_getschedparam(&amp;attr, &amp;param);</text:p>
            <text:p text:style-name="P10"/>
            <text:p text:style-name="P10"><text:s text:c="4"/>if (policy == SCHED_FIFO) {</text:p>
            <text:p text:style-name="P10"><text:s text:c="8"/>printf("New scheduling policy is SCHED_FIFO\n");</text:p>
            <text:p text:style-name="P10"><text:s text:c="4"/>}</text:p>
            <text:p text:style-name="P10"><text:s text:c="4"/>printf("New priority is %d\n", param.sched_priority);</text:p>
            <text:p text:style-name="P10"/>
            <text:p text:style-name="P10"><text:s text:c="4"/>// Hủy đối tượng thuộc tính luồng</text:p>
            <text:p text:style-name="P10"><text:s text:c="4"/>pthread_attr_destroy(&amp;attr);</text:p>
            <text:p text:style-name="P10"/>
            <text:p text:style-name="P10"><text:s text:c="4"/>return 0;</text:p>
            <text:p text:style-name="P10">}</text:p>
          </table:table-cell>
        </table:table-row>
      </table:table>
      <text:h text:style-name="P2" text:outline-level="2">5.7 Kết thúc Luồng (Thread Termination)</text:h>
      <text:p text:style-name="P25">Kết thúc luồng đề cập đến quá trình một luồng hoàn thành nhiệm vụ và thoát ra, giải phóng các tài nguyên mà nó đã chiếm dụng để các luồng khác có thể sử dụng. Luồng có thể kết thúc theo hai cách:</text:p>
      <text:list text:style-name="L25">
        <text:list-item>
          <text:p text:style-name="P41"><text:span text:style-name="T4">Kết thúc bình thường (Normal Termination):</text:span><text:span text:style-name="T5"> Luồng thoát ra bằng cách gọi hàm </text:span><text:span text:style-name="Source_20_Text"><text:span text:style-name="T5">pthread_exit()</text:span></text:span><text:span text:style-name="T5"> hoặc trả về (return) từ hàm thực thi luồng. Trong trường hợp kết thúc bình thường, luồng sẽ tự động giải phóng các tài nguyên đã chiếm dụng, bao gồm không gian ngăn xếp (stack), bộ mô tả luồng (thread descriptor) và các tài nguyên khác.</text:span></text:p>
        </text:list-item>
        <text:list-item>
          <text:p text:style-name="P22"><text:soft-page-break/><text:span text:style-name="T1">Kết thúc bất thường (Abnormal Termination):</text:span> Nếu một luồng gặp lỗi trong quá trình thực thi khiến nó không thể tiếp tục, nó sẽ tự động kết thúc. Trong tình huống này, việc đảm bảo luồng giải phóng tất cả tài nguyên đã chiếm dụng là rất quan trọng để tránh các vấn đề như rò rỉ tài nguyên (resource leaks) và rò rỉ bộ nhớ (memory leaks).</text:p>
        </text:list-item>
      </text:list>
      <text:p text:style-name="P44"><text:span text:style-name="T5">Tóm lại, việc kết thúc luồng là rất quan trọng vì nó ngăn chặn rò rỉ tài nguyên và các vấn đề liên quan đến bộ nhớ, đồng thời cải thiện hiệu suất và tính ổn định của hệ thống. Do đó, khi viết các chương trình đa luồng, cần đặc biệt chú ý đến việc kết thúc luồng, đảm bảo rằng các luồng thoát ra một cách an toàn (gracefully) và giải phóng mọi tài nguyên đang chiếm giữ. Như đã đề cập ở phần tạo luồng, một luồng sẽ kết thúc quá trình thực thi khi gặp lệnh </text:span><text:span text:style-name="Source_20_Text"><text:span text:style-name="T5">pthread_exit()</text:span></text:span><text:span text:style-name="T5"> hoặc trả về từ hàm luồng.</text:span></text:p>
      <text:h text:style-name="P3" text:outline-level="3">5.7.1 Hàm pthread_cancel</text:h>
      <text:p text:style-name="P44"><text:span text:style-name="T5">Trong một chương trình đa luồng, một luồng có thể gửi một tín hiệu "kết thúc" (sau đây gọi là tín hiệu hủy - "Cancel signal") đến một luồng khác. Điều này yêu cầu gọi hàm </text:span><text:span text:style-name="Source_20_Text"><text:span text:style-name="T5">pthread_cancel()</text:span></text:span><text:span text:style-name="T5">, được khai báo như sau:</text:span></text:p>
      <table:table table:name="Table17" table:style-name="Table17">
        <table:table-column table:style-name="Table17.A"/>
        <table:table-row>
          <table:table-cell table:style-name="Table17.A1" office:value-type="string">
            <text:p text:style-name="P10">#include &lt;pthread.h&gt;</text:p>
            <text:p text:style-name="P10">int pthread_cancel(pthread_t thread);</text:p>
          </table:table-cell>
        </table:table-row>
      </table:table>
      <text:p text:style-name="P31">Trước khi sử dụng hàm <text:span text:style-name="Source_20_Text"><text:span text:style-name="T3">pthread_cancel()</text:span></text:span>, việc hiểu cơ chế xử lý tín hiệu hủy của luồng đích là rất quan trọng.</text:p>
      <text:p text:style-name="P25">Đối với các luồng có thuộc tính mặc định, khi một yêu cầu hủy (tín hiệu hủy) được gửi đến luồng đích, nó không kết thúc ngay lập tức. Thay vào đó, nó sẽ phản hồi tín hiệu hủy và kết thúc thực thi khi gặp một <text:span text:style-name="T1">điểm hủy (cancellation point)</text:span>.</text:p>
      <text:p text:style-name="P44"><text:span text:style-name="T5">Trong tiêu chuẩn POSIX, các hàm cho phép hủy được gọi là "cancellation points" hoặc "cancellable functions". Điểm hủy là các vị trí cụ thể trong mã nguồn trong quá trình thực thi chương trình mà tại đó luồng có thể bị hủy và công việc dọn dẹp có thể được thực hiện. Nhiều lời gọi hệ thống và hàm thư viện tiêu chuẩn là các điểm hủy, chẳng hạn như các hàm I/O và các hàm cấp phát bộ nhớ. Các ví dụ phổ biến bao gồm </text:span><text:span text:style-name="Source_20_Text"><text:span text:style-name="T5">pthread_join()</text:span></text:span><text:span text:style-name="T5">, </text:span><text:span text:style-name="Source_20_Text"><text:span text:style-name="T5">pthread_testcancel()</text:span></text:span><text:span text:style-name="T5">, </text:span><text:span text:style-name="Source_20_Text"><text:span text:style-name="T5">sleep()</text:span></text:span><text:span text:style-name="T5">, và </text:span><text:span text:style-name="Source_20_Text"><text:span text:style-name="T5">system()</text:span></text:span><text:span text:style-name="T5">.</text:span></text:p>
      <text:h text:style-name="P4" text:outline-level="3">5.7.2 Hàm pthread_setcancelstate</text:h>
      <text:p text:style-name="P44"><text:span text:style-name="T5">Nếu bạn muốn sửa đổi thủ công cách luồng đích xử lý tín hiệu hủy, bạn có thể sử dụng hàm </text:span><text:span text:style-name="Source_20_Text"><text:span text:style-name="T5">pthread_setcancelstate()</text:span></text:span><text:span text:style-name="T5"> và </text:span><text:span text:style-name="Source_20_Text"><text:span text:style-name="T5">pthread_setcanceltype()</text:span></text:span><text:span text:style-name="T5">.</text:span></text:p>
      <text:p text:style-name="P44"><text:span text:style-name="T5">Khai báo hàm </text:span><text:span text:style-name="Source_20_Text"><text:span text:style-name="T5">pthread_setcancelstate()</text:span></text:span><text:span text:style-name="T5">:</text:span></text:p>
      <table:table table:name="Table18" table:style-name="Table18">
        <table:table-column table:style-name="Table18.A"/>
        <table:table-row>
          <table:table-cell table:style-name="Table18.A1" office:value-type="string">
            <text:p text:style-name="P10">#include &lt;pthread.h&gt;</text:p>
            <text:p text:style-name="P10">int pthread_setcancelstate(int state, int *oldstate);</text:p>
          </table:table-cell>
        </table:table-row>
      </table:table>
      <text:p text:style-name="P28">Giải thích tham số:</text:p>
      <text:list text:style-name="L26">
        <text:list-item>
          <text:p text:style-name="P23"><text:span text:style-name="T1">state</text:span>: Tham số này có hai giá trị có thể:</text:p>
          <text:list>
            <text:list-item>
              <text:p text:style-name="P42"><text:span text:style-name="Source_20_Text"><text:span text:style-name="T5">PTHREAD_CANCEL_ENABLE</text:span></text:span><text:span text:style-name="T5"> (mặc định): Luồng hiện tại sẽ xử lý các tín hiệu hủy được gửi bởi các luồng khác.</text:span></text:p>
            </text:list-item>
            <text:list-item>
              <text:p text:style-name="P42"><text:soft-page-break/><text:span text:style-name="Source_20_Text"><text:span text:style-name="T5">PTHREAD_CANCEL_DISABLE</text:span></text:span><text:span text:style-name="T5">: Luồng hiện tại bỏ qua các tín hiệu hủy từ các luồng khác cho đến khi trạng thái luồng được thiết lập lại thành </text:span><text:span text:style-name="Source_20_Text"><text:span text:style-name="T5">PTHREAD_CANCEL_ENABLE</text:span></text:span><text:span text:style-name="T5">, tại thời điểm đó nó mới xử lý mọi tín hiệu hủy đã nhận được.</text:span></text:p>
            </text:list-item>
          </text:list>
        </text:list-item>
        <text:list-item>
          <text:p text:style-name="P42"><text:span text:style-name="T4">oldstate</text:span><text:span text:style-name="T5">: Tham số này được sử dụng để nhận giá trị trạng thái trước đó của luồng, thường dùng để khôi phục lại trạng thái cũ. Nếu bạn không cần nhận giá trị này, hãy đặt nó là </text:span><text:span text:style-name="Source_20_Text"><text:span text:style-name="T5">NULL</text:span></text:span><text:span text:style-name="T5">.</text:span></text:p>
        </text:list-item>
      </text:list>
      <text:p text:style-name="P44"><text:span text:style-name="T4">Giá trị trả về:</text:span><text:span text:style-name="T5"> Khi hàm </text:span><text:span text:style-name="Source_20_Text"><text:span text:style-name="T5">pthread_setcancelstate()</text:span></text:span><text:span text:style-name="T5"> thực thi thành công, nó trả về 0; ngược lại, nó trả về một giá trị khác 0.</text:span></text:p>
      <text:h text:style-name="P3" text:outline-level="3">5.7.3 Hàm pthread_setcanceltype</text:h>
      <text:p text:style-name="P44"><text:span text:style-name="T5">Khai báo hàm </text:span><text:span text:style-name="Source_20_Text"><text:span text:style-name="T5">pthread_setcanceltype()</text:span></text:span><text:span text:style-name="T5">:</text:span></text:p>
      <table:table table:name="Table19" table:style-name="Table19">
        <table:table-column table:style-name="Table19.A"/>
        <table:table-row>
          <table:table-cell table:style-name="Table19.A1" office:value-type="string">
            <text:p text:style-name="P10">#include &lt;pthread.h&gt;</text:p>
            <text:p text:style-name="P10">int pthread_setcanceltype(int type, int *oldtype);</text:p>
          </table:table-cell>
        </table:table-row>
      </table:table>
      <text:p text:style-name="P28">Giải thích tham số:</text:p>
      <text:list text:style-name="L27">
        <text:list-item>
          <text:p text:style-name="P24"><text:span text:style-name="T1">type</text:span>: Tham số này có hai giá trị có thể:</text:p>
          <text:list>
            <text:list-item>
              <text:p text:style-name="P43"><text:span text:style-name="Source_20_Text"><text:span text:style-name="T5">PTHREAD_CANCEL_DEFERRED</text:span></text:span><text:span text:style-name="T5"> (mặc định): Luồng kết thúc thực thi khi chạm đến một điểm hủy.</text:span></text:p>
            </text:list-item>
            <text:list-item>
              <text:p text:style-name="P43"><text:span text:style-name="Source_20_Text"><text:span text:style-name="T5">PTHREAD_CANCEL_ASYNCHRONOUS</text:span></text:span><text:span text:style-name="T5">: Luồng kết thúc ngay lập tức khi nhận được tín hiệu hủy.</text:span></text:p>
            </text:list-item>
          </text:list>
        </text:list-item>
        <text:list-item>
          <text:p text:style-name="P43"><text:span text:style-name="T4">oldtype</text:span><text:span text:style-name="T5">: Tham số này được sử dụng để nhận giá trị kiểu hủy trước đó của luồng. Nếu không cần dùng, hãy đặt là </text:span><text:span text:style-name="Source_20_Text"><text:span text:style-name="T5">NULL</text:span></text:span><text:span text:style-name="T5">.</text:span></text:p>
        </text:list-item>
      </text:list>
      <text:p text:style-name="P44"><text:span text:style-name="T4">Giá trị trả về:</text:span><text:span text:style-name="T5"> Khi hàm </text:span><text:span text:style-name="Source_20_Text"><text:span text:style-name="T5">pthread_setcanceltype()</text:span></text:span><text:span text:style-name="T5"> thực thi thành công, nó trả về 0; ngược lại, nó trả về một giá trị khác 0.</text:span></text:p>
      <text:p text:style-name="P44"><text:span text:style-name="T4">Ví dụ:</text:span><text:span text:style-name="T5"> Tạo một luồng </text:span><text:span text:style-name="Source_20_Text"><text:span text:style-name="T5">tid</text:span></text:span><text:span text:style-name="T5"> với trạng thái hủy được thiết lập là </text:span><text:span text:style-name="Source_20_Text"><text:span text:style-name="T5">PTHREAD_CANCEL_DISABLE</text:span></text:span><text:span text:style-name="T5"> và kiểu hủy là </text:span><text:span text:style-name="Source_20_Text"><text:span text:style-name="T5">PTHREAD_CANCEL_ASYNCHRONOUS</text:span></text:span><text:span text:style-name="T5">. Luồng chính ngủ trong 2 giây rồi gửi yêu cầu hủy đến luồng đó. Sau đó luồng sẽ bị hủy (khi trạng thái được cho phép).</text:span></text:p>
      <table:table table:name="Table20" table:style-name="Table20">
        <table:table-column table:style-name="Table20.A"/>
        <table:table-row>
          <table:table-cell table:style-name="Table20.A1" office:value-type="string">
            <text:p text:style-name="P10">#include &lt;pthread.h&gt;</text:p>
            <text:p text:style-name="P10">#include &lt;stdio.h&gt;</text:p>
            <text:p text:style-name="P10">#include &lt;unistd.h&gt;</text:p>
            <text:p text:style-name="P10"/>
            <text:p text:style-name="P10">void* thread_func(void* arg)</text:p>
            <text:p text:style-name="P10">{</text:p>
            <text:p text:style-name="P10"><text:s text:c="4"/>int oldstate, oldtype;</text:p>
            <text:p text:style-name="P10"><text:s text:c="4"/>// Vô hiệu hóa khả năng bị hủy tạm thời</text:p>
            <text:p text:style-name="P10"><text:soft-page-break/><text:s text:c="4"/>pthread_setcancelstate(PTHREAD_CANCEL_DISABLE, &amp;oldstate);</text:p>
            <text:p text:style-name="P10"><text:s text:c="4"/>// Thiết lập kiểu hủy là bất đồng bộ (ngay lập tức)</text:p>
            <text:p text:style-name="P10"><text:s text:c="4"/>pthread_setcanceltype(PTHREAD_CANCEL_ASYNCHRONOUS, &amp;oldtype);</text:p>
            <text:p text:style-name="P10"><text:s text:c="4"/></text:p>
            <text:p text:style-name="P10"><text:s text:c="4"/>printf("Thread started.\n");</text:p>
            <text:p text:style-name="P10"><text:s text:c="4"/></text:p>
            <text:p text:style-name="P10"><text:s text:c="4"/>// Giả lập một công việc nặng, trong đó luồng không thể bị hủy vì đã DISABLE</text:p>
            <text:p text:style-name="P10"><text:s text:c="4"/>for(int i = 0; i &lt; 5; i++) {</text:p>
            <text:p text:style-name="P10"><text:s text:c="8"/>printf("Thread running (cancellation disabled)...\n");</text:p>
            <text:p text:style-name="P10"><text:s text:c="8"/>sleep(1);</text:p>
            <text:p text:style-name="P10"><text:s text:c="4"/>}</text:p>
            <text:p text:style-name="P10"/>
            <text:p text:style-name="P10"><text:s text:c="4"/>// Cho phép hủy trở lại để nhận tín hiệu từ main</text:p>
            <text:p text:style-name="P10"><text:s text:c="4"/>pthread_setcancelstate(PTHREAD_CANCEL_ENABLE, &amp;oldstate);</text:p>
            <text:p text:style-name="P10"><text:s text:c="4"/></text:p>
            <text:p text:style-name="P10"><text:s text:c="4"/>while (1) </text:p>
            <text:p text:style-name="P10"><text:s text:c="4"/>{</text:p>
            <text:p text:style-name="P10"><text:s text:c="8"/>printf("Thread running (cancellation enabled)...\n");</text:p>
            <text:p text:style-name="P10"><text:s text:c="8"/>sleep(1);</text:p>
            <text:p text:style-name="P10"><text:s text:c="4"/>}</text:p>
            <text:p text:style-name="P10"><text:s text:c="4"/></text:p>
            <text:p text:style-name="P10"><text:s text:c="4"/>printf("Thread ended.\n"); // Đoạn mã này có thể không bao giờ đạt tới</text:p>
            <text:p text:style-name="P10"><text:s text:c="4"/>pthread_exit(NULL);</text:p>
            <text:p text:style-name="P10">}</text:p>
            <text:p text:style-name="P10"/>
            <text:p text:style-name="P10">int main()</text:p>
            <text:p text:style-name="P10">{</text:p>
            <text:p text:style-name="P10"><text:s text:c="4"/>pthread_t tid;</text:p>
            <text:p text:style-name="P10"><text:s text:c="4"/>pthread_create(&amp;tid, NULL, thread_func, NULL);</text:p>
            <text:p text:style-name="P10"><text:s text:c="4"/></text:p>
            <text:p text:style-name="P10"><text:soft-page-break/><text:s text:c="4"/>sleep(2); // Chờ một chút</text:p>
            <text:p text:style-name="P10"><text:s text:c="4"/>pthread_cancel(tid); // Gửi yêu cầu hủy</text:p>
            <text:p text:style-name="P10"><text:s text:c="4"/>printf("Cancellation request sent.\n");</text:p>
            <text:p text:style-name="P10"><text:s text:c="4"/></text:p>
            <text:p text:style-name="P10"><text:s text:c="4"/>pthread_join(tid, NULL);</text:p>
            <text:p text:style-name="P10"><text:s text:c="4"/>printf("Main thread ended.\n");</text:p>
            <text:p text:style-name="P10"><text:s text:c="4"/>return 0;</text:p>
            <text:p text:style-name="P10">}</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0T15:30:03.948924243</meta:creation-date>
    <dc:date>2026-04-11T09:48:02.884320700</dc:date>
    <meta:editing-duration>PT1H19M27S</meta:editing-duration>
    <meta:editing-cycles>27</meta:editing-cycles>
    <meta:generator>LibreOffice/24.2.7.2$Linux_X86_64 LibreOffice_project/420$Build-2</meta:generator>
    <meta:document-statistic meta:table-count="20" meta:image-count="0" meta:object-count="0" meta:page-count="16" meta:paragraph-count="331" meta:word-count="4529" meta:character-count="25104" meta:non-whitespace-character-count="20327"/>
  </office:meta>
</office:document-meta>
</file>