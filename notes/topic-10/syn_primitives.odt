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5pt solid #000000"/>
    </style:style>
    <style:style style:name="P1" style:family="paragraph" style:parent-style-name="Heading_20_3">
      <style:paragraph-properties fo:margin-top="0.0598in" fo:margin-bottom="0.0598in" style:contextual-spacing="false" fo:line-height="100%"/>
      <style:text-properties style:font-name="Liberation Serif" fo:font-size="13pt" style:font-size-asian="13pt" style:font-size-complex="13pt"/>
    </style:style>
    <style:style style:name="P2" style:family="paragraph" style:parent-style-name="Heading_20_3">
      <style:paragraph-properties fo:margin-top="0.0598in" fo:margin-bottom="0.0598in" style:contextual-spacing="false" fo:line-height="100%">
        <style:tab-stops/>
      </style:paragraph-properties>
      <style:text-properties style:font-name="Liberation Serif" fo:font-size="13pt" style:font-size-asian="13pt" style:font-size-complex="13pt"/>
    </style:style>
    <style:style style:name="P3" style:family="paragraph" style:parent-style-name="Standard">
      <style:paragraph-properties fo:margin-top="0.0598in" fo:margin-bottom="0.0598in" style:contextual-spacing="false" fo:line-height="100%">
        <style:tab-stops/>
      </style:paragraph-properties>
      <style:text-properties style:font-name="Liberation Serif" fo:font-size="13pt" style:font-size-asian="13pt" style:font-size-complex="13pt"/>
    </style:style>
    <style:style style:name="P4" style:family="paragraph" style:parent-style-name="Heading_20_4">
      <style:paragraph-properties fo:margin-top="0.0598in" fo:margin-bottom="0.0598in" style:contextual-spacing="false" fo:line-height="100%"/>
      <style:text-properties style:font-name="Liberation Serif" fo:font-size="13pt" style:font-size-asian="13pt" style:font-size-complex="13pt"/>
    </style:style>
    <style:style style:name="P5" style:family="paragraph" style:parent-style-name="Table_20_Contents">
      <style:paragraph-properties fo:margin-top="0.0598in" fo:margin-bottom="0.0598in" style:contextual-spacing="false" fo:line-height="100%"/>
      <style:text-properties style:font-name="Liberation Serif" fo:font-size="13pt" style:font-size-asian="13pt" style:font-size-complex="13pt"/>
    </style:style>
    <style:style style:name="P6" style:family="paragraph" style:parent-style-name="Preformatted_20_Text">
      <style:paragraph-properties fo:margin-left="0in" fo:margin-right="0in" fo:margin-top="0.0598in" fo:margin-bottom="0.0598in" style:contextual-spacing="false" fo:line-height="100%" fo:text-indent="0in" style:auto-text-indent="false"/>
      <style:text-properties style:font-name="Liberation Serif" fo:font-size="13pt" style:font-size-asian="13pt" style:font-size-complex="13pt"/>
    </style:style>
    <style:style style:name="P7" style:family="paragraph" style:parent-style-name="Preformatted_20_Text">
      <style:paragraph-properties fo:margin-top="0.0598in" fo:margin-bottom="0.0598in" style:contextual-spacing="false" fo:line-height="100%"/>
      <style:text-properties style:font-name="Liberation Serif" fo:font-size="13pt" style:font-size-asian="13pt" style:font-size-complex="13pt"/>
    </style:style>
    <style:style style:name="P8" style:family="paragraph" style:parent-style-name="Text_20_body" style:list-style-name="L1">
      <style:paragraph-properties fo:margin-top="0.0598in" fo:margin-bottom="0.0598in" style:contextual-spacing="false" fo:line-height="100%"/>
      <style:text-properties style:font-name="Liberation Serif" fo:font-size="13pt" style:font-size-asian="13pt" style:font-size-complex="13pt"/>
    </style:style>
    <style:style style:name="P9" style:family="paragraph" style:parent-style-name="Text_20_body" style:list-style-name="L2">
      <style:paragraph-properties fo:margin-top="0.0598in" fo:margin-bottom="0.0598in" style:contextual-spacing="false" fo:line-height="100%"/>
      <style:text-properties style:font-name="Liberation Serif" fo:font-size="13pt" style:font-size-asian="13pt" style:font-size-complex="13pt"/>
    </style:style>
    <style:style style:name="P10" style:family="paragraph" style:parent-style-name="Text_20_body" style:list-style-name="L3">
      <style:paragraph-properties fo:margin-top="0.0598in" fo:margin-bottom="0.0598in" style:contextual-spacing="false" fo:line-height="100%"/>
      <style:text-properties style:font-name="Liberation Serif" fo:font-size="13pt" style:font-size-asian="13pt" style:font-size-complex="13pt"/>
    </style:style>
    <style:style style:name="P11" style:family="paragraph" style:parent-style-name="Text_20_body">
      <style:paragraph-properties fo:margin-top="0.0598in" fo:margin-bottom="0.0598in" style:contextual-spacing="false" fo:line-height="100%">
        <style:tab-stops/>
      </style:paragraph-properties>
      <style:text-properties style:font-name="Liberation Serif" fo:font-size="13pt" style:font-size-asian="13pt" style:font-size-complex="13pt"/>
    </style:style>
    <style:style style:name="P12" style:family="paragraph" style:parent-style-name="Text_20_body">
      <style:paragraph-properties fo:margin-top="0.0598in" fo:margin-bottom="0.0598in" style:contextual-spacing="false" fo:line-height="100%"/>
      <style:text-properties style:font-name="Liberation Serif" fo:font-size="13pt" style:font-size-asian="13pt" style:font-size-complex="13pt"/>
    </style:style>
    <style:style style:name="P13" style:family="paragraph" style:parent-style-name="Text_20_body">
      <style:paragraph-properties fo:margin-left="0in" fo:margin-right="0in" fo:margin-top="0.0598in" fo:margin-bottom="0.0598in" style:contextual-spacing="false" fo:line-height="100%" fo:text-indent="0in" style:auto-text-indent="false"/>
      <style:text-properties style:font-name="Liberation Serif" fo:font-size="13pt" style:font-size-asian="13pt" style:font-size-complex="13pt"/>
    </style:style>
    <style:style style:name="P14" style:family="paragraph" style:parent-style-name="Text_20_body" style:list-style-name="L9">
      <style:paragraph-properties fo:margin-top="0.0598in" fo:margin-bottom="0.0598in" style:contextual-spacing="false" fo:line-height="100%"/>
      <style:text-properties style:font-name="Liberation Serif" fo:font-size="13pt" style:font-size-asian="13pt" style:font-size-complex="13pt"/>
    </style:style>
    <style:style style:name="P15" style:family="paragraph" style:parent-style-name="Text_20_body">
      <style:paragraph-properties fo:margin-top="0.0598in" fo:margin-bottom="0.0598in" style:contextual-spacing="false" fo:line-height="100%"/>
      <style:text-properties style:font-name="Liberation Serif" fo:font-size="13pt" fo:font-weight="bold" style:font-size-asian="13pt" style:font-size-complex="13pt"/>
    </style:style>
    <style:style style:name="P16" style:family="paragraph" style:parent-style-name="Text_20_body" style:list-style-name="L10">
      <style:paragraph-properties fo:margin-top="0.0598in" fo:margin-bottom="0.0598in" style:contextual-spacing="false" fo:line-height="100%"/>
      <style:text-properties style:font-name="Liberation Serif" fo:font-size="13pt" fo:font-weight="bold" style:font-size-asian="13pt" style:font-weight-asian="bold" style:font-size-complex="13pt" style:font-weight-complex="bold"/>
    </style:style>
    <style:style style:name="P17" style:family="paragraph" style:parent-style-name="Text_20_body" style:list-style-name="L4">
      <style:paragraph-properties fo:margin-top="0.0598in" fo:margin-bottom="0.0598in" style:contextual-spacing="false" fo:line-height="100%"/>
    </style:style>
    <style:style style:name="P18" style:family="paragraph" style:parent-style-name="Text_20_body" style:list-style-name="L6">
      <style:paragraph-properties fo:margin-top="0.0598in" fo:margin-bottom="0.0598in" style:contextual-spacing="false" fo:line-height="100%"/>
    </style:style>
    <style:style style:name="P19" style:family="paragraph" style:parent-style-name="Text_20_body" style:list-style-name="L7">
      <style:paragraph-properties fo:margin-top="0.0598in" fo:margin-bottom="0.0598in" style:contextual-spacing="false" fo:line-height="100%"/>
    </style:style>
    <style:style style:name="P20" style:family="paragraph" style:parent-style-name="Text_20_body">
      <style:paragraph-properties fo:margin-top="0.0598in" fo:margin-bottom="0.0598in" style:contextual-spacing="false" fo:line-height="100%"/>
    </style:style>
    <style:style style:name="P21" style:family="paragraph" style:parent-style-name="Text_20_body">
      <style:paragraph-properties fo:margin-top="0.0598in" fo:margin-bottom="0.0598in" style:contextual-spacing="false" fo:line-height="100%">
        <style:tab-stops/>
      </style:paragraph-properties>
    </style:style>
    <style:style style:name="P22" style:family="paragraph" style:parent-style-name="Text_20_body">
      <style:paragraph-properties fo:margin-left="0in" fo:margin-right="0in" fo:margin-top="0.0598in" fo:margin-bottom="0.0598in" style:contextual-spacing="false" fo:line-height="100%" fo:text-indent="0in" style:auto-text-indent="false"/>
    </style:style>
    <style:style style:name="T1" style:family="text">
      <style:text-properties fo:font-weight="bold"/>
    </style:style>
    <style:style style:name="T2" style:family="text">
      <style:text-properties style:font-name="Liberation Serif" fo:font-size="13pt" style:font-size-asian="13pt" style:font-size-complex="13pt"/>
    </style:style>
    <style:style style:name="T3" style:family="text">
      <style:text-properties style:font-name="Liberation Serif" fo:font-size="13pt" fo:font-weight="bold" style:font-size-asian="13pt" style:font-size-complex="13pt"/>
    </style:style>
    <style:style style:name="T4" style:family="text">
      <style:text-properties officeooo:rsid="001deb02"/>
    </style:style>
    <style:style style:name="T5" style:family="text">
      <style:text-properties officeooo:rsid="001ec401"/>
    </style:style>
    <style:style style:name="T6" style:family="text">
      <style:text-properties officeooo:rsid="0021a0d3"/>
    </style:style>
    <style:style style:name="T7" style:family="text">
      <style:text-properties officeooo:rsid="00232f17"/>
    </style:style>
    <style:style style:name="T8" style:family="text">
      <style:text-properties fo:font-weight="normal" style:font-weight-asian="normal" style:font-weight-complex="normal"/>
    </style:style>
    <style:style style:name="T9" style:family="text">
      <style:text-properties fo:font-weight="normal" officeooo:rsid="0024fc5d" style:font-weight-asian="normal" style:font-weight-complex="normal"/>
    </style:style>
    <style:style style:name="T10" style:family="text">
      <style:text-properties officeooo:rsid="0024fc5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Để phần mềm có thể tận dụng tối đa các bộ vi xử lý <text:span text:style-name="T1">đa nhân (multi-core)</text:span>, chúng cần được thiết kế theo hướng <text:span text:style-name="T1">đa luồng (multi-threaded)</text:span>. Đa luồng không chỉ giúp sử dụng tài nguyên hệ thống hiệu quả hơn mà còn hỗ trợ tổ chức mã nguồn tốt hơn, tăng tính mô-đun (chia nhỏ các tác vụ phức tạp thành các đơn vị có thể quản lý được) và khả năng mở rộng (scalability).</text:p>
      <text:p text:style-name="P12">Tuy nhiên, quy trình đa luồng lại làm nảy sinh <text:span text:style-name="T1">tình trạng tranh đua (race condition)</text:span>. Đây là hiện tượng các tài nguyên dùng chung bị nhiều luồng cập nhật không chính xác, dẫn đến các hành vi không xác định hoặc tệ hơn là các lỗ hổng nghiêm trọng như <text:span text:style-name="T1">Use After Free (Sử dụng sau khi giải phóng)</text:span>. Các mô hình <text:span text:style-name="T1">Người sản xuất - Người tiêu dùng (Producer-Consumer)</text:span> cũng yêu cầu sự đồng bộ hóa để cập nhật các tài nguyên chung một cách nhất quán.</text:p>
      <text:h text:style-name="P1" text:outline-level="3">Nguyên ngữ đồng bộ (Synchronization Primitives) là gì?</text:h>
      <text:p text:style-name="P12">Các nguyên ngữ đồng bộ (thường là các đối tượng hạt nhân - kernel objects) có nhiệm vụ kiểm soát quyền truy cập vào tài nguyên dùng chung, sao cho tại một thời điểm chỉ có một luồng duy nhất có thể đọc hoặc ghi vào dữ liệu dùng chung đó.</text:p>
      <text:p text:style-name="P12">Việc đồng bộ hóa trong một tiến trình đa luồng có thể được thực hiện thông qua: <text:span text:style-name="T1">báo hiệu (signalling)</text:span>, <text:span text:style-name="T1">khóa (locking)</text:span>, sự kết hợp của cả hai, hoặc sử dụng các <text:span text:style-name="T1">biến nguyên tử (atomic variables)</text:span>.</text:p>
      <text:list text:style-name="L1">
        <text:list-item>
          <text:p text:style-name="P8"><text:span text:style-name="T1">Báo hiệu một sự kiện (Signalling of an event):</text:span> Các đối tượng hạt nhân như <text:span text:style-name="T1">Semaphores</text:span> có thể được dùng để báo hiệu một sự kiện, từ đó đồng bộ hóa quyền truy cập vào tài nguyên dùng chung.</text:p>
        </text:list-item>
        <text:list-item>
          <text:p text:style-name="P8"><text:span text:style-name="T1">Khóa (Locking):</text:span> Các <text:span text:style-name="T1">đoạn găng (critical section)</text:span> của mã nguồn có thể được bảo vệ khỏi tình trạng tranh đua bằng cách khóa chúng lại. Chỉ luồng đang nắm giữ khóa mới có thể thực thi đoạn găng, trong khi các luồng khác phải cạnh tranh để giành được khóa. Cơ chế này tạo ra tính <text:span text:style-name="T1">loại trừ tương hỗ (mutual exclusiveness)</text:span> đối với các tài nguyên dùng chung.</text:p>
        </text:list-item>
        <text:list-item>
          <text:p text:style-name="P8"><text:span text:style-name="T1">Kết hợp khóa và báo hiệu:</text:span> Trong khi khóa bảo vệ tài nguyên khỏi tình trạng tranh đua, báo hiệu có thể cần thiết để phối hợp hoạt động giữa các luồng dựa trên sự kiện xảy ra. Sự kết hợp này thường được dùng để bảo vệ và đồng bộ hóa các hoạt động dựa trên sự kiện.</text:p>
        </text:list-item>
        <text:list-item>
          <text:p text:style-name="P8"><text:span text:style-name="T1">Biến nguyên tử (Atomic Variables):</text:span> Các biến nguyên tử đảm bảo việc cập nhật giá trị không bị gián đoạn. Cơ chế phức tạp phía sau được hạt nhân xử lý, đảm bảo các biến này luôn được sửa đổi một cách nhất quán giữa nhiều luồng.</text:p>
        </text:list-item>
      </text:list>
      <text:h text:style-name="P1" text:outline-level="3">Tìm hiểu sâu về Semaphore (Cơ chế báo hiệu)</text:h>
      <text:p text:style-name="P12"><text:span text:style-name="T1">Semaphore</text:span> là các giá trị nguyên tử không âm. Về cơ bản, đây là một <text:span text:style-name="T1">cơ chế báo hiệu</text:span> (không phải là một loại khóa), giúp đạt được sự đồng bộ hóa nếu được sử dụng đúng cách. Một luồng chỉ có thể tiếp tục thực thi sau semaphore nếu giá trị của nó lớn hơn <text:span text:style-name="T4">0</text:span>.</text:p>
      <text:list text:style-name="L2">
        <text:list-item>
          <text:p text:style-name="P9"><text:span text:style-name="T1">Hàm wait (chờ):</text:span> Được dùng để giảm giá trị của semaphore. Nếu giá trị trở thành số <text:span text:style-name="T5">không</text:span>, luồng sẽ được đưa vào trạng thái ngủ (sleep) và xếp vào hàng đợi chờ (waiting queue).</text:p>
        </text:list-item>
        <text:list-item>
          <text:p text:style-name="P9"><text:soft-page-break/><text:span text:style-name="T1">Hàm signal (báo hiệu):</text:span> Tăng giá trị của semaphore và phát tín hiệu để các luồng đang chờ có thể được đánh thức và thực thi tiếp.</text:p>
        </text:list-item>
        <text:list-item>
          <text:p text:style-name="P9"><text:span text:style-name="T1">Quyền sở hữu (Ownership):</text:span> <text:span text:style-name="T1">Không có.</text:span> Semaphore không thuộc sở hữu của bất kỳ luồng nào; nó đơn thuần chỉ là một con số không âm.</text:p>
        </text:list-item>
        <text:list-item>
          <text:p text:style-name="P9"><text:span text:style-name="T1">Trạng thái (State):</text:span> Một luồng khi chờ semaphore sẽ chuyển sang trạng thái ngủ, tức là <text:span text:style-name="T1">trạng thái bị chặn (blocked state)</text:span> mà không tiêu tốn chu kỳ xử lý của CPU.</text:p>
        </text:list-item>
      </text:list>
      <text:p text:style-name="P20"><text:span text:style-name="T2">Dưới đây là ví dụ mã nguồn minh họa việc sử dụng Semaphore như một nguyên ngữ đồng bộ để cập nhật chính xác tài nguyên dùng chung (biến </text:span><text:span text:style-name="Source_20_Text"><text:span text:style-name="T2">val</text:span></text:span><text:span text:style-name="T2">) trong một tiến trình đa luồng:</text:span></text:p>
      <table:table table:name="Table1" table:style-name="Table1">
        <table:table-column table:style-name="Table1.A"/>
        <table:table-row>
          <table:table-cell table:style-name="Table1.A1" office:value-type="string">
            <text:p text:style-name="P6"><text:bookmark text:name="2e69"/>#include &lt;iostream&gt;</text:p>
            <text:p text:style-name="P7">#include &lt;pthread.h&gt;</text:p>
            <text:p text:style-name="P7">#include &lt;semaphore.h&gt;</text:p>
            <text:p text:style-name="P7">using namespace std;</text:p>
            <text:p text:style-name="P7">sem_t sem;</text:p>
            <text:p text:style-name="P7">void* thrFunc(void *arg){</text:p>
            <text:p text:style-name="P7"><text:s text:c="8"/>int *val = (int*)arg;</text:p>
            <text:p text:style-name="P7"><text:s text:c="8"/>for(int i = 0; i&lt;10000; i++){</text:p>
            <text:p text:style-name="P7"><text:s text:c="16"/>sem_wait(&amp;sem);</text:p>
            <text:p text:style-name="P7"><text:s text:c="16"/>(*val)++;</text:p>
            <text:p text:style-name="P7"><text:s text:c="16"/>sem_post(&amp;sem);</text:p>
            <text:p text:style-name="P7"><text:s text:c="8"/>}</text:p>
            <text:p text:style-name="P7"><text:s text:c="8"/>return NULL;</text:p>
            <text:p text:style-name="P7">}</text:p>
            <text:p text:style-name="P7">int main(){</text:p>
            <text:p text:style-name="P7"><text:s text:c="8"/>pthread_t t1, t2;</text:p>
            <text:p text:style-name="P7"><text:s text:c="8"/>int val = 0;</text:p>
            <text:p text:style-name="P7"><text:s text:c="8"/>sem_init(&amp;sem, 0, 1); //initialize semaphore with value one</text:p>
            <text:p text:style-name="P7"><text:s text:c="8"/>pthread_create(&amp;t1, NULL, thrFunc, (void*)&amp;val);</text:p>
            <text:p text:style-name="P7"><text:s text:c="8"/>pthread_create(&amp;t2, NULL, thrFunc, (void*)&amp;val);</text:p>
            <text:p text:style-name="P7"><text:s text:c="8"/>pthread_join(t1, NULL);</text:p>
            <text:p text:style-name="P7"><text:s text:c="8"/>pthread_join(t2, NULL);</text:p>
            <text:p text:style-name="P7"><text:s text:c="8"/>cout&lt;&lt;"Value : "&lt;&lt; val &lt;&lt;"\n";</text:p>
            <text:p text:style-name="P7"><text:s text:c="8"/>return 0;</text:p>
            <text:p text:style-name="P7"><text:soft-page-break/>}</text:p>
          </table:table-cell>
        </table:table-row>
      </table:table>
      <text:p text:style-name="P21"><text:span text:style-name="T2">Ở đây, </text:span><text:span text:style-name="Source_20_Text"><text:span text:style-name="T2">val</text:span></text:span><text:span text:style-name="T2"> là tài nguyên dùng chung (shared resource) giữa luồng 1 và luồng 2. Nếu thiếu </text:span><text:span text:style-name="T3">nguyên ngữ đồng bộ (synchronization primitive)</text:span><text:span text:style-name="T2">, tình trạng tranh đua sẽ xảy ra khiến giá trị của nó bị cập nhật sai lệch.</text:span></text:p>
      <text:p text:style-name="P22"><text:span text:style-name="T2">Semaphore được khởi tạo với giá trị là 1 (</text:span><text:span text:style-name="Source_20_Text"><text:span text:style-name="T2">sem_init(&amp;sem, 0, 1)</text:span></text:span><text:span text:style-name="T2">), cho phép luồng đầu tiên (thực hiện lệnh </text:span><text:span text:style-name="Source_20_Text"><text:span text:style-name="T2">sem_wait</text:span></text:span><text:span text:style-name="T2"> để giảm giá trị semaphore xuống 0) tiến hành tăng giá trị của </text:span><text:span text:style-name="Source_20_Text"><text:span text:style-name="T2">val</text:span></text:span><text:span text:style-name="T2">. Luồng thứ hai chạy song song sẽ phải đợi cho đến khi giá trị semaphore không âm (thông qua lệnh </text:span><text:span text:style-name="Source_20_Text"><text:span text:style-name="T2">sem_post</text:span></text:span><text:span text:style-name="T2"> của luồng một). Kết quả là việc truy cập và cập nhật tài nguyên dùng chung được thực hiện một cách đồng bộ.</text:span></text:p>
      <text:h text:style-name="P1" text:outline-level="3">Mutex (Khóa loại trừ tương hỗ)</text:h>
      <text:p text:style-name="P13">Mutex là các đối tượng hạt nhân đơn giản đóng vai trò như các ổ khóa. Nó chỉ có hai trạng thái: 0 (mở khóa - unlocked) hoặc 1 (đã khóa - locked).</text:p>
      <text:list text:style-name="L3">
        <text:list-item>
          <text:p text:style-name="P10"><text:span text:style-name="T1">Quyền sở hữu (Ownership):</text:span> Mutex có khái niệm về quyền sở hữu. Trước khi vào <text:span text:style-name="T1">đoạn găng (critical section)</text:span> dùng chung bởi nhiều luồng, luồng đó cần phải chiếm được khóa (acquire lock). Chỉ luồng đang sở hữu khóa mới có quyền thực thi đoạn găng. Khi thoát ra, luồng đó sẽ giải phóng khóa, và các luồng đang chờ khác mới có cơ hội giành quyền sở hữu khóa.</text:p>
        </text:list-item>
        <text:list-item>
          <text:p text:style-name="P10"><text:span text:style-name="T1">Trạng thái (State):</text:span> Một luồng đang chờ Mutex sẽ rơi vào trạng thái ngủ (sleep), tức là <text:span text:style-name="T1">trạng thái bị chặn (blocked state)</text:span> mà không tiêu tốn chu kỳ xử lý của CPU.</text:p>
        </text:list-item>
        <text:list-item>
          <text:p text:style-name="P10"><text:span text:style-name="T1">Tính đệ quy (Recursiveness):</text:span> Mutex có tính chất đệ quy, nghĩa là cùng một luồng có thể chiếm giữ khóa nhiều lần một cách đệ quy (nếu loại Mutex đó hỗ trợ).</text:p>
        </text:list-item>
      </text:list>
      <text:h text:style-name="P4" text:outline-level="4">Mã nguồn ví dụ sử dụng Mutex làm nguyên ngữ đồng bộ:</text:h>
      <table:table table:name="Table2" table:style-name="Table2">
        <table:table-column table:style-name="Table2.A"/>
        <table:table-row>
          <table:table-cell table:style-name="Table2.A1" office:value-type="string">
            <text:p text:style-name="P5">#include &lt;iostream&gt;</text:p>
            <text:p text:style-name="P5">#include &lt;pthread.h&gt;</text:p>
            <text:p text:style-name="P5">#include &lt;mutex&gt;</text:p>
            <text:p text:style-name="P5"/>
            <text:p text:style-name="P5">using namespace std;</text:p>
            <text:p text:style-name="P5"/>
            <text:p text:style-name="P5">mutex mtx;</text:p>
            <text:p text:style-name="P5"/>
            <text:p text:style-name="P5">void* thrFunc(void *arg){</text:p>
            <text:p text:style-name="P5"><text:s text:c="4"/>int *val = (int*)arg;</text:p>
            <text:p text:style-name="P5"><text:s text:c="4"/>for(int i = 0; i &lt; 10000; i++){</text:p>
            <text:p text:style-name="P5"><text:s text:c="8"/>// Sử dụng lock_guard để tự động khóa và giải phóng khóa khi ra khỏi phạm vi (scope)</text:p>
            <text:p text:style-name="P5"><text:soft-page-break/><text:s text:c="8"/>// Điều này an toàn hơn việc gọi mtx.lock() và mtx.unlock() thủ công</text:p>
            <text:p text:style-name="P5"><text:s text:c="8"/>lock_guard&lt;mutex&gt; lock(mtx); </text:p>
            <text:p text:style-name="P5"><text:s text:c="8"/>(*val)++;</text:p>
            <text:p text:style-name="P5"><text:s text:c="4"/>}</text:p>
            <text:p text:style-name="P5"><text:s text:c="4"/>return NULL;</text:p>
            <text:p text:style-name="P5">}</text:p>
            <text:p text:style-name="P5"/>
            <text:p text:style-name="P5">int main(){</text:p>
            <text:p text:style-name="P5"><text:s text:c="4"/>pthread_t t1, t2;</text:p>
            <text:p text:style-name="P5"><text:s text:c="4"/>int val = 0;</text:p>
            <text:p text:style-name="P5"><text:s text:c="4"/>pthread_create(&amp;t1, NULL, thrFunc, (void*)&amp;val);</text:p>
            <text:p text:style-name="P5"><text:s text:c="4"/>pthread_create(&amp;t2, NULL, thrFunc, (void*)&amp;val);</text:p>
            <text:p text:style-name="P5"><text:s text:c="4"/>pthread_join(t1, NULL);</text:p>
            <text:p text:style-name="P5"><text:s text:c="4"/>pthread_join(t2, NULL);</text:p>
            <text:p text:style-name="P5"><text:s text:c="4"/>cout &lt;&lt; "Giá trị cuối cùng: " &lt;&lt; val &lt;&lt; "\n";</text:p>
            <text:p text:style-name="P5"><text:s text:c="4"/>return 0;</text:p>
            <text:p text:style-name="P5">}</text:p>
          </table:table-cell>
        </table:table-row>
      </table:table>
      <text:p text:style-name="P11"><text:span text:style-name="T1">Lưu ý:</text:span> Mutex thường không được dùng để báo hiệu (signalling). Chúng chỉ bảo vệ tài nguyên dùng chung bằng cách cho phép hoặc ngăn chặn truy cập, chứ không thông báo khi một sự kiện hoàn thành. Đối với các tình huống cần thông báo sự kiện, <text:span text:style-name="T1">Biến điều kiện (Condition Variables)</text:span> sẽ được sử dụng kết hợp với Mutex.</text:p>
      <text:h text:style-name="P1" text:outline-level="3">Biến điều kiện (Condition Variables)</text:h>
      <text:p text:style-name="P12">Biến điều kiện cho phép một luồng tạm dừng thực thi (chờ) cho đến khi một sự kiện cụ thể (được bảo vệ bởi Mutex) hoàn thành.</text:p>
      <text:list text:style-name="L4">
        <text:list-item>
          <text:p text:style-name="P17"><text:span text:style-name="T2">Khi lệnh </text:span><text:span text:style-name="Source_20_Text"><text:span text:style-name="T2">wait</text:span></text:span><text:span text:style-name="T2"> trên biến điều kiện được gọi: nó giải phóng Mutex đang giữ, đưa luồng vào trạng thái ngủ. Luồng sẽ thức dậy khi gặp hiện tượng </text:span><text:span text:style-name="T3">thức tỉnh giả (spurious wake)</text:span><text:span text:style-name="T2"> hoặc khi sự kiện mà nó đang chờ xảy ra. Sau khi thức dậy, nó sẽ giành lại Mutex và tiếp tục thực thi.</text:span></text:p>
        </text:list-item>
      </text:list>
      <text:h text:style-name="P4" text:outline-level="4">Mã nguồn ví dụ về mô hình Producer-Consumer (Người sản xuất - Người tiêu dùng):</text:h>
      <table:table table:name="Table3" table:style-name="Table3">
        <table:table-column table:style-name="Table3.A"/>
        <table:table-row>
          <table:table-cell table:style-name="Table3.A1" office:value-type="string">
            <text:p text:style-name="P5">#include &lt;iostream&gt;</text:p>
            <text:p text:style-name="P5">#include &lt;pthread.h&gt;</text:p>
            <text:p text:style-name="P5">#include &lt;mutex&gt;</text:p>
            <text:p text:style-name="P5"><text:soft-page-break/></text:p>
            <text:p text:style-name="P5">using namespace std;</text:p>
            <text:p text:style-name="P5"/>
            <text:p text:style-name="P5">pthread_mutex_t mtx;</text:p>
            <text:p text:style-name="P5">pthread_cond_t cv;</text:p>
            <text:p text:style-name="P5"/>
            <text:p text:style-name="P5">int value = 0;</text:p>
            <text:p text:style-name="P5"/>
            <text:p text:style-name="P5">void* producer(void *arg){</text:p>
            <text:p text:style-name="P5"><text:s text:c="4"/>int *valInc = (int*)arg;</text:p>
            <text:p text:style-name="P5"><text:s text:c="4"/>pthread_mutex_lock(&amp;mtx);</text:p>
            <text:p text:style-name="P5"><text:s text:c="4"/>value += *valInc;</text:p>
            <text:p text:style-name="P5"><text:s text:c="4"/>cout &lt;&lt; "Sản xuất: Giá trị tăng lên thành: " &lt;&lt; value &lt;&lt; "\n";</text:p>
            <text:p text:style-name="P5"><text:s text:c="4"/>pthread_mutex_unlock(&amp;mtx);</text:p>
            <text:p text:style-name="P5"><text:s text:c="4"/></text:p>
            <text:p text:style-name="P5"><text:s text:c="4"/>// Thông báo cho tất cả các luồng đang chờ trên biến điều kiện</text:p>
            <text:p text:style-name="P5"><text:s text:c="4"/>pthread_cond_broadcast(&amp;cv);</text:p>
            <text:p text:style-name="P5"><text:s text:c="4"/>return NULL;</text:p>
            <text:p text:style-name="P5">}</text:p>
            <text:p text:style-name="P5"/>
            <text:p text:style-name="P5">void* consumer(void *arg){</text:p>
            <text:p text:style-name="P5"><text:s text:c="4"/>int *valDec = (int*)arg;</text:p>
            <text:p text:style-name="P5"><text:s text:c="4"/>pthread_mutex_lock(&amp;mtx);</text:p>
            <text:p text:style-name="P5"><text:s text:c="4"/></text:p>
            <text:p text:style-name="P5"><text:s text:c="4"/>// Luôn sử dụng vòng lặp while để kiểm tra điều kiện nhằm tránh "thức tỉnh giả"</text:p>
            <text:p text:style-name="P5"><text:s text:c="4"/>while(value &lt; <text:span text:style-name="T7">10</text:span>){</text:p>
            <text:p text:style-name="P5"><text:s text:c="8"/>pthread_cond_wait(&amp;cv, &amp;mtx);</text:p>
            <text:p text:style-name="P5"><text:s text:c="4"/>}</text:p>
            <text:p text:style-name="P5"><text:s text:c="4"/></text:p>
            <text:p text:style-name="P5"><text:s text:c="4"/>if(value &gt;= *valDec){</text:p>
            <text:p text:style-name="P5"><text:soft-page-break/><text:s text:c="8"/>value -= *valDec;</text:p>
            <text:p text:style-name="P5"><text:s text:c="8"/>cout &lt;&lt; "Tiêu dùng: Giá trị giảm xuống còn: " &lt;&lt; value &lt;&lt; "\n";</text:p>
            <text:p text:style-name="P5"><text:s text:c="4"/>} else {</text:p>
            <text:p text:style-name="P5"><text:s text:c="8"/>cout &lt;&lt; "Không thể trừ giá trị: Số lượng hiện có không đủ.\n";</text:p>
            <text:p text:style-name="P5"><text:s text:c="4"/>}</text:p>
            <text:p text:style-name="P5"><text:s text:c="4"/></text:p>
            <text:p text:style-name="P5"><text:s text:c="4"/>pthread_mutex_unlock(&amp;mtx);</text:p>
            <text:p text:style-name="P5"><text:s text:c="4"/>return NULL;</text:p>
            <text:p text:style-name="P5">}</text:p>
            <text:p text:style-name="P5"/>
            <text:p text:style-name="P5">int main(){</text:p>
            <text:p text:style-name="P5"><text:s text:c="4"/>pthread_mutex_init(&amp;mtx, NULL);</text:p>
            <text:p text:style-name="P5"><text:s text:c="4"/>pthread_cond_init(&amp;cv, NULL);</text:p>
            <text:p text:style-name="P5"><text:s text:c="4"/></text:p>
            <text:p text:style-name="P5"><text:s text:c="4"/>pthread_t t1, t2;</text:p>
            <text:p text:style-name="P5"><text:s text:c="4"/>int consume = 10;</text:p>
            <text:p text:style-name="P5"><text:s text:c="4"/>int increment = 100;</text:p>
            <text:p text:style-name="P5"><text:s text:c="4"/></text:p>
            <text:p text:style-name="P5"><text:s text:c="4"/>pthread_create(&amp;t1, NULL, &amp;consumer, (void*)&amp;consume);</text:p>
            <text:p text:style-name="P5"><text:s text:c="4"/>pthread_create(&amp;t2, NULL, &amp;producer, (void*)&amp;increment);</text:p>
            <text:p text:style-name="P5"><text:s text:c="4"/></text:p>
            <text:p text:style-name="P5"><text:s text:c="4"/>pthread_join(t1, NULL);</text:p>
            <text:p text:style-name="P5"><text:s text:c="4"/>pthread_join(t2, NULL);</text:p>
            <text:p text:style-name="P5"><text:s text:c="17"/></text:p>
            <text:p text:style-name="P5"><text:s text:c="4"/>return 0;</text:p>
            <text:p text:style-name="P5">}</text:p>
          </table:table-cell>
        </table:table-row>
      </table:table>
      <text:p text:style-name="P11"><text:span text:style-name="T1">Lưu ý về Thức tỉnh giả (Spurious Wakeups):</text:span> Hiện tượng này xảy ra khi một luồng thức dậy từ trạng thái chờ của biến điều kiện nhưng nhận thấy điều kiện cần thiết vẫn chưa được đáp ứng <text:span text:style-name="T6">(value = 0)</text:span>. Điều này thường xảy ra trong hệ thống có nhiều luồng cùng chờ một sự kiện: một luồng khác có thể đã nhanh chân xử lý và thay đổi trạng thái ngay sau khi tín hiệu được phát ra.</text:p>
      <text:p text:style-name="P20"><text:soft-page-break/><text:span text:style-name="T2">Để tránh xử lý sai khi gặp thức tỉnh giả, lệnh </text:span><text:span text:style-name="Source_20_Text"><text:span text:style-name="T2">wait</text:span></text:span><text:span text:style-name="T2"> của biến điều kiện luôn phải được đặt trong một vòng lặp </text:span><text:span text:style-name="Source_20_Text"><text:span text:style-name="T2">while</text:span></text:span><text:span text:style-name="T2"> để kiểm tra lại điều kiện, thay vì chỉ dùng câu lệnh </text:span><text:span text:style-name="Source_20_Text"><text:span text:style-name="T2">if</text:span></text:span><text:span text:style-name="T2"> đơn giản.</text:span></text:p>
      <text:h text:style-name="P2" text:outline-level="3">Spinlock (Khóa quay)</text:h>
      <text:p text:style-name="P12"><text:span text:style-name="T1">Spinlock</text:span> là loại khóa bảo vệ đoạn găng (critical section) bằng cách đưa các luồng đang cố gắng chiếm giữ khóa vào trạng thái <text:span text:style-name="T1">chờ bận (busy wait)</text:span>. Các luồng đang chờ này sẽ "xoay" tại chỗ, nghĩa là chúng liên tục tiêu thụ chu kỳ CPU thay vì chuyển sang trạng thái bị chặn (blocked) hoặc ngủ (sleep) như Mutex.</text:p>
      <text:p text:style-name="P12">Loại khóa này thực sự cần thiết trong các trường hợp sau:</text:p>
      <text:list text:style-name="L10">
        <text:list-item>
          <text:p text:style-name="P16">Critical section rất ngắn: <text:span text:style-name="T8">ví dụ x+</text:span><text:span text:style-name="T9">+, nếu sleep thì còn tốn hơn spin.</text:span></text:p>
        </text:list-item>
      </text:list>
      <text:list text:style-name="L9">
        <text:list-item>
          <text:p text:style-name="P14"><text:span text:style-name="T1">Chi phí ngữ cảnh thấp:</text:span> Khi chi phí để bộ điều phối (scheduler) đưa một tiến trình vào trạng thái ngủ và đánh thức nó dậy lớn hơn chi phí của vài chu kỳ xử lý mà spinlock dự kiến sẽ kéo dài.</text:p>
        </text:list-item>
        <text:list-item>
          <text:p text:style-name="P14"><text:span text:style-name="T1">Trình xử lý ngắt (Interrupt handlers):</text:span> Các trình xử lý ngắt cần các nguyên ngữ đồng bộ nhưng chúng không thể bị lập lịch lại (rescheduled) trong Linux. Vì các trình xử lý ngắt không thể ngủ, spinlock giúp chúng duy trì trạng thái hoạt động mà không phải đi ngủ trong khi đang cạnh tranh tài nguyên.</text:p>
        </text:list-item>
      </text:list>
      <text:p text:style-name="P12"><text:span text:style-name="T1">Tính đệ quy:</text:span> Spinlock <text:span text:style-name="T1">không</text:span> có tính đệ quy. Mọi nỗ lực chiếm giữ lại một spinlock đã sở hữu bởi chính luồng đó sẽ dẫn đến tình trạng <text:span text:style-name="T1">deadlock (khóa chết)</text:span>.</text:p>
      <text:h text:style-name="P1" text:outline-level="3">Cơ chế CAS (Compare and Set) và TAS (Test and Set)</text:h>
      <text:p text:style-name="P12">Một vấn đề quan trọng khi triển khai các loại khóa (trong nhân hệ điều hành) là bản thân việc cập nhật giá trị của khóa cũng phải có tính <text:span text:style-name="T1">nguyên tử (atomic)</text:span> để tránh tình trạng tranh đua. Điều này được thực hiện thông qua cơ chế CAS và TAS.</text:p>
      <text:h text:style-name="P4" text:outline-level="4">Compare and Set (So sánh và Thiết lập)</text:h>
      <table:table table:name="Table4" table:style-name="Table4">
        <table:table-column table:style-name="Table4.A"/>
        <table:table-row>
          <table:table-cell table:style-name="Table4.A1" office:value-type="string">
            <text:p text:style-name="P5">cas(int *p, int old, int new){</text:p>
            <text:p text:style-name="P5"><text:s text:c="3"/>if (*p != old)</text:p>
            <text:p text:style-name="P5"><text:s text:c="5"/>return false;</text:p>
            <text:p text:style-name="P5"><text:s text:c="3"/>*p = new;</text:p>
            <text:p text:style-name="P5"><text:s text:c="3"/>return true;</text:p>
            <text:p text:style-name="P5">}</text:p>
          </table:table-cell>
        </table:table-row>
      </table:table>
      <text:p text:style-name="P21"><text:span text:style-name="T3">Triển khai Mutex với CAS:</text:span><text:span text:style-name="T2"> </text:span><text:span text:style-name="Source_20_Text"><text:span text:style-name="T2">while(!CAS(mutex, 0, 1)); // chờ trong khi mutex = 1</text:span></text:span></text:p>
      <text:list text:style-name="L6">
        <text:list-item>
          <text:p text:style-name="P18"><text:span text:style-name="T2">Nếu giá trị mutex là </text:span><text:span text:style-name="Source_20_Text"><text:span text:style-name="T2">0</text:span></text:span><text:span text:style-name="T2">, nghĩa là nó chưa bị chiếm giữ. Hàm CAS sẽ thiết lập giá trị mutex thành </text:span><text:span text:style-name="Source_20_Text"><text:span text:style-name="T2">1</text:span></text:span><text:span text:style-name="T2"> một cách nguyên tử và trả về </text:span><text:span text:style-name="Source_20_Text"><text:span text:style-name="T2">true</text:span></text:span><text:span text:style-name="T2">.</text:span></text:p>
        </text:list-item>
        <text:list-item>
          <text:p text:style-name="P18"><text:span text:style-name="T2">Nếu giá trị là </text:span><text:span text:style-name="Source_20_Text"><text:span text:style-name="T2">1</text:span></text:span><text:span text:style-name="T2">, mutex không thể được chiếm giữ ngay lúc này; vòng lặp sẽ tiếp tục cho đến khi giá trị trở về </text:span><text:span text:style-name="Source_20_Text"><text:span text:style-name="T2">0</text:span></text:span><text:span text:style-name="T2">.</text:span></text:p>
        </text:list-item>
      </text:list>
      <text:p text:style-name="P12">Tương tự, <text:span text:style-name="T1">Test and Set (Kiểm tra và Thiết lập)</text:span> cũng có thể được sử dụng:</text:p>
      <table:table table:name="Table5" table:style-name="Table5">
        <table:table-column table:style-name="Table5.A"/>
        <text:soft-page-break/>
        <table:table-row>
          <table:table-cell table:style-name="Table5.A1" office:value-type="string">
            <text:p text:style-name="P5">tas(int *lock){</text:p>
            <text:p text:style-name="P5"><text:s text:c="3"/>oldValue = *lock;</text:p>
            <text:p text:style-name="P5"><text:s text:c="3"/>*lock = true;</text:p>
            <text:p text:style-name="P5"><text:s text:c="3"/>return oldValue;</text:p>
            <text:p text:style-name="P5">}</text:p>
          </table:table-cell>
        </table:table-row>
      </table:table>
      <text:h text:style-name="P2" text:outline-level="3">Tình trạng Deadlock (Khóa chết)</text:h>
      <text:p text:style-name="P12">Mặc dù các nguyên ngữ đồng bộ là các đối tượng hạt nhân được thiết kế để cập nhật nguyên tử một cách an toàn, nhưng cách sử dụng chúng hoàn toàn phụ thuộc vào lập trình viên. Những cách sử dụng sai lầm sau đây có thể dẫn đến deadlock:</text:p>
      <text:h text:style-name="P4" text:outline-level="4">1. Sai thứ tự chiếm giữ (Wrong order)</text:h>
      <text:p text:style-name="P12">Trong một tiến trình đa luồng, nếu các mutex được chiếm giữ theo thứ tự ngược lại với thứ tự chúng được giải phóng (hoặc ngược thứ tự giữa các luồng khác nhau), hệ thống sẽ rơi vào deadlock. Điều này tạo ra một <text:span text:style-name="T1">sự phụ thuộc vòng quanh (circular dependency)</text:span>, khiến các luồng chờ đợi lẫn nhau giải phóng khóa và không bao giờ kết thúc.</text:p>
      <text:h text:style-name="P4" text:outline-level="4">2. Lệnh Fork và các nguyên ngữ đồng bộ</text:h>
      <text:p text:style-name="P12">Mutex có khái niệm về quyền sở hữu, nghĩa là chỉ luồng đã chiếm giữ mutex mới có thể giải phóng nó.</text:p>
      <text:p text:style-name="P20"><text:span text:style-name="T2">Xét tình huống: Một luồng trong tiến trình đa luồng chiếm giữ một mutex, và song song đó, một luồng khác thực hiện lệnh </text:span><text:span text:style-name="Source_20_Text"><text:span text:style-name="T2">fork</text:span></text:span><text:span text:style-name="T2">. Khi </text:span><text:span text:style-name="Source_20_Text"><text:span text:style-name="T2">fork</text:span></text:span><text:span text:style-name="T2"> một tiến trình đa luồng, tiến trình con </text:span><text:span text:style-name="T3">chỉ kế thừa duy nhất luồng đã gọi lệnh fork</text:span><text:span text:style-name="T2">. Do đó, tiến trình con không kế thừa quyền sở hữu mutex mà luồng kia đang giữ. Nếu tiến trình con có một đoạn mã cần chiếm giữ khóa đó, nó sẽ bị treo vĩnh viễn (deadlock) vì không có ai giải phóng khóa đó trong tiến trình con.</text:span></text:p>
      <text:p text:style-name="P15">Các biện pháp giảm thiểu:</text:p>
      <text:list text:style-name="L7">
        <text:list-item>
          <text:p text:style-name="P19"><text:span text:style-name="T2">Luôn gọi </text:span><text:span text:style-name="Source_20_Text"><text:span text:style-name="T2">exec()</text:span></text:span><text:span text:style-name="T2"> ngay sau khi </text:span><text:span text:style-name="Source_20_Text"><text:span text:style-name="T2">fork</text:span></text:span><text:span text:style-name="T2"> trong tiến trình con để thay thế không gian bộ nhớ.</text:span></text:p>
        </text:list-item>
        <text:list-item>
          <text:p text:style-name="P19"><text:span text:style-name="T2">Sử dụng </text:span><text:span text:style-name="Source_20_Text"><text:span text:style-name="T2">pthread_atfork</text:span></text:span><text:span text:style-name="T2">: Thư viện pthread cung cấp hàm này để đăng ký các trình xử lý (handlers) được gọi trước và sau khi </text:span><text:span text:style-name="Source_20_Text"><text:span text:style-name="T2">fork</text:span></text:span><text:span text:style-name="T2"> (ở cả tiến trình cha và con). Bạn có thể dùng chúng để xác định và giải phóng các mutex trước khi quá trình fork diễn ra.</text:span></text:p>
        </text:list-item>
      </text:lis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vi" fo:country="V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vi" fo:country="V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1T15:41:48.826322692</meta:creation-date>
    <dc:date>2026-04-13T01:32:50.603730788</dc:date>
    <meta:editing-duration>PT2H42M17S</meta:editing-duration>
    <meta:editing-cycles>15</meta:editing-cycles>
    <meta:generator>LibreOffice/24.2.7.2$Linux_X86_64 LibreOffice_project/420$Build-2</meta:generator>
    <meta:document-statistic meta:table-count="5" meta:image-count="0" meta:object-count="0" meta:page-count="8" meta:paragraph-count="169" meta:word-count="2382" meta:character-count="12448" meta:non-whitespace-character-count="9801"/>
  </office:meta>
</office:document-meta>
</file>