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5pt solid #000000"/>
    </style:style>
    <style:style style:name="P1" style:family="paragraph" style:parent-style-name="Preformatted_20_Text">
      <style:text-properties style:font-name="Liberation Serif" fo:font-size="13pt" style:font-size-asian="13pt" style:font-size-complex="13pt"/>
    </style:style>
    <style:style style:name="P2" style:family="paragraph" style:parent-style-name="Preformatted_20_Text">
      <style:text-properties style:font-name="Liberation Serif" fo:font-size="13pt" officeooo:paragraph-rsid="001c9386" style:font-size-asian="13pt" style:font-size-complex="13pt"/>
    </style:style>
    <style:style style:name="P3" style:family="paragraph" style:parent-style-name="Preformatted_20_Text">
      <style:text-properties style:font-name="Liberation Serif" fo:font-size="13pt" fo:font-weight="bold" style:font-size-asian="13pt" style:font-weight-asian="bold" style:font-size-complex="13pt" style:font-weight-complex="bold"/>
    </style:style>
    <style:style style:name="P4" style:family="paragraph" style:parent-style-name="Preformatted_20_Text">
      <style:text-properties style:font-name="Liberation Serif" fo:font-size="13pt" fo:font-weight="bold" style:font-size-asian="13pt" style:font-weight-asian="bold" style:font-size-complex="13pt" style:font-weight-complex="bold"/>
    </style:style>
    <style:style style:name="P5" style:family="paragraph" style:parent-style-name="Preformatted_20_Text">
      <style:text-properties style:font-name="Liberation Serif" fo:font-size="13pt" style:font-size-asian="13pt" style:font-size-complex="13pt"/>
    </style:style>
    <style:style style:name="P6" style:family="paragraph" style:parent-style-name="Table_20_Contents">
      <style:text-properties style:font-name="Liberation Serif" fo:font-size="13pt" style:font-name-asian="Noto Sans Mono CJK SC" style:font-size-asian="13pt" style:font-name-complex="Liberation Mono" style:font-size-complex="13pt"/>
    </style:style>
    <style:style style:name="T1" style:family="text">
      <style:text-properties officeooo:rsid="001fad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Khái niệm tương tranh dữ liệu (Data Race) và mất đồng bộ</text:p>
      <text:p text:style-name="P1">- Tương tranh dữ liệu (Data Race)</text:p>
      <text:p text:style-name="P1">Xảy ra khi:</text:p>
      <text:p text:style-name="P1">Hai hoặc nhiều tiến trình/luồng truy cập cùng một vùng nhớ chia sẻ, trong đó ít nhất một thao tác là ghi, và không có cơ chế đồng bộ bảo vệ.</text:p>
      <text:p text:style-name="P1">Hậu quả:</text:p>
      <text:p text:style-name="P1"><text:s text:c="4"/>• Kết quả không xác định</text:p>
      <text:p text:style-name="P1"><text:s text:c="4"/>• Dữ liệu bị sai</text:p>
      <text:p text:style-name="P1"><text:s text:c="4"/>• Lỗi khó tái hiện</text:p>
      <text:p text:style-name="P1">Ví dụ logic:</text:p>
      <text:p text:style-name="P1">x = x + 1;</text:p>
      <text:p text:style-name="P1">Thực chất gồm:</text:p>
      <text:p text:style-name="P1"><text:s text:c="4"/>1. load x</text:p>
      <text:p text:style-name="P1"><text:s text:c="4"/>2. add 1</text:p>
      <text:p text:style-name="P1"><text:s text:c="4"/>3. store x</text:p>
      <text:p text:style-name="P1">Nếu hai thread thực hiện đồng thời → giá trị sai.</text:p>
      <table:table table:name="Table1" table:style-name="Table1">
        <table:table-column table:style-name="Table1.A"/>
        <table:table-row>
          <table:table-cell table:style-name="Table1.A1" office:value-type="string">
            <text:p text:style-name="P2">#include &lt;pthread.h&gt;</text:p>
            <text:p text:style-name="P2">#include &lt;stdio.h&gt;</text:p>
            <text:p text:style-name="P2"/>
            <text:p text:style-name="P2">pthread_t tid[2];</text:p>
            <text:p text:style-name="P2">int counter;</text:p>
            <text:p text:style-name="P2"/>
            <text:p text:style-name="P2">void* trythis(void* arg) {</text:p>
            <text:p text:style-name="P2"><text:s text:c="4"/>counter += 1;</text:p>
            <text:p text:style-name="P2"><text:s text:c="4"/>printf("Job %d started\n", counter);</text:p>
            <text:p text:style-name="P2"><text:s text:c="4"/>for (unsigned long i = 0; i &lt; 0xFFFFFFFF; i++);</text:p>
            <text:p text:style-name="P2"><text:s text:c="4"/>printf("Job %d finished\n", counter);</text:p>
            <text:p text:style-name="P2"><text:s text:c="4"/>return NULL;</text:p>
            <text:p text:style-name="P2">}</text:p>
            <text:p text:style-name="P2"/>
            <text:p text:style-name="P2">int main() {</text:p>
            <text:p text:style-name="P2"><text:s text:c="4"/>for (int i = 0; i &lt; 2; i++)</text:p>
            <text:p text:style-name="P2"><text:s text:c="8"/>pthread_create(&amp;tid[i], NULL, trythis, NULL);</text:p>
            <text:p text:style-name="P2"><text:s text:c="4"/>pthread_join(tid[0], NULL);</text:p>
            <text:p text:style-name="P2"><text:s text:c="4"/>pthread_join(tid[1], NULL);</text:p>
            <text:p text:style-name="P2"><text:s text:c="4"/>return 0;</text:p>
            <text:p text:style-name="P2">}</text:p>
          </table:table-cell>
        </table:table-row>
      </table:table>
      <text:p text:style-name="P1">- Mất đồng bộ giữa các tiến trình</text:p>
      <text:p text:style-name="P1">Là tình trạng:</text:p>
      <text:p text:style-name="P1"><text:s text:c="4"/>• Thứ tự thực thi không được kiểm soát</text:p>
      <text:p text:style-name="P1"><text:s text:c="4"/>• Một tiến trình đọc dữ liệu khi tiến trình khác chưa ghi xong</text:p>
      <text:p text:style-name="P1"><text:s text:c="4"/>• Vi phạm tính nhất quán (consistency)</text:p>
      <text:p text:style-name="P1">Trong kernel, điều này đặc biệt nguy hiểm vì có thể làm hỏng cấu trúc dữ liệu nội bộ.</text:p>
      <text:p text:style-name="P3">2️. Xử lý xung đột và đồng bộ</text:p>
      <text:p text:style-name="P1">Theo sách, Linux dùng nhiều cơ chế để đảm bảo:</text:p>
      <text:p text:style-name="P1"><text:s text:c="4"/>• Mutual exclusion (loại trừ tương hỗ)</text:p>
      <text:p text:style-name="P1"><text:s text:c="4"/>• Ordering (thứ tự thực thi)</text:p>
      <text:p text:style-name="P1"><text:s text:c="4"/>• Atomicity (tính nguyên tử)</text:p>
      <text:p text:style-name="P1"><text:soft-page-break/>Các nhóm cơ chế:</text:p>
      <text:p text:style-name="P1"><text:s text:c="4"/>1. Spinlocks</text:p>
      <text:p text:style-name="P1"><text:s text:c="4"/>2. Semaphores</text:p>
      <text:p text:style-name="P1"><text:s text:c="4"/>3. Read-Write locks</text:p>
      <text:p text:style-name="P1"><text:s text:c="4"/>4. Atomic operations</text:p>
      <text:p text:style-name="P1"><text:s text:c="4"/>5. Disabling interrupts (trong kernel)</text:p>
      <text:p text:style-name="P1">Ở mức user-space thì dùng pthread primitives.</text:p>
      <text:p text:style-name="P3">3️. Mutex</text:p>
      <text:p text:style-name="P1">- Khái niệm</text:p>
      <text:p text:style-name="P1">Mutex (Mutual Exclusion) là: Cơ chế đảm bảo chỉ một thread/process được vào vùng tới hạn tại một thời điểm.</text:p>
      <text:p text:style-name="P1">- Trong kernel</text:p>
      <text:p text:style-name="P1">Linux dùng:</text:p>
      <text:p text:style-name="P1"><text:s text:c="4"/>• spinlock (cho đoạn ngắn, không sleep)</text:p>
      <text:p text:style-name="P1"><text:s text:c="4"/>• semaphore (cho đoạn có thể sleep)</text:p>
      <text:p text:style-name="P1">- Trong user-level (POSIX)</text:p>
      <text:p text:style-name="P1">Thư viện:</text:p>
      <table:table table:name="Table2" table:style-name="Table2">
        <table:table-column table:style-name="Table2.A"/>
        <table:table-row>
          <table:table-cell table:style-name="Table2.A1" office:value-type="string">
            <text:p text:style-name="P2">#include &lt;pthread.h&gt;</text:p>
            <text:p text:style-name="P2">Hàm cơ bản:</text:p>
            <text:p text:style-name="P2">pthread_mutex_init()</text:p>
            <text:p text:style-name="P2">pthread_mutex_lock()</text:p>
            <text:p text:style-name="P2">pthread_mutex_unlock()</text:p>
            <text:p text:style-name="P2">pthread_mutex_destroy()</text:p>
          </table:table-cell>
        </table:table-row>
      </table:table>
      <text:p text:style-name="P1">Ví dụ:</text:p>
      <table:table table:name="Table3" table:style-name="Table3">
        <table:table-column table:style-name="Table3.A"/>
        <table:table-row>
          <table:table-cell table:style-name="Table3.A1" office:value-type="string">
            <text:p text:style-name="P2">pthread_mutex_lock(&amp;lock);</text:p>
            <text:p text:style-name="P2">/* critical section */</text:p>
            <text:p text:style-name="P2">pthread_mutex_unlock(&amp;lock);</text:p>
          </table:table-cell>
        </table:table-row>
      </table:table>
      <text:p text:style-name="P3">4️. Semaphore</text:p>
      <text:p text:style-name="P1">- Khái niệm</text:p>
      <text:p text:style-name="P1">Semaphore là: Biến đếm dùng để kiểm soát truy cập vào tài nguyên chia sẻ.</text:p>
      <text:p text:style-name="P1">Có hai loại:</text:p>
      <text:p text:style-name="P1"><text:s text:c="4"/>1. Binary semaphore (giống mutex)</text:p>
      <text:p text:style-name="P1"><text:s text:c="4"/>2. Counting semaphore</text:p>
      <text:p text:style-name="P1">- Trong Linux kernel</text:p>
      <text:p text:style-name="P1">Semaphore được cài đặt trong:</text:p>
      <text:p text:style-name="P1"><text:s text:c="4"/>• struct semaphore</text:p>
      <text:p text:style-name="P1"><text:s text:c="4"/>• Cho phép process sleep khi không lấy được semaphore</text:p>
      <text:p text:style-name="P1">- Trong POSIX</text:p>
      <text:p text:style-name="P1">#include &lt;semaphore.h&gt;</text:p>
      <text:p text:style-name="P1">Hàm cơ bản:</text:p>
      <table:table table:name="Table4" table:style-name="Table4">
        <table:table-column table:style-name="Table4.A"/>
        <table:table-row>
          <table:table-cell table:style-name="Table4.A1" office:value-type="string">
            <text:p text:style-name="P2">sem_init()</text:p>
            <text:p text:style-name="P2">sem_wait()</text:p>
            <text:p text:style-name="P2">sem_post()</text:p>
            <text:p text:style-name="P2">sem_destroy()</text:p>
          </table:table-cell>
        </table:table-row>
      </table:table>
      <text:p text:style-name="P3">5️. Condition Variable</text:p>
      <text:p text:style-name="P1">- Khái niệm</text:p>
      <text:p text:style-name="P1">Condition variable dùng để:</text:p>
      <text:p text:style-name="P1"><text:soft-page-break/>Cho phép thread chờ một điều kiện xảy ra.</text:p>
      <text:p text:style-name="P1">Nó luôn đi kèm với mutex.</text:p>
      <text:p text:style-name="P1">- Hàm cơ bản (POSIX)</text:p>
      <table:table table:name="Table5" table:style-name="Table5">
        <table:table-column table:style-name="Table5.A"/>
        <table:table-row>
          <table:table-cell table:style-name="Table5.A1" office:value-type="string">
            <text:p text:style-name="P2">pthread_cond_init()</text:p>
            <text:p text:style-name="P2">pthread_cond_wait()</text:p>
            <text:p text:style-name="P2">pthread_cond_signal()</text:p>
            <text:p text:style-name="P2">pthread_cond_broadcast()</text:p>
            <text:p text:style-name="P2">pthread_cond_destroy()</text:p>
          </table:table-cell>
        </table:table-row>
      </table:table>
      <text:p text:style-name="P1">Ví dụ:</text:p>
      <table:table table:name="Table6" table:style-name="Table6">
        <table:table-column table:style-name="Table6.A"/>
        <table:table-row>
          <table:table-cell table:style-name="Table6.A1" office:value-type="string">
            <text:p text:style-name="P2">pthread_mutex_lock(&amp;lock);</text:p>
            <text:p text:style-name="P2">while (!condition)</text:p>
            <text:p text:style-name="P2"><text:s text:c="4"/>pthread_cond_wait(&amp;cond, &amp;lock);</text:p>
            <text:p text:style-name="P2">pthread_mutex_unlock(&amp;lock);</text:p>
          </table:table-cell>
        </table:table-row>
      </table:table>
      <text:p text:style-name="P1">pthread_cond_wait():</text:p>
      <text:p text:style-name="P1"><text:s text:c="4"/>• Tự động unlock mutex</text:p>
      <text:p text:style-name="P1"><text:s text:c="4"/>• Sleep</text:p>
      <text:p text:style-name="P1"><text:s text:c="4"/>• Khi được signal → lock lại mutex</text:p>
      <text:p text:style-name="P3">6️. Barrier</text:p>
      <text:p text:style-name="P1">- Khái niệm</text:p>
      <text:p text:style-name="P1">Barrier là: Cơ chế đồng bộ buộc tất cả thread phải chờ cho đến khi tất cả đều tới một điểm nhất định.</text:p>
      <text:p text:style-name="P1">Ứng dụng:</text:p>
      <text:p text:style-name="P1"><text:s text:c="4"/>• Song song hóa theo pha</text:p>
      <text:p text:style-name="P1">- POSIX barrier</text:p>
      <table:table table:name="Table7" table:style-name="Table7">
        <table:table-column table:style-name="Table7.A"/>
        <table:table-row>
          <table:table-cell table:style-name="Table7.A1" office:value-type="string">
            <text:p text:style-name="P2">pthread_barrier_init()</text:p>
            <text:p text:style-name="P2">pthread_barrier_wait() // chờ khi nào đủ tất cả các thread rồi mới thực hiện, nếu không thread sẽ sleep</text:p>
            <text:p text:style-name="P2">pthread_barrier_destroy()</text:p>
          </table:table-cell>
        </table:table-row>
      </table:table>
      <text:p text:style-name="P1"/>
      <text:p text:style-name="P1">- Ví dụ:</text:p>
      <text:p text:style-name="Text_20_body">Một trang trại thông minh có nhiều cảm biến (nhiệt độ, độ ẩm, độ ẩm của đất). Mỗi luồng đọc dữ liệu từ một cảm biến. Sau khi tất cả các cảm biến báo cáo, hệ thống hợp nhất dữ liệu để đưa ra quyết định tưới tiêu.</text:p>
      <table:table table:name="Table8" table:style-name="Table8">
        <table:table-column table:style-name="Table8.A"/>
        <table:table-row>
          <table:table-cell table:style-name="Table8.A1" office:value-type="string">
            <text:p text:style-name="P6">#include &lt;stdio.h&gt;</text:p>
            <text:p text:style-name="P6">#include &lt;stdlib.h&gt;</text:p>
            <text:p text:style-name="P6">#include &lt;pthread.h&gt;</text:p>
            <text:p text:style-name="P6">#include &lt;unistd.h&gt;</text:p>
            <text:p text:style-name="P6"/>
            <text:p text:style-name="P6">#define NUM_SENSORS 3</text:p>
            <text:p text:style-name="P6"/>
            <text:p text:style-name="P6">typedef struct {</text:p>
            <text:p text:style-name="P6"><text:s text:c="4"/>int id; <text:s text:c="2"/>// sensor id</text:p>
            <text:p text:style-name="P6">} SensorArg;</text:p>
            <text:p text:style-name="P6"/>
            <text:p text:style-name="P6">pthread_barrier_t barrier;</text:p>
            <text:p text:style-name="P6">int readings[NUM_SENSORS];</text:p>
            <text:p text:style-name="P6"><text:soft-page-break/></text:p>
            <text:p text:style-name="P6">void* sensor(void* arg) {</text:p>
            <text:p text:style-name="P6"><text:s text:c="4"/>SensorArg* a = (SensorArg*)arg;</text:p>
            <text:p text:style-name="P6"><text:s text:c="4"/>int id = a-&gt;id;</text:p>
            <text:p text:style-name="P6"/>
            <text:p text:style-name="P6"><text:s text:c="4"/>// Simulate variable reading time</text:p>
            <text:p text:style-name="P6"><text:s text:c="4"/>sleep(1 + id);</text:p>
            <text:p text:style-name="P6"/>
            <text:p text:style-name="P6"><text:s text:c="4"/>readings[id] = 20 + id * 5; <text:s/>// fake data - we could use rand here with</text:p>
            <text:p text:style-name="P6"><text:s text:c="32"/>// To get new random readings on each run.</text:p>
            <text:p text:style-name="P6"><text:s text:c="4"/>printf("Sensor %d reports %d C\n", id, readings[id]);</text:p>
            <text:p text:style-name="P6"/>
            <text:p text:style-name="P6"><text:s text:c="4"/>// Wait for all sensors to finish their reading</text:p>
            <text:p text:style-name="P6"><text:s text:c="4"/>pthread_barrier_wait(&amp;barrier);</text:p>
            <text:p text:style-name="P6"/>
            <text:p text:style-name="P6"><text:s text:c="4"/>// One thread (e.g., id 0) performs fusion/decision after the barrier</text:p>
            <text:p text:style-name="P6"><text:s text:c="4"/>if (id == 0) {</text:p>
            <text:p text:style-name="P6"><text:s text:c="8"/>int sum = 0;</text:p>
            <text:p text:style-name="P6"><text:s text:c="8"/>for (int i = 0; i &lt; NUM_SENSORS; i++) sum += readings[i];</text:p>
            <text:p text:style-name="P6"><text:s text:c="8"/>int avg = sum / NUM_SENSORS;</text:p>
            <text:p text:style-name="P6"><text:s text:c="8"/>printf("Fusion thread: average temp = %d C. Output: %s\n",</text:p>
            <text:p text:style-name="P6"><text:s text:c="15"/>avg, (avg &gt; 25 ? "ON" : "OFF"));</text:p>
            <text:p text:style-name="P6"><text:s text:c="4"/>}</text:p>
            <text:p text:style-name="P6"><text:s text:c="4"/>return NULL;</text:p>
            <text:p text:style-name="P6">}</text:p>
            <text:p text:style-name="P6"/>
            <text:p text:style-name="P6">int main(void) {</text:p>
            <text:p text:style-name="P6"><text:s text:c="4"/>pthread_t threads[NUM_SENSORS];</text:p>
            <text:p text:style-name="P6"><text:s text:c="4"/>SensorArg args[NUM_SENSORS];</text:p>
            <text:p text:style-name="P6"/>
            <text:p text:style-name="P6"><text:s text:c="4"/>pthread_barrier_init(&amp;barrier, NULL, NUM_SENSORS);</text:p>
            <text:p text:style-name="P6"/>
            <text:p text:style-name="P6"/>
            <text:p text:style-name="P6"><text:s text:c="4"/>for (int i = 0; i &lt; NUM_SENSORS; i++) {</text:p>
            <text:p text:style-name="P6"><text:s text:c="8"/>args[i].id = i;</text:p>
            <text:p text:style-name="P6"><text:s text:c="8"/>pthread_create(&amp;threads[i], NULL, sensor, &amp;args[i]);</text:p>
            <text:p text:style-name="P6"><text:s text:c="4"/>}</text:p>
            <text:p text:style-name="P6"/>
            <text:p text:style-name="P6"><text:s text:c="4"/>for (int i = 0; i &lt; NUM_SENSORS; i++) {</text:p>
            <text:p text:style-name="P6"><text:s text:c="8"/>pthread_join(threads[i], NULL);</text:p>
            <text:p text:style-name="P6"><text:s text:c="4"/>}</text:p>
            <text:p text:style-name="P6"/>
            <text:p text:style-name="P6"><text:s text:c="4"/>pthread_barrier_destroy(&amp;barrier);</text:p>
            <text:p text:style-name="P6"><text:s text:c="4"/>return 0;</text:p>
            <text:p text:style-name="P6">}</text:p>
          </table:table-cell>
        </table:table-row>
      </table:table>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4-19T00:41:53.974719507</dc:date>
    <meta:editing-duration>PT24M28S</meta:editing-duration>
    <meta:editing-cycles>13</meta:editing-cycles>
    <meta:generator>LibreOffice/24.2.7.2$Linux_X86_64 LibreOffice_project/420$Build-2</meta:generator>
    <meta:document-statistic meta:table-count="8" meta:image-count="0" meta:object-count="0" meta:page-count="4" meta:paragraph-count="162" meta:word-count="778" meta:character-count="4759" meta:non-whitespace-character-count="3793"/>
  </office:meta>
</office:document-meta>
</file>