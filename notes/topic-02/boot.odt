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Liberation Serif" fo:font-size="13pt" style:font-size-asian="13pt" style:font-size-complex="13pt"/>
    </style:style>
    <style:style style:name="P2" style:family="paragraph" style:parent-style-name="Preformatted_20_Text">
      <style:paragraph-properties fo:text-align="justify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️. LILO (Linux Loader)</text:p>
      <text:p text:style-name="P1">LILO là boot loader rất cũ của Linux.</text:p>
      <text:p text:style-name="P1">Đặc điểm</text:p>
      <text:p text:style-name="P1"><text:s text:c="4"/>• Xuất hiện khoảng 1990s</text:p>
      <text:p text:style-name="P1"><text:s text:c="4"/>• Cấu hình bằng file:</text:p>
      <text:p text:style-name="P1">/etc/lilo.conf</text:p>
      <text:p text:style-name="P1"><text:s text:c="4"/>• Sau khi sửa cấu hình phải chạy:</text:p>
      <text:p text:style-name="P1">Operating System</text:p>
      <text:p text:style-name="P1">Nhược điểm</text:p>
      <text:p text:style-name="P1"><text:s text:c="4"/>• Không đọc được filesystem khi boot</text:p>
      <text:p text:style-name="P1"><text:s text:c="4"/>• Mỗi lần sửa kernel phải chạy lại lilo</text:p>
      <text:p text:style-name="P1"><text:s text:c="4"/>• Không linh hoạt</text:p>
      <text:p text:style-name="P1">Vì vậy bây giờ hầu như không còn dùng nữa.</text:p>
      <text:p text:style-name="P1"/>
      <text:p text:style-name="P2">2️. GRUB (Grand Unified Bootloader)</text:p>
      <text:p text:style-name="P1">GRUB là boot loader phổ biến nhất hiện nay.</text:p>
      <text:p text:style-name="P1">Phiên bản hiện tại thường là:</text:p>
      <text:p text:style-name="P1"><text:s text:c="4"/>• GRUB 2</text:p>
      <text:p text:style-name="P1">Ưu điểm</text:p>
      <text:p text:style-name="P1"><text:s text:c="4"/>• đọc được filesystem</text:p>
      <text:p text:style-name="P1"><text:s text:c="4"/>• menu boot linh hoạt</text:p>
      <text:p text:style-name="P1"><text:s text:c="4"/>• hỗ trợ nhiều hệ điều hành</text:p>
      <text:p text:style-name="P1"><text:s text:c="4"/>• có command line khi boot</text:p>
      <text:p text:style-name="P1"><text:s text:c="4"/>• không cần ghi lại MBR mỗi lần đổi kernel</text:p>
      <text:p text:style-name="P1">Ví dụ menu boot:</text:p>
      <text:p text:style-name="P1">Ubuntu</text:p>
      <text:p text:style-name="P1">Advanced options</text:p>
      <text:p text:style-name="P1">Windows</text:p>
      <text:p text:style-name="P1">Memory test</text:p>
      <text:p text:style-name="P1"/>
      <text:p text:style-name="P2">3️. Boot loader hoạt động thế nào</text:p>
      <text:p text:style-name="P1">Khi bật máy:</text:p>
      <text:p text:style-name="P1">BIOS / UEFI</text:p>
      <text:p text:style-name="P1"><text:s text:c="5"/>↓</text:p>
      <text:p text:style-name="P1">Bootloader (GRUB)</text:p>
      <text:p text:style-name="P1"><text:s text:c="5"/>↓</text:p>
      <text:p text:style-name="P1">Linux Kernel</text:p>
      <text:p text:style-name="P1"><text:s text:c="5"/>↓</text:p>
      <text:p text:style-name="P1">init / systemd</text:p>
      <text:p text:style-name="P1"><text:s text:c="5"/>↓</text:p>
      <text:p text:style-name="P1">Operating System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4T16:03:28.325433638</dc:date>
    <meta:editing-duration>PT2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9" meta:word-count="160" meta:character-count="819" meta:non-whitespace-character-count="630"/>
  </office:meta>
</office:document-meta>
</file>