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ư mục /dev là các tệp đặc biệt (device files) dùng để giao tiếp giữa phần mềm (user space) và phần cứng hoặc driver trong kernel.</text:p>
      <text:p text:style-name="P1">Nói đơn giản:</text:p>
      <text:p text:style-name="P1"><text:s text:c="4"/>• Chương trình không nói chuyện trực tiếp với phần cứng</text:p>
      <text:p text:style-name="P1"><text:s text:c="4"/>• Nó đọc/ghi vào file trong /dev</text:p>
      <text:p text:style-name="P1"><text:s text:c="4"/>• Kernel + driver sẽ xử lý phần còn lại.</text:p>
      <text:p text:style-name="P1">Nếu bạn cắm USB flash drive, hệ thống sẽ tạo:</text:p>
      <text:p text:style-name="P1">/dev/sdb</text:p>
      <text:p text:style-name="P1">/dev/sdb1</text:p>
      <text:p text:style-name="P1"><text:s text:c="4"/>• sdb → toàn bộ thiết bị USB</text:p>
      <text:p text:style-name="P1"><text:s text:c="4"/>• sdb1 → partition bên trong US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03:58.913506253</dc:date>
    <meta:editing-duration>PT13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84" meta:character-count="413" meta:non-whitespace-character-count="319"/>
  </office:meta>
</office:document-meta>
</file>