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00%" fo:text-align="justify" style:justify-single-word="false"/>
      <style:text-properties style:font-name="Liberation Serif" fo:font-size="13pt" style:font-size-asian="13pt" style:font-size-complex="13pt"/>
    </style:style>
    <style:style style:name="P2" style:family="paragraph" style:parent-style-name="Preformatted_20_Text">
      <style:paragraph-properties fo:line-height="100%" fo:text-align="justify" style:justify-single-word="false"/>
      <style:text-properties style:font-name="Liberation Serif" fo:font-size="13pt" style:text-underline-style="solid" style:text-underline-width="auto" style:text-underline-color="font-color" style:font-size-asian="13pt" style:font-size-complex="13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ệnh stat</text:span></text:p>
      <text:p text:style-name="P1">stat hiển thị thông tin chi tiết ở mức inode của file.</text:p>
      <text:p text:style-name="P1">Nó sâu hơn ls -l.</text:p>
      <text:p text:style-name="P1">Cú pháp</text:p>
      <text:p text:style-name="P1">stat filename</text:p>
      <text:p text:style-name="P2">Ví dụ output bạn đưa:</text:p>
      <text:p text:style-name="P1">File: example.txt</text:p>
      <text:p text:style-name="P1">Size: 2210 <text:s text:c="7"/>Blocks: 8 <text:s text:c="9"/>IO Block: 4096 regular file</text:p>
      <text:p text:style-name="P1">Device: 802h/2050d <text:s/>Inode: 1288496 <text:s text:c="2"/>Links: 1</text:p>
      <text:p text:style-name="P1">Access: 2024-11-18 10:50:56</text:p>
      <text:p text:style-name="P1">Modify: 2024-11-18 10:50:56</text:p>
      <text:p text:style-name="P1">Change: 2024-11-18 10:50:56</text:p>
      <text:p text:style-name="P1">Birth: -</text:p>
      <text:p text:style-name="P2">Giải thích từng dòng:</text:p>
      <text:p text:style-name="P1">File:</text:p>
      <text:p text:style-name="P1">Tên file</text:p>
      <text:p text:style-name="P1">Size:</text:p>
      <text:p text:style-name="P1">Kích thước file (byte)</text:p>
      <text:p text:style-name="P1">Blocks:</text:p>
      <text:p text:style-name="P1">Số block mà file đang chiếm</text:p>
      <text:p text:style-name="P1">IO Block:</text:p>
      <text:p text:style-name="P1">Kích thước block của filesystem (ví dụ 4096 byte)</text:p>
      <text:p text:style-name="P1">Device:</text:p>
      <text:p text:style-name="P1">ID của thiết bị chứa file</text:p>
      <text:p text:style-name="P1">Inode:</text:p>
      <text:p text:style-name="P1">Số inode của file</text:p>
      <text:p text:style-name="P1">→ mỗi file có một inode duy nhất trong filesystem</text:p>
      <text:p text:style-name="P1">Links:</text:p>
      <text:p text:style-name="P1">Số hard link trỏ tới inode này</text:p>
      <text:p text:style-name="P1">Access (atime):</text:p>
      <text:p text:style-name="P1">Lần cuối file được đọc</text:p>
      <text:p text:style-name="P1">Modify (mtime):</text:p>
      <text:p text:style-name="P1">Lần cuối nội dung file bị thay đổi</text:p>
      <text:p text:style-name="P1">Change (ctime):</text:p>
      <text:p text:style-name="P1">Lần cuối metadata thay đổi</text:p>
      <text:p text:style-name="P1">(ví dụ chmod, chown)</text:p>
      <text:p text:style-name="P1">Birth:</text:p>
      <text:p text:style-name="P1">Thời điểm tạo file</text:p>
      <text:p text:style-name="P1">(không phải filesystem nào cũng hỗ trợ)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4T16:13:44.447717826</dc:date>
    <meta:editing-duration>PT45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39" meta:word-count="156" meta:character-count="839" meta:non-whitespace-character-count="703"/>
  </office:meta>
</office:document-meta>
</file>