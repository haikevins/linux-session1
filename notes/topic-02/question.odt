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Khi xóa file tức là xóa liên kết từ inode đến file đúng không?</text:p>
      <text:p text:style-name="P1">Trong Linux, khi xóa file bằng rm, hệ thống xóa liên kết từ tên file (directory entry) đến inode.</text:p>
      <text:p text:style-name="P1">Cấu trúc thực tế</text:p>
      <text:p text:style-name="P1">Quan hệ trong filesystem (ví dụ như ext4) là:</text:p>
      <text:p text:style-name="P1">Directory entry (tên file)</text:p>
      <text:p text:style-name="P1"><text:s text:c="8"/>↓</text:p>
      <text:p text:style-name="P1"><text:s text:c="6"/>inode</text:p>
      <text:p text:style-name="P1"><text:s text:c="8"/>↓</text:p>
      <text:p text:style-name="P1"><text:s text:c="3"/>data blocks (dữ liệu)</text:p>
      <text:p text:style-name="P1">Khi chạy rm file.txt</text:p>
      <text:p text:style-name="P1">Điều xảy ra:</text:p>
      <text:p text:style-name="P1"><text:s text:c="4"/>1. Directory entry bị xóa</text:p>
      <text:p text:style-name="P1"><text:s text:c="8"/>◦ Tên file.txt trong thư mục bị xóa.</text:p>
      <text:p text:style-name="P1"><text:s text:c="4"/>2. Link count của inode giảm 1</text:p>
      <text:p text:style-name="P1"><text:s text:c="4"/>3. Nếu link count = 0 và không process nào đang mở file</text:p>
      <text:p text:style-name="P1">→ inode và data blocks được giải phóng.</text:p>
      <text:p text:style-name="P3">Ví dụ với hard link</text:p>
      <text:p text:style-name="P1">echo "hello" &gt; a.txt</text:p>
      <text:p text:style-name="P1">ln a.txt b.txt</text:p>
      <text:p text:style-name="P1">Lúc này:</text:p>
      <text:p text:style-name="P1">a.txt ─┐</text:p>
      <text:p text:style-name="P1"><text:s text:c="11"/>├── inode ── data</text:p>
      <text:p text:style-name="P1">b.txt ─┘</text:p>
      <text:p text:style-name="P1">Nếu chạy:</text:p>
      <text:p text:style-name="P1">rm a.txt</text:p>
      <text:p text:style-name="P1">Thì:</text:p>
      <text:p text:style-name="P1"><text:s text:c="4"/>• chỉ xóa entry a.txt</text:p>
      <text:p text:style-name="P1"><text:s text:c="4"/>• b.txt vẫn trỏ đến cùng inode</text:p>
      <text:p text:style-name="P1"><text:s text:c="4"/>• dữ liệu không mất</text:p>
      <text:p text:style-name="P1">Chỉ khi:</text:p>
      <text:p text:style-name="P1">rm b.txt</text:p>
      <text:p text:style-name="P1">→ link count = 0 và không process mở file→ inode và data blocks mới được giải phóng.</text:p>
      <text:p text:style-name="P1">Tóm tắt logic</text:p>
      <text:p text:style-name="P1">rm file</text:p>
      <text:p text:style-name="P1"><text:s text:c="3"/>↓</text:p>
      <text:p text:style-name="P1">xóa directory entry</text:p>
      <text:p text:style-name="P1"><text:s text:c="3"/>↓</text:p>
      <text:p text:style-name="P1">link count --</text:p>
      <text:p text:style-name="P1"><text:s text:c="3"/>↓</text:p>
      <text:p text:style-name="P1">if link count = 0 AND không process mở file</text:p>
      <text:p text:style-name="P1"><text:s text:c="3"/>→ giải phóng inode + data block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7T21:57:21.611570857</dc:date>
    <meta:editing-duration>PT1M1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41" meta:word-count="203" meta:character-count="989" meta:non-whitespace-character-count="747"/>
  </office:meta>
</office:document-meta>
</file>