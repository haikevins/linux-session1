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00%" fo:text-align="justify" style:justify-single-word="false"/>
      <style:text-properties style:font-name="Liberation Serif" fo:font-size="13pt" style:font-size-asian="13pt" style:font-size-complex="13pt"/>
    </style:style>
    <style:style style:name="P2" style:family="paragraph" style:parent-style-name="Preformatted_20_Text">
      <style:paragraph-properties fo:line-height="100%" fo:text-align="justify" style:justify-single-word="false"/>
      <style:text-properties style:font-name="Liberation Serif" fo:font-size="13pt" style:text-underline-style="solid" style:text-underline-width="auto" style:text-underline-color="font-color" style:font-size-asian="13pt" style:font-size-complex="13pt"/>
    </style:style>
    <style:style style:name="P3" style:family="paragraph" style:parent-style-name="Preformatted_20_Text">
      <style:paragraph-properties fo:line-height="100%" fo:text-align="justify" style:justify-single-word="false"/>
      <style:text-properties style:font-name="Liberation Serif" fo:font-size="13pt" fo:font-weight="bold" style:font-size-asian="13pt" style:font-weight-asian="bold" style:font-size-complex="13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ư mục (directory) thực chất là gì?</text:p>
      <text:p text:style-name="P1">Trong Linux:</text:p>
      <text:p text:style-name="P1">Directory cũng là một file đặc biệt</text:p>
      <text:p text:style-name="P1">Nó không chứa dữ liệu như file thường, mà chứa:</text:p>
      <text:p text:style-name="P1"><text:s text:c="4"/>• Danh sách tên file</text:p>
      <text:p text:style-name="P1"><text:s text:c="4"/>• Mapping giữa tên file ↔ inode</text:p>
      <text:p text:style-name="P1"><text:s text:c="4"/>• Thư mục con</text:p>
      <text:p text:style-name="P1"><text:s text:c="4"/>• File đặc biệt</text:p>
      <text:p text:style-name="P1">Nói cách khác:</text:p>
      <text:p text:style-name="P1">Directory = một bảng tra cứu tên → inode</text:p>
      <text:p text:style-name="P1"/>
      <text:p text:style-name="P2">Ví dụ:</text:p>
      <text:p text:style-name="P1">drwxrwxr-x 2 shantanu shantanu 4096 Jul 18 20:41 GFG</text:p>
      <text:p text:style-name="P1">Cột thứ 2 là:2</text:p>
      <text:p text:style-name="P1">Đây là link count (hard link count).</text:p>
      <text:p text:style-name="P1">Vì sao thư mục có số link ≥ 2?</text:p>
      <text:p text:style-name="P1">Mỗi thư mục luôn có:</text:p>
      <text:p text:style-name="P1"><text:s text:c="4"/>• . → trỏ đến chính nó</text:p>
      <text:p text:style-name="P1"><text:s text:c="4"/>• .. → trỏ đến thư mục cha</text:p>
      <text:p text:style-name="P1">Vì vậy: Link count tối thiểu = 2</text:p>
      <text:p text:style-name="P1">Nếu có thêm thư mục con, link count sẽ tăng.</text:p>
      <text:p text:style-name="P2">Ví dụ:</text:p>
      <text:p text:style-name="P1">Nếu bạn tạo thư mục con trong GFG:</text:p>
      <text:p text:style-name="P1">mkdir GFG/sub</text:p>
      <text:p text:style-name="P1">Link count của GFG sẽ tăng lên 3.</text:p>
      <text:p text:style-name="P1"/>
      <text:p text:style-name="P1">Nếu chúng ta có 10 tập tin trong một thư mục, chúng ta sẽ có 10 mục nhập trong tập tin thư mục.</text:p>
      <text:p text:style-name="P1">Điều đó nghĩa là:</text:p>
      <text:p text:style-name="P1">Directory chứa 10 entry dạng:</text:p>
      <text:p text:style-name="P1">filename → inode_number</text:p>
      <text:p text:style-name="P2">Ví dụ:</text:p>
      <text:p text:style-name="P1">GFG.txt → inode 12345</text:p>
      <text:p text:style-name="P1">GFGPython.py → inode 12346</text:p>
      <text:p text:style-name="P1">GFG4 → inode 12347</text:p>
      <text:p text:style-name="P1">Nó không chứa nội dung file — chỉ chứa con trỏ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vi" fo:country="VN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14T16:11:37.556261131</dc:date>
    <meta:editing-duration>PT42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33" meta:word-count="206" meta:character-count="937" meta:non-whitespace-character-count="739"/>
  </office:meta>
</office:document-meta>
</file>