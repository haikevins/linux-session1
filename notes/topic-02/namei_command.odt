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ệnh namei</text:span></text:p>
      <text:p text:style-name="P1">namei dùng để:</text:p>
      <text:p text:style-name="P1"><text:s text:c="4"/>• Phân tích từng thành phần của một đường dẫn</text:p>
      <text:p text:style-name="P1"><text:s text:c="4"/>• Xem quyền truy cập và loại file ở mỗi cấp thư mục</text:p>
      <text:p text:style-name="P1">Nó giúp bạn hiểu: Kernel đi qua các thư mục nào để tìm tới file đó</text:p>
      <text:p text:style-name="P1">Cú pháp</text:p>
      <text:p text:style-name="P1">namei -l /path/to/file</text:p>
      <text:p text:style-name="P1">Option -l → hiển thị chi tiết giống ls -l</text:p>
      <text:p text:style-name="P2">Ví dụ:</text:p>
      <text:p text:style-name="P1">namei -l /home/user/test/file.txt</text:p>
      <text:p text:style-name="P1">Kết quả sẽ kiểu như:</text:p>
      <text:p text:style-name="P1">f: /home/user/test/file.txt</text:p>
      <text:p text:style-name="P1">drwxr-xr-x root root <text:s text:c="2"/>/</text:p>
      <text:p text:style-name="P1">drwxr-xr-x root root <text:s text:c="2"/>home</text:p>
      <text:p text:style-name="P1">drwxr-xr-x user user <text:s text:c="2"/>user</text:p>
      <text:p text:style-name="P1">drwxr-xr-x user user <text:s text:c="2"/>test</text:p>
      <text:p text:style-name="P1">-rw-r--r-- user user <text:s text:c="2"/>file.txt</text:p>
      <text:p text:style-name="P1">Giải thích:</text:p>
      <text:p text:style-name="P1"><text:s text:c="4"/>• f: → full path</text:p>
      <text:p text:style-name="P1"><text:s text:c="4"/>• Mỗi dòng bên dưới là một thành phần của đường dẫn</text:p>
      <text:p text:style-name="P1"><text:s text:c="4"/>• Hiển thị:</text:p>
      <text:p text:style-name="P1"><text:s text:c="8"/>◦ loại file</text:p>
      <text:p text:style-name="P1"><text:s text:c="8"/>◦ permission</text:p>
      <text:p text:style-name="P1"><text:s text:c="8"/>◦ owner</text:p>
      <text:p text:style-name="P1"><text:s text:c="8"/>◦ group</text:p>
      <text:p text:style-name="P1"/>
      <text:p text:style-name="P3">Khi nào dùng namei?</text:p>
      <text:p text:style-name="P1">Rất hữu ích khi bạn bị lỗi:</text:p>
      <text:p text:style-name="P1">Permission denied</text:p>
      <text:p text:style-name="P1">Bạn có thể kiểm tra xem:</text:p>
      <text:p text:style-name="P1"><text:s text:c="4"/>• Có thư mục cha nào không có quyền x không</text:p>
      <text:p text:style-name="P1"><text:s text:c="4"/>• Có thành phần nào không tồn tại không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08:51.067329072</dc:date>
    <meta:editing-duration>PT3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1" meta:word-count="162" meta:character-count="833" meta:non-whitespace-character-count="633"/>
  </office:meta>
</office:document-meta>
</file>