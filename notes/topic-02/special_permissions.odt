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  <style:style style:name="P2" style:family="paragraph" style:parent-style-name="Preformatted_20_Text">
      <style:paragraph-properties fo:line-height="100%" fo:text-align="justify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3" style:family="paragraph" style:parent-style-name="Preformatted_20_Text">
      <style:paragraph-properties fo:line-height="100%" fo:text-align="justify" style:justify-single-word="false"/>
      <style:text-properties style:font-name="Liberation Serif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4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text-underline-style="solid" style:text-underline-width="auto" style:text-underline-color="font-color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ecial Permissions in Linux</text:p>
      <text:p text:style-name="P1">Ngoài rwx thông thường (read, write, execute), Linux có 3 quyền đặc biệt:</text:p>
      <text:p text:style-name="P1"><text:s text:c="4"/>• setuid</text:p>
      <text:p text:style-name="P1"><text:s text:c="4"/>• setgid</text:p>
      <text:p text:style-name="P1"><text:s text:c="4"/>• sticky bit</text:p>
      <text:p text:style-name="P1">Chúng giúp kiểm soát hành vi chạy chương trình và quản lý file trong thư mục phức tạp hơn.</text:p>
      <text:p text:style-name="P1"/>
      <text:p text:style-name="P2">setuid (Set User ID)</text:p>
      <text:p text:style-name="P1">Lệnh:</text:p>
      <text:p text:style-name="P1">chmod u+s program</text:p>
      <text:p text:style-name="P1">Ý nghĩa</text:p>
      <text:p text:style-name="P1">Khi một file có setuid, thì: Người chạy chương trình sẽ chạy với quyền của chủ sở hữu file, KHÔNG phải quyền của người đang chạy.</text:p>
      <text:p text:style-name="P1">Ví dụ thực tế</text:p>
      <text:p text:style-name="P1">Lệnh:</text:p>
      <text:p text:style-name="P1">ls -l /usr/bin/passwd</text:p>
      <text:p text:style-name="P1">Bạn sẽ thấy dạng:</text:p>
      <text:p text:style-name="P1">-rwsr-xr-x 1 root root ...</text:p>
      <text:p text:style-name="P1">Chữ s ở vị trí của quyền x cho user → nghĩa là file có setuid</text:p>
      <text:p text:style-name="P1">Lệnh passwd thuộc sở hữu của root, nhưng người dùng thường vẫn có thể đổi mật khẩu.</text:p>
      <text:p text:style-name="P1">Vì: Khi bạn chạy passwd, nó chạy với quyền root (nhờ setuid)</text:p>
      <text:p text:style-name="P1">Khi nào dùng?</text:p>
      <text:p text:style-name="P1"><text:s text:c="4"/>• Các chương trình cần quyền cao hơn để thực hiện nhiệm vụ</text:p>
      <text:p text:style-name="P1"><text:s text:c="4"/>• Ví dụ: đổi mật khẩu, mount thiết bị…</text:p>
      <text:p text:style-name="P1"/>
      <text:p text:style-name="P2">setgid (Set Group ID)</text:p>
      <text:p text:style-name="P1">Lệnh:</text:p>
      <text:p text:style-name="P1">chmod g+s directoryname</text:p>
      <text:p text:style-name="P1">Có 2 trường hợp:</text:p>
      <text:p text:style-name="P1">A. Nếu áp dụng cho FILE</text:p>
      <text:p text:style-name="P1">File sẽ chạy với quyền của group sở hữu file.</text:p>
      <text:p text:style-name="P1">B. Nếu áp dụng cho DIRECTORY (phổ biến hơn)</text:p>
      <text:p text:style-name="P1">Mọi file được tạo trong thư mục đó sẽ tự động kế thừa group của thư mục</text:p>
      <text:p text:style-name="P3">Ví dụ:</text:p>
      <text:p text:style-name="P1">Giả sử thư mục:</text:p>
      <text:p text:style-name="P1">drwxrwsr-x 2 root devteam ...</text:p>
      <text:p text:style-name="P1">Chữ s ở phần group → setgid bật</text:p>
      <text:p text:style-name="P1">Nếu user trong group devteam tạo file trong thư mục này: File sẽ thuộc group devteam. Không phải group cá nhân của user</text:p>
      <text:p text:style-name="P1">Khi nào dùng?</text:p>
      <text:p text:style-name="P1"><text:s text:c="4"/>• Dùng cho thư mục làm việc nhóm</text:p>
      <text:p text:style-name="P1"><text:s text:c="4"/>• Đảm bảo file luôn cùng group</text:p>
      <text:p text:style-name="P1"><text:s text:c="6"/></text:p>
      <text:p text:style-name="P2">sticky bit</text:p>
      <text:p text:style-name="P1">Lệnh:</text:p>
      <text:p text:style-name="P1">chmod +t directoryname</text:p>
      <text:p text:style-name="P1">Ý nghĩa</text:p>
      <text:p text:style-name="P1"><text:soft-page-break/>Trong thư mục có sticky bit:</text:p>
      <text:p text:style-name="P1">Chỉ chủ sở hữu file mới có quyền xóa file đó</text:p>
      <text:p text:style-name="P1">Dù người khác có quyền write vào thư mục</text:p>
      <text:p text:style-name="P4">Ví dụ thực tế:</text:p>
      <text:p text:style-name="P1">Thư mục:</text:p>
      <text:p text:style-name="P1">ls -ld /tmp</text:p>
      <text:p text:style-name="P1">Thường sẽ thấy:</text:p>
      <text:p text:style-name="P1">drwxrwxrwt</text:p>
      <text:p text:style-name="P1">Chữ t ở cuối → sticky bit</text:p>
      <text:p text:style-name="P1">/tmp cho tất cả mọi người ghi file,</text:p>
      <text:p text:style-name="P1">nhưng mỗi người chỉ được xóa file của mình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4T16:12:43.624236040</dc:date>
    <meta:editing-duration>PT4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54" meta:word-count="351" meta:character-count="1665" meta:non-whitespace-character-count="1333"/>
  </office:meta>
</office:document-meta>
</file>