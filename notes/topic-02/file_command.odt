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--extension dựa vào nội dung thực tế của file (magic number + signature) để:</text:p>
      <text:p text:style-name="P1"><text:s text:c="4"/>• Xác định loại file</text:p>
      <text:p text:style-name="P1"><text:s text:c="4"/>• Sau đó in ra các phần mở rộng (extension) hợp lý cho loại file đó</text:p>
      <text:p text:style-name="P1"/>
      <text:p text:style-name="P2">Giả sử:</text:p>
      <text:p text:style-name="P1">mv example.txt fake.rar</text:p>
      <text:p text:style-name="P1">Bây giờ file tên là fake.rar nhưng bên trong là text.</text:p>
      <text:p text:style-name="P1">Chạy: file fake.rar</text:p>
      <text:p text:style-name="P1">Có thể ra: ASCII text</text:p>
      <text:p text:style-name="P1">Chạy tiếp: file --extension fake.rar</text:p>
      <text:p text:style-name="P1">Có thể ra: txt</text:p>
      <text:p text:style-name="P1">Nghĩa là nội dung file này phù hợp với đuôi .txt, không phải .ra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07:52.198756846</dc:date>
    <meta:editing-duration>PT5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85" meta:character-count="415" meta:non-whitespace-character-count="335"/>
  </office:meta>
</office:document-meta>
</file>