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justify" style:justify-single-word="false"/>
      <style:text-properties style:font-name="Liberation Serif" fo:font-size="13pt" style:font-size-asian="13pt" style:font-size-complex="13pt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XLY_CORRECT là gì?</text:p>
      <text:p text:style-name="P2">POSIXLY_CORRECT là biến môi trường (environment variable).</text:p>
      <text:p text:style-name="P2">Khi bạn bật nó lên, nhiều chương trình trong Linux sẽ:</text:p>
      <text:p text:style-name="P2"><text:s text:c="4"/>• Cư xử theo chuẩn POSIX nghiêm ngặt hơn</text:p>
      <text:p text:style-name="P2"><text:s text:c="4"/>• Giảm các hành vi “mở rộng riêng của GNU”</text:p>
      <text:p text:style-name="P2"/>
      <text:p text:style-name="P1">POSIX là gì?</text:p>
      <text:p text:style-name="P2">POSIX là bộ tiêu chuẩn do IEEE định nghĩa để đảm bảo các hệ Unix tương thích với nhau.</text:p>
      <text:p text:style-name="P2">Nó quy định:</text:p>
      <text:p text:style-name="P2"><text:s text:c="4"/>• Hành vi của lệnh</text:p>
      <text:p text:style-name="P2"><text:s text:c="4"/>• Cú pháp</text:p>
      <text:p text:style-name="P2"><text:s text:c="4"/>• Cách xử lý option</text:p>
      <text:p text:style-name="P2"><text:s text:c="4"/>• Thứ tự tham số</text:p>
      <text:p text:style-name="P2"><text:s text:c="4"/>• Chuẩn API hệ thống</text:p>
      <text:p text:style-name="P2">Vậy khi bật POSIXLY_CORRECT thì sao?</text:p>
      <text:p text:style-name="P3">Ví dụ:</text:p>
      <text:p text:style-name="P2">export POSIXLY_CORRECT=1</text:p>
      <text:p text:style-name="P2">Sau đó nhiều lệnh sẽ thay đổi hành vi.</text:p>
      <text:p text:style-name="P2"><text:span text:style-name="T1">Ví dụ 1:</text:span> Lệnh file -L</text:p>
      <text:p text:style-name="P2">Bình thường:</text:p>
      <text:p text:style-name="P2">file link.txt</text:p>
      <text:p text:style-name="P2">→ báo là symbolic link</text:p>
      <text:p text:style-name="P2">Nếu POSIXLY_CORRECT được bật</text:p>
      <text:p text:style-name="P2">→ file sẽ tự động follow symlink như thể bạn dùng -L</text:p>
      <text:p text:style-name="P2"><text:span text:style-name="T1">Ví dụ 2: </text:span>Lệnh ls</text:p>
      <text:p text:style-name="P2">GNU ls cho phép:</text:p>
      <text:p text:style-name="P2">ls file1 -l</text:p>
      <text:p text:style-name="P2">Nhưng chuẩn POSIX yêu cầu option phải đứng trước:</text:p>
      <text:p text:style-name="P2">ls -l file1</text:p>
      <text:p text:style-name="P2">Khi bật POSIXLY_CORRECT, một số lệnh sẽ nghiêm ngặt hơn với thứ tự này.</text:p>
      <text:p text:style-name="P2"><text:span text:style-name="T1">Ví dụ 3: </text:span>Lệnh sort</text:p>
      <text:p text:style-name="P2">GNU sort có thêm nhiều extension.</text:p>
      <text:p text:style-name="P2">Khi bật POSIXLY_CORRECT:</text:p>
      <text:p text:style-name="P2"><text:s text:c="4"/>• Một số option mở rộng sẽ bị hạn chế</text:p>
      <text:p text:style-name="P2"><text:s text:c="4"/>• Hành vi theo đúng chuẩn POSIX</text:p>
      <text:p text:style-name="P2">Mục đích của biến này</text:p>
      <text:p text:style-name="P2"><text:s text:c="4"/>1. Dùng khi viết script cần chạy trên nhiều hệ Unix khác nhau</text:p>
      <text:p text:style-name="P2"><text:s text:c="4"/>2. Đảm bảo script tuân thủ chuẩn</text:p>
      <text:p text:style-name="P2"><text:s text:c="4"/>3. Tránh phụ thuộc vào GNU extension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10:53.413603427</dc:date>
    <meta:editing-duration>PT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8" meta:word-count="239" meta:character-count="1175" meta:non-whitespace-character-count="926"/>
  </office:meta>
</office:document-meta>
</file>