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Heading_20_1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" style:family="paragraph" style:parent-style-name="Heading_20_1">
      <style:paragraph-properties fo:margin-top="0.0598in" fo:margin-bottom="0.0598in" style:contextual-spacing="false" fo:line-height="100%"/>
      <style:text-properties officeooo:paragraph-rsid="000ea2a5"/>
    </style:style>
    <style:style style:name="P3" style:family="paragraph" style:parent-style-name="Heading_20_2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4" style:family="paragraph" style:parent-style-name="Heading_20_2">
      <style:paragraph-properties fo:margin-top="0.0598in" fo:margin-bottom="0.0598in" style:contextual-spacing="false" fo:line-height="100%"/>
      <style:text-properties officeooo:paragraph-rsid="000ea2a5"/>
    </style:style>
    <style:style style:name="P5" style:family="paragraph" style:parent-style-name="Heading_20_3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6" style:family="paragraph" style:parent-style-name="Heading_20_3">
      <style:paragraph-properties fo:margin-top="0.0598in" fo:margin-bottom="0.0598in" style:contextual-spacing="false" fo:line-height="100%"/>
      <style:text-properties officeooo:paragraph-rsid="000ea2a5"/>
    </style:style>
    <style:style style:name="P7" style:family="paragraph" style:parent-style-name="Heading_20_3">
      <style:paragraph-properties fo:margin-top="0.0598in" fo:margin-bottom="0.0598in" style:contextual-spacing="false" fo:line-height="100%"/>
    </style:style>
    <style:style style:name="P8" style:family="paragraph" style:parent-style-name="Preformatted_20_Text">
      <style:paragraph-properties fo:margin-left="0in" fo:margin-right="0in" fo:text-indent="0in" style:auto-text-indent="false"/>
    </style:style>
    <style:style style:name="P9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0ea2a5" style:font-size-asian="13pt" style:font-size-complex="13pt"/>
    </style:style>
    <style:style style:name="P10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0ea826" style:font-size-asian="13pt" style:font-size-complex="13pt"/>
    </style:style>
    <style:style style:name="P11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14943" style:font-size-asian="13pt" style:font-size-complex="13pt"/>
    </style:style>
    <style:style style:name="P12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3bf78" style:font-size-asian="13pt" style:font-size-complex="13pt"/>
    </style:style>
    <style:style style:name="P13" style:family="paragraph" style:parent-style-name="Preformatted_20_Text">
      <style:paragraph-properties fo:margin-left="0in" fo:margin-right="0in" fo:margin-top="0.0598in" fo:margin-bottom="0.0598in" style:contextual-spacing="false" fo:line-height="100%" fo:text-indent="0in" style:auto-text-indent="false"/>
      <style:text-properties style:font-name="Liberation Serif" fo:font-size="13pt" officeooo:paragraph-rsid="00128867" style:font-size-asian="13pt" style:font-size-complex="13pt"/>
    </style:style>
    <style:style style:name="P14" style:family="paragraph" style:parent-style-name="Text_20_body" style:list-style-name="L1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5" style:family="paragraph" style:parent-style-name="Text_20_body" style:list-style-name="L2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6" style:family="paragraph" style:parent-style-name="Text_20_body" style:list-style-name="L3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7" style:family="paragraph" style:parent-style-name="Text_20_body" style:list-style-name="L4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8" style:family="paragraph" style:parent-style-name="Text_20_body" style:list-style-name="L5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19" style:family="paragraph" style:parent-style-name="Text_20_body" style:list-style-name="L6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0" style:family="paragraph" style:parent-style-name="Text_20_body" style:list-style-name="L8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1" style:family="paragraph" style:parent-style-name="Text_20_body" style:list-style-name="L9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2" style:family="paragraph" style:parent-style-name="Text_20_body" style:list-style-name="L11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3" style:family="paragraph" style:parent-style-name="Text_20_body" style:list-style-name="L12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4" style:family="paragraph" style:parent-style-name="Text_20_body" style:list-style-name="L14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5" style:family="paragraph" style:parent-style-name="Text_20_body">
      <style:paragraph-properties fo:margin-top="0.0598in" fo:margin-bottom="0.0598in" style:contextual-spacing="false" fo:line-height="100%"/>
      <style:text-properties style:font-name="Liberation Serif" fo:font-size="13pt" officeooo:paragraph-rsid="0013bf78" style:font-size-asian="13pt" style:font-size-complex="13pt"/>
    </style:style>
    <style:style style:name="P26" style:family="paragraph" style:parent-style-name="Text_20_body" style:list-style-name="L15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7" style:family="paragraph" style:parent-style-name="Text_20_body" style:list-style-name="L17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8" style:family="paragraph" style:parent-style-name="Text_20_body">
      <style:paragraph-properties fo:margin-top="0.0598in" fo:margin-bottom="0.0598in" style:contextual-spacing="false" fo:line-height="100%"/>
      <style:text-properties style:font-name="Liberation Serif" fo:font-size="13pt" style:font-size-asian="13pt" style:font-size-complex="13pt"/>
    </style:style>
    <style:style style:name="P29" style:family="paragraph" style:parent-style-name="Text_20_body">
      <style:paragraph-properties fo:margin-top="0.0598in" fo:margin-bottom="0.0598in" style:contextual-spacing="false" fo:line-height="100%"/>
      <style:text-properties officeooo:paragraph-rsid="000ea2a5"/>
    </style:style>
    <style:style style:name="P30" style:family="paragraph" style:parent-style-name="Text_20_body" style:list-style-name="L7">
      <style:paragraph-properties fo:margin-top="0.0598in" fo:margin-bottom="0.0598in" style:contextual-spacing="false" fo:line-height="100%"/>
    </style:style>
    <style:style style:name="P31" style:family="paragraph" style:parent-style-name="Text_20_body" style:list-style-name="L10">
      <style:paragraph-properties fo:margin-top="0.0598in" fo:margin-bottom="0.0598in" style:contextual-spacing="false" fo:line-height="100%"/>
    </style:style>
    <style:style style:name="P32" style:family="paragraph" style:parent-style-name="Text_20_body" style:list-style-name="L11">
      <style:paragraph-properties fo:margin-top="0.0598in" fo:margin-bottom="0.0598in" style:contextual-spacing="false" fo:line-height="100%"/>
    </style:style>
    <style:style style:name="P33" style:family="paragraph" style:parent-style-name="Text_20_body" style:list-style-name="L13">
      <style:paragraph-properties fo:margin-top="0.0598in" fo:margin-bottom="0.0598in" style:contextual-spacing="false" fo:line-height="100%"/>
    </style:style>
    <style:style style:name="P34" style:family="paragraph" style:parent-style-name="Text_20_body">
      <style:paragraph-properties fo:margin-top="0.0598in" fo:margin-bottom="0.0598in" style:contextual-spacing="false" fo:line-height="100%"/>
      <style:text-properties officeooo:paragraph-rsid="0013bf78"/>
    </style:style>
    <style:style style:name="P35" style:family="paragraph" style:parent-style-name="Text_20_body" style:list-style-name="L16">
      <style:paragraph-properties fo:margin-top="0.0598in" fo:margin-bottom="0.0598in" style:contextual-spacing="false" fo:line-height="100%"/>
    </style:style>
    <style:style style:name="P36" style:family="paragraph" style:parent-style-name="Text_20_body">
      <style:paragraph-properties fo:margin-top="0.0598in" fo:margin-bottom="0.0598in" style:contextual-spacing="false" fo:line-height="100%"/>
    </style:style>
    <style:style style:name="T1" style:family="text">
      <style:text-properties officeooo:rsid="000ea2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a2a5" style:font-weight-asian="normal" style:font-weight-complex="normal"/>
    </style:style>
    <style:style style:name="T5" style:family="text">
      <style:text-properties officeooo:rsid="000fe20e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fe20e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ea2a5" style:font-size-asian="13pt" style:font-weight-asian="normal" style:font-size-complex="13pt" style:font-weight-complex="normal"/>
    </style:style>
    <style:style style:name="T10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Liberation Serif" fo:font-size="13pt" fo:font-weight="normal" officeooo:rsid="000ea2a5" style:font-size-asian="13pt" style:font-weight-asian="normal" style:font-size-complex="13pt" style:font-weight-complex="normal"/>
    </style:style>
    <style:style style:name="T12" style:family="text">
      <style:text-properties style:font-name="Liberation Serif" fo:font-size="13pt" style:font-size-asian="13pt" style:font-size-complex="13pt"/>
    </style:style>
    <style:style style:name="T13" style:family="text">
      <style:text-properties style:font-name="Liberation Serif" fo:font-size="13pt" officeooo:rsid="000fe20e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Giới thiệu Toolchain trong lập trình hệ thống</text:h>
      <text:h text:style-name="P3" text:outline-level="2">1.1. Khái niệm Toolchain</text:h>
      <text:p text:style-name="P36"><text:span text:style-name="Strong_20_Emphasis"><text:span text:style-name="T10">Toolchain</text:span></text:span><text:span text:style-name="T10"> là </text:span><text:span text:style-name="Strong_20_Emphasis"><text:span text:style-name="T10">tập hợp các công cụ phần mềm</text:span></text:span><text:span text:style-name="T10"> </text:span><text:span text:style-name="T12">dùng để biến mã nguồn (source code) thành chương trình thực thi (executable) chạy trên hệ thống mục tiêu.</text:span></text:p>
      <text:p text:style-name="P28">Trong lập trình hệ thống (đặc biệt là Embedded Linux), toolchain đóng vai trò trung tâm vì:</text:p>
      <text:list text:style-name="L1">
        <text:list-item>
          <text:p text:style-name="P14">Chuyển đổi code C/C++ → mã máy phù hợp kiến trúc CPU </text:p>
        </text:list-item>
        <text:list-item>
          <text:p text:style-name="P14">Tạo ra file thực thi hoặc kernel/module </text:p>
        </text:list-item>
        <text:list-item>
          <text:p text:style-name="P14">Hỗ trợ debug, tối ưu và kiểm tra lỗi </text:p>
        </text:list-item>
      </text:list>
      <text:p text:style-name="P36"><text:span text:style-name="T12">Theo tài liệu </text:span><text:span text:style-name="Emphasis"><text:span text:style-name="T12">Building Embedded Linux Systems</text:span></text:span><text:span text:style-name="T12">, toolchain là nền tảng của toàn bộ quá trình phát triển hệ thống nhúng, đặc biệt trong mô hình </text:span><text:span text:style-name="Strong_20_Emphasis"><text:span text:style-name="T10">host–target development.</text:span></text:span></text:p>
      <text:p text:style-name="P36"><text:span text:style-name="Strong_20_Emphasis"><text:span text:style-name="T12">1.2. Vai trò của Toolchain</text:span></text:span></text:p>
      <text:p text:style-name="P29"><text:span text:style-name="Strong_20_Emphasis"><text:span text:style-name="T11">Toolchain đảm nhận toàn bộ vai trò trong quá trình Compiling.</text:span></text:span></text:p>
      <text:p text:style-name="P29"><text:span text:style-name="Strong_20_Emphasis"><text:span text:style-name="T10">Ý nghĩa:</text:span></text:span></text:p>
      <text:list text:style-name="L2">
        <text:list-item>
          <text:p text:style-name="P15">Tách quá trình build thành nhiều bước rõ ràng </text:p>
        </text:list-item>
        <text:list-item>
          <text:p text:style-name="P15">Cho phép tối ưu, kiểm soát từng giai đoạn </text:p>
        </text:list-item>
        <text:list-item>
          <text:p text:style-name="P15">Đặc biệt quan trọng khi build kernel, driver, hoặc firmware</text:p>
        </text:list-item>
      </text:list>
      <text:h text:style-name="P2" text:outline-level="1"><text:span text:style-name="Strong_20_Emphasis"><text:span text:style-name="T12">2. Phân biệt Native Compiler và Cross Compiler</text:span></text:span></text:h>
      <text:h text:style-name="P3" text:outline-level="2">2.1. Native Compiler</text:h>
      <text:h text:style-name="P7" text:outline-level="3"><text:span text:style-name="T12">Khái niệm: </text:span><text:span text:style-name="Strong_20_Emphasis"><text:span text:style-name="T10">Native Compiler</text:span></text:span><text:span text:style-name="T10"> là compiler chạy trên hệ thống và tạo ra chương trình chạy trên chính hệ thống đó.</text:span></text:h>
      <text:h text:style-name="P5" text:outline-level="3">Đặc điểm:</text:h>
      <text:list text:style-name="L3">
        <text:list-item>
          <text:p text:style-name="P16">Host = Target </text:p>
        </text:list-item>
        <text:list-item>
          <text:p text:style-name="P16">Dùng trực tiếp trên PC (Linux desktop) </text:p>
        </text:list-item>
      </text:list>
      <text:h text:style-name="P5" text:outline-level="3">Ví dụ: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9">gcc hello.c -o hello</text:p>
          </table:table-cell>
        </table:table-row>
      </table:table>
      <text:p text:style-name="P28">→ Tạo chương trình chạy trên chính máy Linux đó</text:p>
      <text:h text:style-name="P3" text:outline-level="2">2.2. Cross Compiler</text:h>
      <text:h text:style-name="P7" text:outline-level="3"><text:span text:style-name="T12">Khái niệm: </text:span><text:span text:style-name="Strong_20_Emphasis"><text:span text:style-name="T10">Cross Compiler</text:span></text:span><text:span text:style-name="T10"> là compiler chạy trên một hệ thống (host) nhưng tạo ra chương trình cho hệ thống khác (target).</text:span></text:h>
      <text:p text:style-name="P36"><text:span text:style-name="T10">Theo </text:span><text:span text:style-name="Emphasis"><text:span text:style-name="T10">Building Embedded Linux Systems</text:span></text:span><text:span text:style-name="T10">, đây là công cụ bắt buộc trong phát triển embedded .</text:span></text:p>
      <text:h text:style-name="P5" text:outline-level="3"><text:soft-page-break/>Đặc điểm:</text:h>
      <text:list text:style-name="L4">
        <text:list-item>
          <text:p text:style-name="P17">Host ≠ Target </text:p>
        </text:list-item>
        <text:list-item>
          <text:p text:style-name="P17">Ví dụ: </text:p>
          <text:list>
            <text:list-item>
              <text:p text:style-name="P17">Host: x86 PC </text:p>
            </text:list-item>
            <text:list-item>
              <text:p text:style-name="P17">Target: ARM board </text:p>
            </text:list-item>
          </text:list>
        </text:list-item>
      </text:list>
      <text:h text:style-name="P5" text:outline-level="3">Ví dụ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bookmark text:name="code-block-viewer"/>arm-linux-gnueabi-gcc hello.c -o hello</text:p>
          </table:table-cell>
        </table:table-row>
      </table:table>
      <text:p text:style-name="P36"><text:span text:style-name="T12">→ File </text:span><text:span text:style-name="Source_20_Text"><text:span text:style-name="T12">hello</text:span></text:span><text:span text:style-name="T12"> chạy trên ARM, không chạy trên PC</text:span></text:p>
      <text:h text:style-name="P4" text:outline-level="2"><text:span text:style-name="Strong_20_Emphasis"><text:span text:style-name="T12">2.</text:span></text:span><text:span text:style-name="Strong_20_Emphasis"><text:span text:style-name="T13">3</text:span></text:span><text:span text:style-name="Strong_20_Emphasis"><text:span text:style-name="T12">. Ý nghĩa trong Embedded Linux</text:span></text:span></text:h>
      <text:list text:style-name="L5">
        <text:list-item>
          <text:p text:style-name="P18">Target (board) thường: </text:p>
          <text:list>
            <text:list-item>
              <text:p text:style-name="P18">CPU yếu </text:p>
            </text:list-item>
            <text:list-item>
              <text:p text:style-name="P18">RAM hạn chế </text:p>
            </text:list-item>
          </text:list>
        </text:list-item>
        <text:list-item>
          <text:p text:style-name="P18">→ Không thể compile trực tiếp </text:p>
        </text:list-item>
      </text:list>
      <text:p text:style-name="P36"><text:span text:style-name="T12">⇒ Phải dùng </text:span><text:span text:style-name="Strong_20_Emphasis"><text:span text:style-name="T10">cross toolchain</text:span></text:span></text:p>
      <text:h text:style-name="P2" text:outline-level="1"><text:span text:style-name="Strong_20_Emphasis"><text:span text:style-name="T12">3. Thành phần của một Toolchain</text:span></text:span></text:h>
      <text:p text:style-name="P28">Một toolchain chuẩn gồm 4 thành phần chính:</text:p>
      <text:h text:style-name="P3" text:outline-level="2">3.1. Compiler (gcc)</text:h>
      <text:h text:style-name="P5" text:outline-level="3">Chức năng:</text:h>
      <text:list text:style-name="L6">
        <text:list-item>
          <text:p text:style-name="P19">Chuyển mã nguồn C/C++ → Assembly hoặc Object code </text:p>
        </text:list-item>
      </text:list>
      <text:h text:style-name="P5" text:outline-level="3">Công cụ phổ biến:</text:h>
      <text:list text:style-name="L7">
        <text:list-item>
          <text:p text:style-name="P30"><text:span text:style-name="Source_20_Text"><text:span text:style-name="T12">gcc</text:span></text:span><text:span text:style-name="T12"> (GNU Compiler Collection) </text:span></text:p>
        </text:list-item>
      </text:list>
      <text:h text:style-name="P5" text:outline-level="3">Vai trò:</text:h>
      <text:list text:style-name="L8">
        <text:list-item>
          <text:p text:style-name="P20">Kiểm tra lỗi cú pháp </text:p>
        </text:list-item>
        <text:list-item>
          <text:p text:style-name="P20">Tối ưu code </text:p>
        </text:list-item>
        <text:list-item>
          <text:p text:style-name="P20">Sinh mã trung gian</text:p>
        </text:list-item>
      </text:list>
      <text:h text:style-name="P6" text:outline-level="3"><text:span text:style-name="Strong_20_Emphasis"><text:span text:style-name="T12">Ví dụ:</text:span>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1">gcc -c main.c</text:p>
          </table:table-cell>
        </table:table-row>
      </table:table>
      <text:p text:style-name="P36"><text:span text:style-name="T12">→ tạo file </text:span><text:span text:style-name="Source_20_Text"><text:span text:style-name="T12">main.o</text:span></text:span></text:p>
      <text:h text:style-name="P4" text:outline-level="2"><text:soft-page-break/><text:span text:style-name="Strong_20_Emphasis"><text:span text:style-name="T12">3.2. Assembler (as)</text:span></text:span></text:h>
      <text:h text:style-name="P5" text:outline-level="3">Chức năng:</text:h>
      <text:list text:style-name="L9">
        <text:list-item>
          <text:p text:style-name="P21">Chuyển Assembly → Machine code (object file) </text:p>
        </text:list-item>
      </text:list>
      <text:h text:style-name="P5" text:outline-level="3">Công cụ:</text:h>
      <text:list text:style-name="L10">
        <text:list-item>
          <text:p text:style-name="P31"><text:span text:style-name="Source_20_Text"><text:span text:style-name="T12">as</text:span></text:span><text:span text:style-name="T12"> (GNU Assembler) </text:span></text:p>
        </text:list-item>
      </text:list>
      <text:h text:style-name="P5" text:outline-level="3">Vai trò:</text:h>
      <text:list text:style-name="L11">
        <text:list-item>
          <text:p text:style-name="P22">Biến mã assembly thành nhị phân </text:p>
        </text:list-item>
        <text:list-item>
          <text:p text:style-name="P32"><text:span text:style-name="T12">Tạo file </text:span><text:span text:style-name="Source_20_Text"><text:span text:style-name="T12">.o</text:span></text:span><text:span text:style-name="T12"> </text:span></text:p>
        </text:list-item>
      </text:list>
      <text:h text:style-name="P4" text:outline-level="2"><text:span text:style-name="Strong_20_Emphasis"><text:span text:style-name="T12">3.3. Linker (ld)</text:span></text:span></text:h>
      <text:h text:style-name="P5" text:outline-level="3">Chức năng:</text:h>
      <text:list text:style-name="L12">
        <text:list-item>
          <text:p text:style-name="P23">Kết hợp nhiều object file thành executable </text:p>
        </text:list-item>
      </text:list>
      <text:h text:style-name="P5" text:outline-level="3">Công cụ:</text:h>
      <text:list text:style-name="L13">
        <text:list-item>
          <text:p text:style-name="P33"><text:span text:style-name="Source_20_Text"><text:span text:style-name="T12">ld</text:span></text:span><text:span text:style-name="T12"> </text:span></text:p>
        </text:list-item>
      </text:list>
      <text:h text:style-name="P5" text:outline-level="3">Vai trò:</text:h>
      <text:list text:style-name="L14">
        <text:list-item>
          <text:p text:style-name="P24">Liên kết: </text:p>
          <text:list>
            <text:list-item>
              <text:p text:style-name="P24">Thư viện (libc, libm…) </text:p>
            </text:list-item>
            <text:list-item>
              <text:p text:style-name="P24">Object files </text:p>
            </text:list-item>
          </text:list>
        </text:list-item>
        <text:list-item>
          <text:p text:style-name="P24">Resolve symbol (hàm, biến)</text:p>
        </text:list-item>
      </text:list>
      <text:h text:style-name="P6" text:outline-level="3"><text:span text:style-name="Strong_20_Emphasis"><text:span text:style-name="T12">Ví dụ:</text:span>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2">gcc main.o lib.o -o app</text:p>
          </table:table-cell>
        </table:table-row>
      </table:table>
      <text:p text:style-name="P25">(Thực chất gcc gọi ld bên trong)</text:p>
      <text:p text:style-name="P34"><text:span text:style-name="Strong_20_Emphasis"><text:span text:style-name="T12">3.4. Debugger (gdb)</text:span></text:span></text:p>
      <text:h text:style-name="P5" text:outline-level="3">Chức năng:</text:h>
      <text:list text:style-name="L15">
        <text:list-item>
          <text:p text:style-name="P26">Debug chương trình (tìm lỗi runtime) </text:p>
        </text:list-item>
      </text:list>
      <text:h text:style-name="P5" text:outline-level="3">Công cụ:</text:h>
      <text:list text:style-name="L16">
        <text:list-item>
          <text:p text:style-name="P35"><text:span text:style-name="Source_20_Text"><text:span text:style-name="T12">gdb</text:span></text:span><text:span text:style-name="T12"> </text:span></text:p>
        </text:list-item>
      </text:list>
      <text:h text:style-name="P5" text:outline-level="3">Khả năng:</text:h>
      <text:list text:style-name="L17">
        <text:list-item>
          <text:p text:style-name="P27">Chạy từng dòng (step) </text:p>
        </text:list-item>
        <text:list-item>
          <text:p text:style-name="P27">Đặt breakpoint </text:p>
        </text:list-item>
        <text:list-item>
          <text:p text:style-name="P27">Xem biến, stack </text:p>
        </text:list-item>
        <text:list-item>
          <text:p text:style-name="P27"><text:soft-page-break/>Debug kernel/user-space </text:p>
        </text:list-item>
      </text:list>
      <text:h text:style-name="P5" text:outline-level="3">Ví dụ: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bookmark text:name="code-block-viewer Copy 1"/>gdb ./app</text:p>
          </table:table-cell>
        </table:table-row>
      </table:table>
      <text:p text:style-name="P28"/>
      <text:p text:style-name="P29"><text:span text:style-name="Strong_20_Emphasis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8:10:16.149199474</meta:creation-date>
    <dc:date>2026-04-21T18:17:53.921409522</dc:date>
    <meta:editing-duration>PT7M27S</meta:editing-duration>
    <meta:editing-cycles>25</meta:editing-cycles>
    <meta:generator>LibreOffice/24.2.7.2$Linux_X86_64 LibreOffice_project/420$Build-2</meta:generator>
    <meta:document-statistic meta:table-count="5" meta:image-count="0" meta:object-count="0" meta:page-count="4" meta:paragraph-count="87" meta:word-count="514" meta:character-count="2555" meta:non-whitespace-character-count="2132"/>
  </office:meta>
</office:document-meta>
</file>