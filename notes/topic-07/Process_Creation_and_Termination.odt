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C9000003BE84A973CD.png" manifest:media-type="image/png"/>
  <manifest:file-entry manifest:full-path="Pictures/100000010000023D0000030EA19999DF.png" manifest:media-type="image/png"/>
  <manifest:file-entry manifest:full-path="Pictures/10000001000003B3000002333B9D1C1B.png" manifest:media-type="image/png"/>
  <manifest:file-entry manifest:full-path="Pictures/10000001000005C9000003BEC734EEB6.png" manifest:media-type="image/png"/>
  <manifest:file-entry manifest:full-path="Pictures/10000001000005C9000003BEE31BB3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1" style:family="table-row">
      <style:table-row-properties style:min-row-height="0.7889in"/>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1" style:family="table-row">
      <style:table-row-properties style:min-row-height="2.85in"/>
    </style:style>
    <style:style style:name="Table7.A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5pt solid #000000"/>
    </style:style>
    <style:style style:name="P1" style:family="paragraph" style:parent-style-name="Heading_20_2">
      <style:paragraph-properties fo:margin-top="0.0598in" fo:margin-bottom="0.0598in" style:contextual-spacing="false" fo:line-height="100%" fo:text-align="start" style:justify-single-word="false"/>
      <style:text-properties fo:font-style="italic" style:font-style-asian="italic" style:font-style-complex="italic"/>
    </style:style>
    <style:style style:name="P2" style:family="paragraph" style:parent-style-name="Heading_20_3">
      <style:paragraph-properties fo:margin-top="0.0598in" fo:margin-bottom="0.0598in" style:contextual-spacing="false" fo:line-height="100%" fo:text-align="start" style:justify-single-word="false"/>
      <style:text-properties fo:font-style="italic" style:font-style-asian="italic" style:font-style-complex="italic"/>
    </style:style>
    <style:style style:name="P3" style:family="paragraph" style:parent-style-name="Text_20_body">
      <style:paragraph-properties fo:margin-top="0.0598in" fo:margin-bottom="0.0598in" style:contextual-spacing="false" fo:line-height="100%" fo:text-align="start" style:justify-single-word="false"/>
      <style:text-properties fo:font-style="italic" style:font-style-asian="italic" style:font-style-complex="italic"/>
    </style:style>
    <style:style style:name="P4" style:family="paragraph" style:parent-style-name="Text_20_body">
      <style:paragraph-properties fo:margin-top="0.0598in" fo:margin-bottom="0.0598in" style:contextual-spacing="false" fo:line-height="100%" fo:text-align="center" style:justify-single-word="false"/>
      <style:text-properties fo:font-style="italic" style:font-style-asian="italic" style:font-style-complex="italic"/>
    </style:style>
    <style:style style:name="P5" style:family="paragraph" style:parent-style-name="Heading_20_2">
      <style:paragraph-properties fo:margin-top="0.0598in" fo:margin-bottom="0.0598in" style:contextual-spacing="false" fo:line-height="100%"/>
      <style:text-properties fo:color="#000000" loext:opacity="100%" style:font-name="Liberation Serif"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Heading_20_2">
      <style:paragraph-properties fo:margin-top="0.0598in" fo:margin-bottom="0.0598in" style:contextual-spacing="false" fo:line-height="100%" fo:text-align="start" style:justify-single-word="false"/>
      <style:text-properties fo:color="#000000" loext:opacity="100%" style:font-name="Liberation Serif"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Preformatted_20_Text">
      <style:paragraph-properties fo:margin-left="0in" fo:margin-right="0in" fo:margin-top="0.0598in" fo:margin-bottom="0.0598in" style:contextual-spacing="false" fo:line-height="100%" fo:text-align="start" style:justify-single-word="false" fo:text-indent="0in" style:auto-text-indent="false"/>
      <style:text-properties fo:color="#000000" loext:opacity="100%" style:font-name="Liberation Serif"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Preformatted_20_Text">
      <style:paragraph-properties fo:margin-top="0.0598in" fo:margin-bottom="0.0598in" style:contextual-spacing="false" fo:line-height="100%" fo:text-align="start" style:justify-single-word="false"/>
      <style:text-properties fo:color="#000000" loext:opacity="100%" style:font-name="Liberation Serif"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Table_20_Contents">
      <style:paragraph-properties fo:margin-top="0.0598in" fo:margin-bottom="0.0598in" style:contextual-spacing="false" fo:line-height="100%" fo:text-align="start" style:justify-single-word="false"/>
      <style:text-properties fo:color="#000000" loext:opacity="100%" style:font-name="Liberation Serif" fo:font-size="13pt" fo:font-style="normal" fo:font-weight="normal" officeooo:paragraph-rsid="00207514" style:font-size-asian="13pt" style:font-style-asian="normal" style:font-weight-asian="normal" style:font-size-complex="13pt" style:font-style-complex="normal" style:font-weight-complex="normal"/>
    </style:style>
    <style:style style:name="P10" style:family="paragraph" style:parent-style-name="Preformatted_20_Text">
      <style:paragraph-properties fo:margin-left="0in" fo:margin-right="0in" fo:margin-top="0.0598in" fo:margin-bottom="0.0598in" style:contextual-spacing="false" fo:line-height="100%" fo:text-indent="0in" style:auto-text-indent="false"/>
      <style:text-properties fo:color="#000000" loext:opacity="100%" style:font-name="Liberation Serif" fo:font-size="13pt" fo:font-style="normal" fo:font-weight="normal" style:font-size-asian="13pt" style:font-style-asian="normal" style:font-weight-asian="normal" style:font-size-complex="13pt" style:font-style-complex="normal" style:font-weight-complex="normal"/>
    </style:style>
    <style:style style:name="P11" style:family="paragraph" style:parent-style-name="Preformatted_20_Text">
      <style:paragraph-properties fo:margin-top="0.0598in" fo:margin-bottom="0.0598in" style:contextual-spacing="false" fo:line-height="100%"/>
      <style:text-properties fo:color="#000000" loext:opacity="100%" style:font-name="Liberation Serif" fo:font-size="13pt" fo:font-style="normal" fo:font-weight="normal" style:font-size-asian="13pt" style:font-style-asian="normal" style:font-weight-asian="normal" style:font-size-complex="13pt" style:font-style-complex="normal" style:font-weight-complex="normal"/>
    </style:style>
    <style:style style:name="P12" style:family="paragraph" style:parent-style-name="Text_20_body">
      <style:paragraph-properties fo:margin-top="0.0598in" fo:margin-bottom="0.0598in" style:contextual-spacing="false" fo:line-height="100%"/>
      <style:text-properties fo:color="#000000" loext:opacity="100%" style:font-name="Liberation Serif"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Preformatted_20_Text">
      <style:paragraph-properties fo:margin-top="0.0598in" fo:margin-bottom="0.0598in" style:contextual-spacing="false" fo:line-height="100%"/>
      <style:text-properties fo:color="#000000" loext:opacity="100%" style:font-name="Liberation Serif" fo:font-size="13pt" fo:font-style="normal" fo:font-weight="normal" officeooo:paragraph-rsid="00207514" style:font-size-asian="13pt" style:font-style-asian="normal" style:font-weight-asian="normal" style:font-size-complex="13pt" style:font-style-complex="normal" style:font-weight-complex="normal"/>
    </style:style>
    <style:style style:name="P14" style:family="paragraph" style:parent-style-name="Preformatted_20_Text">
      <style:paragraph-properties fo:margin-top="0.0598in" fo:margin-bottom="0.0598in" style:contextual-spacing="false" fo:line-height="100%"/>
      <style:text-properties fo:color="#000000" loext:opacity="100%" style:font-name="Liberation Serif" fo:font-size="13pt" fo:font-style="normal" fo:font-weight="normal" officeooo:rsid="001f941e" officeooo:paragraph-rsid="001f941e" style:font-size-asian="13pt" style:font-style-asian="normal" style:font-weight-asian="normal" style:font-size-complex="13pt" style:font-style-complex="normal" style:font-weight-complex="normal"/>
    </style:style>
    <style:style style:name="P15" style:family="paragraph" style:parent-style-name="Text_20_body">
      <style:paragraph-properties fo:margin-top="0.0598in" fo:margin-bottom="0.0598in" style:contextual-spacing="false" fo:line-height="100%"/>
      <style:text-properties fo:color="#000000" loext:opacity="100%" style:font-name="Liberation Serif" fo:font-size="13pt" fo:font-style="normal" fo:font-weight="normal" officeooo:rsid="001b81b5" officeooo:paragraph-rsid="001b81b5" style:font-size-asian="13pt" style:font-style-asian="normal" style:font-weight-asian="normal" style:font-size-complex="13pt" style:font-style-complex="normal" style:font-weight-complex="normal"/>
    </style:style>
    <style:style style:name="P16" style:family="paragraph" style:parent-style-name="Heading_20_3">
      <style:paragraph-properties fo:margin-top="0.0598in" fo:margin-bottom="0.0598in" style:contextual-spacing="false" fo:line-height="100%"/>
    </style:style>
    <style:style style:name="P17" style:family="paragraph" style:parent-style-name="Text_20_body">
      <style:paragraph-properties fo:margin-top="0.0598in" fo:margin-bottom="0.0598in" style:contextual-spacing="false" fo:line-height="100%"/>
    </style:style>
    <style:style style:name="P18" style:family="paragraph" style:parent-style-name="Text_20_body" style:list-style-name="L1">
      <style:paragraph-properties fo:margin-top="0.0598in" fo:margin-bottom="0.0598in" style:contextual-spacing="false" fo:line-height="100%"/>
    </style:style>
    <style:style style:name="P19" style:family="paragraph" style:parent-style-name="Text_20_body" style:list-style-name="L2">
      <style:paragraph-properties fo:margin-top="0.0598in" fo:margin-bottom="0.0598in" style:contextual-spacing="false" fo:line-height="100%"/>
    </style:style>
    <style:style style:name="P20" style:family="paragraph" style:parent-style-name="Text_20_body" style:list-style-name="L3">
      <style:paragraph-properties fo:margin-top="0.0598in" fo:margin-bottom="0.0598in" style:contextual-spacing="false" fo:line-height="100%"/>
    </style:style>
    <style:style style:name="P21" style:family="paragraph" style:parent-style-name="Text_20_body">
      <style:paragraph-properties fo:margin-top="0.0598in" fo:margin-bottom="0.0598in" style:contextual-spacing="false" fo:line-height="100%" fo:text-align="center" style:justify-single-word="false"/>
      <style:text-properties fo:color="#000000" loext:opacity="100%" style:font-name="Liberation Serif" fo:font-size="13pt" fo:font-style="italic" fo:font-weight="normal" style:font-size-asian="13pt" style:font-style-asian="italic" style:font-weight-asian="normal" style:font-size-complex="13pt" style:font-style-complex="italic" style:font-weight-complex="normal"/>
    </style:style>
    <style:style style:name="P22" style:family="paragraph" style:parent-style-name="Text_20_body">
      <style:paragraph-properties fo:margin-top="0.0598in" fo:margin-bottom="0.0598in" style:contextual-spacing="false" fo:line-height="100%" fo:text-align="start" style:justify-single-word="false"/>
      <style:text-properties fo:color="#000000" loext:opacity="100%" style:font-name="Liberation Serif"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loext:opacity="100%" style:font-name="Liberation Serif" fo:font-size="13pt" fo:font-style="normal" fo:font-weight="normal" style:font-size-asian="13pt" style:font-style-asian="normal" style:font-weight-asian="normal" style:font-size-complex="13pt" style:font-style-complex="normal" style:font-weight-complex="normal"/>
    </style:style>
    <style:style style:name="T5" style:family="text">
      <style:text-properties fo:color="#000000" loext:opacity="100%" style:font-name="Liberation Serif" fo:font-size="13pt" fo:font-style="normal" fo:font-weight="bold" style:font-size-asian="13pt" style:font-style-asian="normal" style:font-weight-asian="bold" style:font-size-complex="13pt" style:font-style-complex="normal" style:font-weight-complex="bold"/>
    </style:style>
    <style:style style:name="T6" style:family="text">
      <style:text-properties fo:color="#000000" loext:opacity="100%" style:font-name="Liberation Serif" fo:font-size="13pt" fo:font-weight="normal" style:font-size-asian="13pt" style:font-weight-asian="normal" style:font-size-complex="13pt" style:font-weight-complex="normal"/>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tyle="normal" fo:font-weight="normal" style:font-style-asian="normal" style:font-weight-asian="normal" style:font-style-complex="normal" style:font-weight-complex="normal"/>
    </style:style>
    <style:style style:name="T9" style:family="text">
      <style:text-properties style:font-name="Liberation Serif"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bookmark text:name="orgheadline1"/>1 Unix Processes</text:h>
      <text:p text:style-name="P17"><text:span text:style-name="T4">Một </text:span><text:span text:style-name="Strong_20_Emphasis"><text:span text:style-name="T4">process (tiến trình)</text:span></text:span><text:span text:style-name="T4"> là một thể hiện đang thực thi của một chương trình. Chúng ta đã thảo luận về tiến trình dưới nhiều góc độ khác nhau trong suốt khóa học, nhưng trong bài học này, chúng ta sẽ đi sâu vào </text:span><text:span text:style-name="Strong_20_Emphasis"><text:span text:style-name="T4">vòng đời (lifecycle)</text:span></text:span><text:span text:style-name="T4"> của một tiến trình. Một tiến trình được tạo ra như thế nào? Nó được quản lý ra sao? Và nó kết thúc (chết) như thế nào?</text:span></text:p>
      <text:p text:style-name="P17"><text:span text:style-name="T4">Trước hết, hãy quay lại định nghĩa của tiến trình: một thể hiện đang thực thi của một chương trình. </text:span><text:span text:style-name="Strong_20_Emphasis"><text:span text:style-name="T4">Chương trình (program)</text:span></text:span><text:span text:style-name="T4"> là tập hợp các chỉ thị (instructions) mô tả cách một tiến trình hoạt động khi được chạy, trong khi </text:span><text:span text:style-name="Strong_20_Emphasis"><text:span text:style-name="T4">tiến trình (process)</text:span></text:span><text:span text:style-name="T4"> là một thể hiện cụ thể của chương trình đó tại thời điểm đang thực thi. Có thể tồn tại nhiều thể hiện của cùng một chương trình đang chạy; ví dụ, nhiều người dùng có thể đăng nhập vào cùng một máy tính tại cùng một thời điểm, mỗi người chạy một </text:span><text:span text:style-name="Strong_20_Emphasis"><text:span text:style-name="T4">shell</text:span></text:span><text:span text:style-name="T4">, tức là cùng một chương trình nhưng với nhiều thể hiện thực thi khác nhau.</text:span></text:p>
      <text:p text:style-name="P17"><text:span text:style-name="T4">Một tiến trình cũng là một </text:span><text:span text:style-name="Strong_20_Emphasis"><text:span text:style-name="T4">trừu tượng (abstraction)</text:span></text:span><text:span text:style-name="T4"> của </text:span><text:span text:style-name="Strong_20_Emphasis"><text:span text:style-name="T4">hệ điều hành (Operating System)</text:span></text:span><text:span text:style-name="T4">. Đây là cách để hệ điều hành quản lý các chương trình khác nhau và cô lập chúng trong các đơn vị riêng biệt. Thông qua sự trừu tượng này, hệ điều hành có thể cung cấp </text:span><text:span text:style-name="Strong_20_Emphasis"><text:span text:style-name="T4">tính cô lập (isolation)</text:span></text:span><text:span text:style-name="T4">, đảm bảo rằng một tiến trình không thể can thiệp vào tiến trình khác. Tiến trình cũng là đơn vị cốt lõi trong tài nguyên </text:span><text:span text:style-name="Strong_20_Emphasis"><text:span text:style-name="T4">quản lý tiến trình (Process Management)</text:span></text:span><text:span text:style-name="T4"> của hệ điều hành, với mục tiêu chính là xác định tiến trình nào được sử dụng CPU và vào thời điểm nào.</text:span></text:p>
      <text:p text:style-name="P17"><text:span text:style-name="T4">Trong bài học này, chúng ta sẽ lần theo </text:span><text:span text:style-name="Strong_20_Emphasis"><text:span text:style-name="T4">vòng đời sinh–tử của một tiến trình Unix</text:span></text:span><text:span text:style-name="T4">, từ thời điểm khởi đầu cho đến khi kết thúc hoàn toàn. Chúng ta sẽ bắt đầu từ điểm cuối — cái chết — rồi lần ngược trở lại quá trình hình thành. Trong suốt bài học, chúng ta sẽ sử dụng sơ đồ dưới đây để minh họa cho các khái niệm này.</text:span></text:p>
      <text:p text:style-name="P12"><draw:frame draw:style-name="fr1" draw:name="Image1" text:anchor-type="char" svg:width="5.6075in" svg:height="3.628in" draw:z-index="0"><draw:image xlink:href="Pictures/10000001000005C9000003BEE31BB3E0.png" xlink:type="simple" xlink:show="embed" xlink:actuate="onLoad" draw:mime-type="image/png"/></draw:frame></text:p>
      <text:p text:style-name="P21">Figure 1: C Program Life Cycle: Invocation through Termination</text:p>
      <text:p text:style-name="P22"><text:span text:style-name="T7">Hình trên mô tả luồng thực thi và kết thúc của một chương trình C từ khi bắt đầu cho đến khi trả quyền điều khiển lại cho hệ điều hành (kernel). Khi chương trình được chạy, nó không bắt đầu trực tiếp từ hàm </text:span><text:span text:style-name="Source_20_Text"><text:span text:style-name="T7">main</text:span></text:span><text:span text:style-name="T7"> mà trước đó các </text:span><text:span text:style-name="Strong_20_Emphasis"><text:span text:style-name="T8">C start-up routines</text:span></text:span><text:span text:style-name="T7"> (mã khởi động do </text:span><text:soft-page-break/><text:span text:style-name="T7">trình biên dịch/thư viện cung cấp) sẽ được gọi trước để thiết lập môi trường ban đầu như cấp phát stack, heap, xử lý tham số dòng lệnh, và chuẩn bị các tài nguyên cần thiết. Sau khi hoàn tất bước khởi tạo, chương trình mới chuyển vào </text:span><text:span text:style-name="Strong_20_Emphasis"><text:span text:style-name="T8">hàm main</text:span></text:span><text:span text:style-name="T7">, nơi logic chính của chương trình được thực thi, bao gồm việc gọi các </text:span><text:span text:style-name="Strong_20_Emphasis"><text:span text:style-name="T8">user/library functions</text:span></text:span><text:span text:style-name="T7"> (các hàm do người dùng định nghĩa hoặc từ thư viện chuẩn). Khi chương trình muốn kết thúc, nó có thể trả về từ </text:span><text:span text:style-name="Source_20_Text"><text:span text:style-name="T7">main</text:span></text:span><text:span text:style-name="T7"> hoặc gọi trực tiếp </text:span><text:span text:style-name="Strong_20_Emphasis"><text:span text:style-name="T8">hàm exit</text:span></text:span><text:span text:style-name="T7">; cả hai cách đều dẫn đến cùng một cơ chế kết thúc. Trong quá trình này, hệ thống sẽ thực hiện các </text:span><text:span text:style-name="Strong_20_Emphasis"><text:span text:style-name="T8">exit handler</text:span></text:span><text:span text:style-name="T7"> (các hàm đã đăng ký trước bằng </text:span><text:span text:style-name="Source_20_Text"><text:span text:style-name="T7">atexit</text:span></text:span><text:span text:style-name="T7">) theo thứ tự ngược lại khi đăng ký, đảm bảo giải phóng tài nguyên hoặc lưu trạng thái cần thiết. Sau đó, phần </text:span><text:span text:style-name="Strong_20_Emphasis"><text:span text:style-name="T8">standard I/O cleanup</text:span></text:span><text:span text:style-name="T7"> sẽ diễn ra, nghĩa là các buffer của </text:span><text:span text:style-name="Source_20_Text"><text:span text:style-name="T7">printf</text:span></text:span><text:span text:style-name="T7">, </text:span><text:span text:style-name="Source_20_Text"><text:span text:style-name="T7">fprintf</text:span></text:span><text:span text:style-name="T7">,… được flush (đẩy dữ liệu còn lại ra file/terminal), các file đang mở được đóng lại. Cuối cùng, toàn bộ quyền điều khiển được trả về cho </text:span><text:span text:style-name="Strong_20_Emphasis"><text:span text:style-name="T8">kernel</text:span></text:span><text:span text:style-name="T7">, nơi hệ điều hành thu hồi tài nguyên của tiến trình và kết thúc hoàn toàn chương trình.</text:span></text:p>
      <text:h text:style-name="P6" text:outline-level="2"><text:bookmark text:name="orgheadline7"/>2 The Death of a Process</text:h>
      <text:p text:style-name="P3"><text:span text:style-name="T4">Hãy bắt đầu với một câu hỏi khá đơn giản: Làm thế nào để chúng ta khiến một chương trình kết thúc trong mã nguồn? Có những cách không hợp lý để làm điều này – chẳng hạn như truy cập (dereference) vào con trỏ NULL và gây ra lỗi </text:span><text:span text:style-name="Strong_20_Emphasis"><text:span text:style-name="T4">segmentation fault (segfault)</text:span></text:span><text:span text:style-name="T4"> – nhưng cách tiêu chuẩn là để hàm </text:span><text:span text:style-name="Source_20_Text"><text:span text:style-name="T4">main()</text:span></text:span><text:span text:style-name="T4"> trả về (return). Vậy nếu chúng ta muốn chương trình kết thúc một cách hợp lý từ một vị trí khác trong chương trình, không phải từ </text:span><text:span text:style-name="Source_20_Text"><text:span text:style-name="T4">main()</text:span></text:span><text:span text:style-name="T4"> thì sao? Khi đó, chúng ta cần một cơ chế riêng để thực hiện việc này, và giải pháp là sử dụng lời gọi </text:span><text:span text:style-name="Source_20_Text"><text:span text:style-name="T4">exit</text:span></text:span><text:span text:style-name="T4">, tương tự như cách chúng ta đã làm trong lập trình bash.</text:span></text:p>
      <text:h text:style-name="P16" text:outline-level="3"><text:span text:style-name="T5">2.1 </text:span><text:span text:style-name="Source_20_Text"><text:span text:style-name="T5">exit()</text:span></text:span><text:span text:style-name="T5"> và </text:span><text:span text:style-name="Source_20_Text"><text:span text:style-name="T5">_exit()</text:span></text:span><text:span text:style-name="T5"> và </text:span><text:span text:style-name="Source_20_Text"><text:span text:style-name="T5">_Exit()</text:span></text:span></text:h>
      <text:p text:style-name="P12">Có ba cách để buộc một chương trình kết thúc:</text:p>
      <text:list text:style-name="L1">
        <text:list-item>
          <text:p text:style-name="P18"><text:span text:style-name="Source_20_Text"><text:span text:style-name="T4">_exit()</text:span></text:span><text:span text:style-name="T4"> : Lời gọi hệ thống (</text:span><text:span text:style-name="Strong_20_Emphasis"><text:span text:style-name="T4">system call</text:span></text:span><text:span text:style-name="T4">) yêu cầu hệ điều hành chấm dứt tiến trình ngay lập tức mà không thực thi thêm bất kỳ đoạn mã nào khác.</text:span></text:p>
        </text:list-item>
        <text:list-item>
          <text:p text:style-name="P18"><text:span text:style-name="Source_20_Text"><text:span text:style-name="T4">exit()</text:span></text:span><text:span text:style-name="T4"> : Thủ tục kết thúc trong </text:span><text:span text:style-name="Strong_20_Emphasis"><text:span text:style-name="T4">thư viện chuẩn C (C Standard Library)</text:span></text:span><text:span text:style-name="T4">, sẽ chấm dứt tiến trình một cách “sạch” bằng cách gọi thêm các đoạn mã bổ sung theo yêu cầu của người dùng và xử lý các thao tác I/O, đóng các file đang dang dở.</text:span></text:p>
        </text:list-item>
        <text:list-item>
          <text:p text:style-name="P18"><text:span text:style-name="Source_20_Text"><text:span text:style-name="T4">_Exit()</text:span></text:span><text:span text:style-name="T4"> : Thủ tục kết thúc trong </text:span><text:span text:style-name="Strong_20_Emphasis"><text:span text:style-name="T4">thư viện chuẩn C</text:span></text:span><text:span text:style-name="T4">, sẽ chấm dứt tiến trình ngay lập tức, về cơ bản là một lớp bao (</text:span><text:span text:style-name="Strong_20_Emphasis"><text:span text:style-name="T4">wrapper</text:span></text:span><text:span text:style-name="T4">) cho </text:span><text:span text:style-name="Source_20_Text"><text:span text:style-name="T4">_exit()</text:span></text:span><text:span text:style-name="T4">.</text:span></text:p>
        </text:list-item>
      </text:list>
      <text:p text:style-name="P12">Để hiểu rõ hơn sự khác biệt này, chúng ta có thể tham khảo lại sơ đồ:</text:p>
      <text:p text:style-name="P15"><draw:frame draw:style-name="fr1" draw:name="Image2" text:anchor-type="char" svg:width="5.2035in" svg:height="3.3661in" draw:z-index="1"><draw:image xlink:href="Pictures/10000001000005C9000003BEC734EEB6.png" xlink:type="simple" xlink:show="embed" xlink:actuate="onLoad" draw:mime-type="image/png"/></draw:frame><text:soft-page-break/></text:p>
      <text:p text:style-name="P4"><text:span text:style-name="T6">Figure 2: C Program Life Cycle: </text:span><text:span text:style-name="Source_20_Text"><text:span text:style-name="T6">exit()</text:span></text:span><text:span text:style-name="T6"> vs. </text:span><text:span text:style-name="Source_20_Text"><text:span text:style-name="T6">_exit()</text:span></text:span></text:p>
      <text:p text:style-name="P3"><text:span text:style-name="Source_20_Text"><text:span text:style-name="T4">Luồng của các mũi tên màu xanh lá biểu thị lời gọi hệ thống _exit(), dẫn đến việc chấm dứt tiến trình trực tiếp. Khi một tiến trình bị chấm dứt, </text:span></text:span><text:span text:style-name="Source_20_Text"><text:span text:style-name="Strong_20_Emphasis"><text:span text:style-name="T4">kernel (nhân hệ điều hành)</text:span></text:span></text:span><text:span text:style-name="Source_20_Text"><text:span text:style-name="T4"> sẽ được gọi để lựa chọn tiến trình nào sẽ chạy tiếp theo, đó là lý do tại sao luồng chuyển hướng về phía kernel. Tuy nhiên, một lời gọi exit() (không có dấu gạch dưới), tại bất kỳ điểm nào trong quá trình thực thi chương trình, sẽ khởi động một tập hợp các hành động riêng biệt, bao gồm việc thực thi các </text:span></text:span><text:span text:style-name="Source_20_Text"><text:span text:style-name="Strong_20_Emphasis"><text:span text:style-name="T4">exit handlers</text:span></text:span></text:span><text:span text:style-name="Source_20_Text"><text:span text:style-name="T4"> và các thủ tục </text:span></text:span><text:span text:style-name="Source_20_Text"><text:span text:style-name="Strong_20_Emphasis"><text:span text:style-name="T4">I/O</text:span></text:span></text:span><text:span text:style-name="Source_20_Text"><text:span text:style-name="T4">. Điều này được biểu diễn bằng màu đỏ trong sơ đồ, và cuối cùng, khi các thủ tục kết thúc hoàn tất, exit() sẽ gọi _exit() để thực hiện việc chấm dứt cuối cùng. Không được minh họa trong hình là _Exit(), có hành vi giống với _exit().</text:span></text:span></text:p>
      <text:p text:style-name="P17"><text:span text:style-name="T4">Giống như nhiều thủ tục của hệ điều hành mà chúng ta đã thảo luận trong lớp học này, cơ chế kết thúc tiến trình (exit) có cả phiên bản </text:span><text:span text:style-name="Strong_20_Emphasis"><text:span text:style-name="T4">lời gọi hệ thống (system call)</text:span></text:span><text:span text:style-name="T4"> và phiên bản </text:span><text:span text:style-name="Strong_20_Emphasis"><text:span text:style-name="T4">lời gọi thư viện (library call)</text:span></text:span><text:span text:style-name="T4">. Nhìn chung, khi lập trình, bạn thường chỉ sử dụng hàm thư viện, điều này là hoàn toàn ổn; tuy nhiên, để trở thành một lập trình viên hiệu quả, bạn cần hiểu các cơ chế hệ điều hành bên dưới đã hỗ trợ và cho phép các hàm thư viện này hoạt động.</text:span></text:p>
      <text:h text:style-name="P2" text:outline-level="3"><text:bookmark text:name="orgheadline3"/><text:span text:style-name="Source_20_Text"><text:span text:style-name="T5">2.2 I/O Buffering and Exit Procedures</text:span></text:span></text:h>
      <text:p text:style-name="P3"><text:span text:style-name="Source_20_Text"><text:span text:style-name="T4">Một khía cạnh của thủ tục kết thúc trong </text:span></text:span><text:span text:style-name="Source_20_Text"><text:span text:style-name="Strong_20_Emphasis"><text:span text:style-name="T4">thư viện chuẩn C (C standard library)</text:span></text:span></text:span><text:span text:style-name="Source_20_Text"><text:span text:style-name="T4"> là xử lý việc </text:span></text:span><text:span text:style-name="Source_20_Text"><text:span text:style-name="Strong_20_Emphasis"><text:span text:style-name="T4">đệm I/O (I/O buffering)</text:span></text:span></text:span><text:span text:style-name="Source_20_Text"><text:span text:style-name="T4"> xảy ra bên trong thư viện này. Điều này được minh họa trong sơ đồ như sau:</text:span></text:span></text:p>
      <text:p text:style-name="P4"><draw:frame draw:style-name="fr1" draw:name="Image3" text:anchor-type="char" svg:width="5.3598in" svg:height="3.1862in" draw:z-index="2"><draw:image xlink:href="Pictures/10000001000003B3000002333B9D1C1B.png" xlink:type="simple" xlink:show="embed" xlink:actuate="onLoad" draw:mime-type="image/png"/></draw:frame><text:soft-page-break/><text:span text:style-name="Source_20_Text"><text:span text:style-name="T6">Figure 3: C Program Life Cycle: Standard I/O Cleanup</text:span></text:span></text:p>
      <text:p text:style-name="P3"><text:span text:style-name="Source_20_Text"><text:span text:style-name="Strong_20_Emphasis"><text:span text:style-name="T4">Đệm I/O (I/O buffering)</text:span></text:span></text:span><text:span text:style-name="Source_20_Text"><text:span text:style-name="T4"> trong </text:span></text:span><text:span text:style-name="Source_20_Text"><text:span text:style-name="Strong_20_Emphasis"><text:span text:style-name="T4">thư viện chuẩn C</text:span></text:span></text:span><text:span text:style-name="Source_20_Text"><text:span text:style-name="T4"> là một cơ chế nhằm giảm số lượng </text:span></text:span><text:span text:style-name="Source_20_Text"><text:span text:style-name="Strong_20_Emphasis"><text:span text:style-name="T4">lời gọi hệ thống (system calls)</text:span></text:span></text:span><text:span text:style-name="Source_20_Text"><text:span text:style-name="T4">, chẳng hạn như write(), vốn có chi phí cao. Một lời gọi hệ thống yêu cầu toàn bộ tiến trình phải tạm dừng, trạng thái của nó được lưu lại, và bị hoán đổi ra ngoài để nhường quyền cho hệ điều hành. Hệ điều hành sau đó thực hiện hành động cần thiết, và khi hoàn tất, tiến trình người dùng phải được hoán đổi trở lại để tiếp tục thực thi. Chỉ riêng việc liệt kê các bước của một </text:span></text:span><text:span text:style-name="Source_20_Text"><text:span text:style-name="Strong_20_Emphasis"><text:span text:style-name="T4">context switch (chuyển ngữ cảnh)</text:span></text:span></text:span><text:span text:style-name="Source_20_Text"><text:span text:style-name="T4"> cũng đã cho thấy sự phức tạp, và đây là một thao tác tốn kém, chỉ nên thực hiện khi thực sự cần thiết.</text:span></text:span></text:p>
      <text:p text:style-name="P17"><text:span text:style-name="T4">Đệm (buffering) là một cách để tránh việc gọi hệ thống quá mức. Khi bạn gọi </text:span><text:span text:style-name="Source_20_Text"><text:span text:style-name="T4">printf()</text:span></text:span><text:span text:style-name="T4"> hoặc các hàm I/O chuẩn khác để in ra terminal hoặc file, việc in </text:span><text:span text:style-name="Strong_20_Emphasis"><text:span text:style-name="T4">không diễn ra ngay lập tức</text:span></text:span><text:span text:style-name="T4">. Thay vào đó, dữ liệu được đưa vào bộ đệm (buffer), tức là được lưu trữ tạm thời và chờ để hoàn tất. Việc in sẽ được thực hiện (buffer bị xả – </text:span><text:span text:style-name="Emphasis"><text:span text:style-name="T4">flush</text:span></text:span><text:span text:style-name="T4">) khi bộ đệm đầy, tức là đã đủ số byte và không thể lưu thêm, hoặc khi một dòng hoàn tất, thường được xác định bằng việc in ký tự xuống dòng (</text:span><text:span text:style-name="Source_20_Text"><text:span text:style-name="T4">\n</text:span></text:span><text:span text:style-name="T4">).</text:span></text:p>
      <text:p text:style-name="P17"><text:span text:style-name="T4">Vì vậy, nếu chúng ta xem xét chương trình </text:span><text:span text:style-name="Strong_20_Emphasis"><text:span text:style-name="T4">hello-world</text:span></text:span><text:span text:style-name="T4">:</text:span></text:p>
      <table:table table:name="Table1" table:style-name="Table1">
        <table:table-column table:style-name="Table1.A"/>
        <table:table-row table:style-name="Table1.1">
          <table:table-cell table:style-name="Table1.A1" office:value-type="string">
            <text:p text:style-name="P7">int main(){</text:p>
            <text:p text:style-name="P10"><text:s text:c="3"/>printf("Hello World!\n");</text:p>
            <text:p text:style-name="P14">}</text:p>
          </table:table-cell>
        </table:table-row>
      </table:table>
      <text:p text:style-name="P3"><text:span text:style-name="Source_20_Text"><text:span text:style-name="T4">Việc in chuỗi "Hello World!" bao gồm ký tự xuống dòng (\n), do đó bộ đệm sẽ được xả (</text:span></text:span><text:span text:style-name="Source_20_Text"><text:span text:style-name="Strong_20_Emphasis"><text:span text:style-name="T4">flush</text:span></text:span></text:span><text:span text:style-name="Source_20_Text"><text:span text:style-name="T4">) và "Hello World!" được in ra terminal. Tuy nhiên, hãy xem xét phiên bản sau của chương trình </text:span></text:span><text:span text:style-name="Source_20_Text"><text:span text:style-name="Strong_20_Emphasis"><text:span text:style-name="T4">hello-world</text:span></text:span></text:span><text:span text:style-name="Source_20_Text"><text:span text:style-name="T4">:</text:span></text:span></text:p>
      <table:table table:name="Table2" table:style-name="Table2">
        <table:table-column table:style-name="Table2.A"/>
        <table:table-row>
          <table:table-cell table:style-name="Table2.A1" office:value-type="string">
            <text:p text:style-name="P7">int main(){</text:p>
            <text:p text:style-name="P10"><text:s text:c="3"/>printf("Hello World!");</text:p>
            <text:p text:style-name="P11">}</text:p>
          </table:table-cell>
        </table:table-row>
      </table:table>
      <text:p text:style-name="P3"><text:span text:style-name="Source_20_Text"><text:span text:style-name="T4">Lần này không có ký tự xuống dòng, nhưng "Hello World" vẫn được in ra terminal. Tại sao?</text:span></text:span></text:p>
      <text:p text:style-name="P17"><text:soft-page-break/><text:span text:style-name="T4">Khi hàm </text:span><text:span text:style-name="Source_20_Text"><text:span text:style-name="T4">main()</text:span></text:span><text:span text:style-name="T4"> trả về, thực chất nó trả về một hàm khác trong các </text:span><text:span text:style-name="Strong_20_Emphasis"><text:span text:style-name="T4">startup routines của C</text:span></text:span><text:span text:style-name="T4">, và hàm này sẽ gọi </text:span><text:span text:style-name="Source_20_Text"><text:span text:style-name="T4">exit()</text:span></text:span><text:span text:style-name="T4">. Sau đó, </text:span><text:span text:style-name="Source_20_Text"><text:span text:style-name="T4">exit()</text:span></text:span><text:span text:style-name="T4"> sẽ thực hiện việc dọn dẹp (</text:span><text:span text:style-name="Strong_20_Emphasis"><text:span text:style-name="T4">cleanup</text:span></text:span><text:span text:style-name="T4">) cho I/O chuẩn, bao gồm việc xả (</text:span><text:span text:style-name="Strong_20_Emphasis"><text:span text:style-name="T4">flush</text:span></text:span><text:span text:style-name="T4">) toàn bộ dữ liệu còn trong bộ đệm.</text:span></text:p>
      <text:p text:style-name="P17"><text:span text:style-name="T4">Tuy nhiên, khi bạn gọi </text:span><text:span text:style-name="Source_20_Text"><text:span text:style-name="T4">_exit()</text:span></text:span><text:span text:style-name="T4">, các bộ đệm sẽ </text:span><text:span text:style-name="Strong_20_Emphasis"><text:span text:style-name="T4">không được xóa</text:span></text:span><text:span text:style-name="T4">. Tiến trình sẽ kết thúc ngay lập tức. Bạn có thể thấy sự khác biệt giữa hai cơ chế này trong hai chương trình sau:</text:span></text:p>
      <table:table table:name="Table3" table:style-name="Table3">
        <table:table-column table:style-name="Table3.A"/>
        <table:table-column table:style-name="Table3.B"/>
        <table:table-row>
          <table:table-cell table:style-name="Table3.A1" office:value-type="string">
            <text:p text:style-name="P7">/*exit_IO_demo.c*/</text:p>
            <text:p text:style-name="P10">#include &lt;unistd.h&gt;</text:p>
            <text:p text:style-name="P10">#include &lt;stdlib.h&gt;</text:p>
            <text:p text:style-name="P10">#include &lt;stdio.h&gt;</text:p>
            <text:p text:style-name="P11"/>
            <text:p text:style-name="P10">int main(){</text:p>
            <text:p text:style-name="P11"/>
            <text:p text:style-name="P10"><text:s text:c="2"/>// I/O buffered since no newline</text:p>
            <text:p text:style-name="P10"><text:s text:c="2"/>printf("Will print");</text:p>
            <text:p text:style-name="P11"/>
            <text:p text:style-name="P10"><text:s text:c="2"/>exit(0); //C standard exit</text:p>
            <text:p text:style-name="P11"/>
            <text:p text:style-name="P11">}</text:p>
          </table:table-cell>
          <table:table-cell table:style-name="Table3.B1" office:value-type="string">
            <text:p text:style-name="P7">/*_exit_IO_demo.c*/</text:p>
            <text:p text:style-name="P10">#include &lt;unistd.h&gt;</text:p>
            <text:p text:style-name="P10">#include &lt;stdlib.h&gt;</text:p>
            <text:p text:style-name="P10">#include &lt;stdio.h&gt;</text:p>
            <text:p text:style-name="P11"/>
            <text:p text:style-name="P10">int main(){</text:p>
            <text:p text:style-name="P11"/>
            <text:p text:style-name="P10"><text:s text:c="2"/>// I/O buffered since no newline</text:p>
            <text:p text:style-name="P10"><text:s text:c="2"/>printf("Does not print"); </text:p>
            <text:p text:style-name="P11"/>
            <text:p text:style-name="P10"><text:s text:c="2"/>_exit(0); //immediate exit!</text:p>
            <text:p text:style-name="P11"/>
            <text:p text:style-name="P13">}</text:p>
          </table:table-cell>
        </table:table-row>
      </table:table>
      <text:p text:style-name="P3"><text:span text:style-name="Source_20_Text"><text:span text:style-name="T4">Bạn không cần phải phụ thuộc vào các thủ tục exit để xóa (flush) các bộ đệm I/O. Thay vào đó, bạn có thể trực tiếp xả bộ đệm bằng hàm thư viện fflush(). Ví dụ:</text:span></text:span></text:p>
      <table:table table:name="Table4" table:style-name="Table4">
        <table:table-column table:style-name="Table4.A"/>
        <table:table-row>
          <table:table-cell table:style-name="Table4.A1" office:value-type="string">
            <text:p text:style-name="P9">int main(){</text:p>
            <text:p text:style-name="P11"/>
            <text:p text:style-name="P10"><text:s text:c="2"/>// I/O buffered since no newline</text:p>
            <text:p text:style-name="P10"><text:s text:c="2"/>printf("Will print once flushed"); </text:p>
            <text:p text:style-name="P10"><text:s text:c="2"/>fflush(stdout); // flushing stdout's buffer, printing</text:p>
            <text:p text:style-name="P11"/>
            <text:p text:style-name="P10"><text:s text:c="2"/>_exit(0); //immediate exit!</text:p>
            <text:p text:style-name="P11"/>
            <text:p text:style-name="P11">}</text:p>
          </table:table-cell>
        </table:table-row>
      </table:table>
      <text:p text:style-name="P3"><text:span text:style-name="Source_20_Text"><text:span text:style-name="T4">Hàm fflush() nhận một đối số kiểu FILE * và sẽ thực hiện việc đọc/ghi toàn bộ dữ liệu hiện đang được lưu trong bộ đệm. Ngoài ra, còn có một hàm tương tự là fpurge(), hàm này sẽ xóa toàn bộ dữ liệu trong các bộ đệm.</text:span></text:span></text:p>
      <text:h text:style-name="P2" text:outline-level="3"><text:bookmark text:name="orgheadline4"/><text:soft-page-break/><text:span text:style-name="Source_20_Text"><text:span text:style-name="T5">2.3 Changing I/O Buffering policy</text:span></text:span></text:h>
      <text:p text:style-name="P3"><text:span text:style-name="Source_20_Text"><text:span text:style-name="T4">Chính sách </text:span></text:span><text:span text:style-name="Source_20_Text"><text:span text:style-name="Strong_20_Emphasis"><text:span text:style-name="T4">buffering (đệm)</text:span></text:span></text:span><text:span text:style-name="Source_20_Text"><text:span text:style-name="T4"> ở mức tiến trình thay đổi tùy theo cơ chế nhập/xuất. Ví dụ, hãy xét một chương trình in ra stderr thay vì stdout.</text:span></text:span></text:p>
      <table:table table:name="Table5" table:style-name="Table5">
        <table:table-column table:style-name="Table5.A"/>
        <table:table-row>
          <table:table-cell table:style-name="Table5.A1" office:value-type="string">
            <text:p text:style-name="P7">/*_exit_IO_stderr.c*/</text:p>
            <text:p text:style-name="P10">#include &lt;unistd.h&gt;</text:p>
            <text:p text:style-name="P10">#include &lt;stdlib.h&gt;</text:p>
            <text:p text:style-name="P10">#include &lt;stdio.h&gt;</text:p>
            <text:p text:style-name="P11"/>
            <text:p text:style-name="P10">int main(){</text:p>
            <text:p text:style-name="P11"/>
            <text:p text:style-name="P10"><text:s text:c="2"/>// I/O not buffered for stderr <text:s text:c="140"/></text:p>
            <text:p text:style-name="P10"><text:s text:c="2"/>fprintf(stderr, "Will print b/c stderr is unbuffered");</text:p>
            <text:p text:style-name="P11"/>
            <text:p text:style-name="P10"><text:s text:c="2"/>_exit(0); //immediate exit! <text:s text:c="143"/></text:p>
            <text:p text:style-name="P11"/>
            <text:p text:style-name="P11">}</text:p>
          </table:table-cell>
        </table:table-row>
      </table:table>
      <text:p text:style-name="P3"><text:span text:style-name="Source_20_Text"><text:span text:style-name="T4">Ở một khía cạnh nào đó, đây là một chính sách hợp lý. Bạn muốn các thông báo lỗi được hiển thị ngay lập tức, không phải chờ đến khi bộ đệm “thuận tiện” mới ghi ra. Tuy nhiên, điều này cũng có một tác dụng phụ: các thao tác ghi vào stderr sẽ tốn kém hơn vì yêu cầu </text:span></text:span><text:span text:style-name="Source_20_Text"><text:span text:style-name="Strong_20_Emphasis"><text:span text:style-name="T4">context switch (chuyển ngữ cảnh)</text:span></text:span></text:span><text:span text:style-name="Source_20_Text"><text:span text:style-name="T4"> ngay lập tức.</text:span></text:span></text:p>
      <text:p text:style-name="P17"><text:span text:style-name="T4">Chúng ta có thể thay đổi chính sách đệm cho một luồng I/O. Mặc định, </text:span><text:span text:style-name="Source_20_Text"><text:span text:style-name="T4">stdout</text:span></text:span><text:span text:style-name="T4"> và </text:span><text:span text:style-name="Source_20_Text"><text:span text:style-name="T4">stdin</text:span></text:span><text:span text:style-name="T4"> được </text:span><text:span text:style-name="Strong_20_Emphasis"><text:span text:style-name="T4">line buffered (đệm theo dòng)</text:span></text:span><text:span text:style-name="T4">, nghĩa là dữ liệu vào/ra sẽ được đệm cho đến khi gặp ký tự xuống dòng (</text:span><text:span text:style-name="Source_20_Text"><text:span text:style-name="T4">\n</text:span></text:span><text:span text:style-name="T4">). </text:span><text:span text:style-name="Source_20_Text"><text:span text:style-name="T4">stderr</text:span></text:span><text:span text:style-name="T4"> là </text:span><text:span text:style-name="Strong_20_Emphasis"><text:span text:style-name="T4">unbuffered (không đệm)</text:span></text:span><text:span text:style-name="T4">, như đã mô tả ở trên. Ngoài ra còn có một lựa chọn thứ ba là </text:span><text:span text:style-name="Strong_20_Emphasis"><text:span text:style-name="T4">fully buffered (đệm toàn phần)</text:span></text:span><text:span text:style-name="T4">, nghĩa là việc đọc/ghi chỉ xảy ra khi bộ đệm đầy.</text:span></text:p>
      <text:p text:style-name="P17"><text:span text:style-name="T4">Lời gọi thư viện để thay đổi chính sách đệm là </text:span><text:span text:style-name="Source_20_Text"><text:span text:style-name="T4">setvbuf()</text:span></text:span><text:span text:style-name="T4">, với khai báo hàm như sau:</text:span></text:p>
      <table:table table:name="Table6" table:style-name="Table6">
        <table:table-column table:style-name="Table6.A"/>
        <table:table-row>
          <table:table-cell table:style-name="Table6.A1" office:value-type="string">
            <text:p text:style-name="P7">int setvbuf(FILE *stream, char *buf, int mode, size_t size);</text:p>
          </table:table-cell>
        </table:table-row>
      </table:table>
      <text:p text:style-name="P3"><text:span text:style-name="Source_20_Text"><text:span text:style-name="T4">Bạn có thể chọn luồng I/O cần tác động, chẳng hạn như stderr hoặc stdout, và cũng có thể cung cấp vùng nhớ cho bộ đệm cùng với kích thước của nó. Tham số mode có các lựa chọn sau:</text:span></text:span></text:p>
      <text:list text:style-name="L2">
        <text:list-item>
          <text:p text:style-name="P19"><text:span text:style-name="Source_20_Text"><text:span text:style-name="T4">_IONBF</text:span></text:span><text:span text:style-name="T4"> (unbuffered): dữ liệu được ghi ngay lập tức xuống thiết bị thông qua lời gọi hệ thống </text:span><text:span text:style-name="Source_20_Text"><text:span text:style-name="T4">write()</text:span></text:span></text:p>
        </text:list-item>
        <text:list-item>
          <text:p text:style-name="P19"><text:span text:style-name="Source_20_Text"><text:span text:style-name="T4">_IOLBF</text:span></text:span><text:span text:style-name="T4"> (line buffered): dữ liệu được ghi xuống thiết bị bằng </text:span><text:span text:style-name="Source_20_Text"><text:span text:style-name="T4">write()</text:span></text:span><text:span text:style-name="T4"> khi gặp ký tự xuống dòng hoặc khi bộ đệm đầy</text:span></text:p>
        </text:list-item>
        <text:list-item>
          <text:p text:style-name="P19"><text:soft-page-break/><text:span text:style-name="Source_20_Text"><text:span text:style-name="T4">_IOFBF</text:span></text:span><text:span text:style-name="T4"> (fully buffered): dữ liệu chỉ được ghi xuống thiết bị bằng </text:span><text:span text:style-name="Source_20_Text"><text:span text:style-name="T4">write()</text:span></text:span><text:span text:style-name="T4"> khi bộ đệm đầy</text:span></text:p>
        </text:list-item>
      </text:list>
      <text:p text:style-name="P17"><text:span text:style-name="T4">Nhìn chung, bạn không cần phải chỉ định bộ đệm mới, mà chỉ cần thay đổi chế độ. Ví dụ, nếu chúng ta muốn đặt </text:span><text:span text:style-name="Source_20_Text"><text:span text:style-name="T4">stderr</text:span></text:span><text:span text:style-name="T4"> thành </text:span><text:span text:style-name="Strong_20_Emphasis"><text:span text:style-name="T4">line buffered</text:span></text:span><text:span text:style-name="T4">, ta có thể chỉnh sửa chương trình ở trên như sau, và kết quả là nó sẽ không còn in ra nữa…</text:span></text:p>
      <table:table table:name="Table7" table:style-name="Table7">
        <table:table-column table:style-name="Table7.A"/>
        <table:table-row table:style-name="Table7.1">
          <table:table-cell table:style-name="Table7.A1" office:value-type="string">
            <text:p text:style-name="P7">/*_exit_IO_setvbuf.c*/</text:p>
            <text:p text:style-name="P10">#include &lt;unistd.h&gt;</text:p>
            <text:p text:style-name="P10">#include &lt;stdlib.h&gt;</text:p>
            <text:p text:style-name="P10">#include &lt;stdio.h&gt;</text:p>
            <text:p text:style-name="P11"/>
            <text:p text:style-name="P10">int main(){</text:p>
            <text:p text:style-name="P11"/>
            <text:p text:style-name="P10"><text:s text:c="2"/>//stderr is now Line buffered <text:s text:c="141"/></text:p>
            <text:p text:style-name="P10"><text:s text:c="2"/>setvbuf(stderr, NULL, _IOLBF, 0);</text:p>
            <text:p text:style-name="P11"/>
            <text:p text:style-name="P10"><text:s text:c="2"/>// I/O now buffered for stderr <text:s text:c="140"/></text:p>
            <text:p text:style-name="P10"><text:s text:c="2"/>fprintf(stderr, "Will NOT print b/c stderr is now line buffered");</text:p>
            <text:p text:style-name="P11"/>
            <text:p text:style-name="P10"><text:s text:c="2"/>_exit(0); //immediate exit! <text:s text:c="143"/></text:p>
            <text:p text:style-name="P11"/>
            <text:p text:style-name="P11">}</text:p>
          </table:table-cell>
        </table:table-row>
      </table:table>
      <text:h text:style-name="P2" text:outline-level="3"><text:bookmark text:name="orgheadline5"/><text:soft-page-break/><text:span text:style-name="Source_20_Text"><text:span text:style-name="T5">2.4 atexit() Exit Handlers</text:span></text:span></text:h>
      <text:p text:style-name="P3"><text:span text:style-name="Source_20_Text"><text:span text:style-name="T4">Cho đến nay, trong ngữ cảnh </text:span></text:span><text:span text:style-name="Source_20_Text"><text:span text:style-name="Strong_20_Emphasis"><text:span text:style-name="T4">đệm I/O (I/O buffering)</text:span></text:span></text:span><text:span text:style-name="Source_20_Text"><text:span text:style-name="T4">, chúng ta đã thấy rằng thủ tục exit() sẽ thực hiện một số hành động trước khi tiến hành kết thúc cuối cùng thông qua _exit(). Vậy nếu bạn muốn bổ sung thêm các xử lý trước khi chương trình kết thúc thì sao? Bạn có thể làm điều đó bằng </text:span></text:span><text:span text:style-name="Source_20_Text"><text:span text:style-name="Strong_20_Emphasis"><text:span text:style-name="T4">exit handlers</text:span></text:span></text:span><text:span text:style-name="Source_20_Text"><text:span text:style-name="T4">.</text:span></text:span></text:p>
      <text:p text:style-name="P3"><draw:frame draw:style-name="fr1" draw:name="Image4" text:anchor-type="char" svg:width="5.198in" svg:height="4.5854in" draw:z-index="3"><draw:image xlink:href="Pictures/100000010000023D0000030EA19999DF.png" xlink:type="simple" xlink:show="embed" xlink:actuate="onLoad" draw:mime-type="image/png"/></draw:frame><text:span text:style-name="Source_20_Text"><text:span text:style-name="T4"/></text:span></text:p>
      <text:p text:style-name="P4"><text:span text:style-name="Source_20_Text"><text:span text:style-name="T6">Figure 4: C Program Life Cycle: exit handlers</text:span></text:span></text:p>
      <text:p text:style-name="P3"><text:span text:style-name="Source_20_Text"><text:span text:style-name="Strong_20_Emphasis"><text:span text:style-name="T4">Exit handlers</text:span></text:span></text:span><text:span text:style-name="Source_20_Text"><text:span text:style-name="T4"> là các hàm sẽ được gọi tự động mỗi khi chương trình thực hiện exit(). Thông thường, bạn có thể đăng ký tối đa 32 exit handler bằng hàm thư viện atexit(). Thứ tự thực thi của các exit handler là </text:span></text:span><text:span text:style-name="Source_20_Text"><text:span text:style-name="Strong_20_Emphasis"><text:span text:style-name="T4">ngược lại với thứ tự đăng ký</text:span></text:span></text:span><text:span text:style-name="Source_20_Text"><text:span text:style-name="T4"> (LIFO). Hãy xem xét chương trình dưới đây:</text:span></text:span></text:p>
      <table:table table:name="Table8" table:style-name="Table8">
        <table:table-column table:style-name="Table8.A"/>
        <table:table-row>
          <table:table-cell table:style-name="Table8.A1" office:value-type="string">
            <text:p text:style-name="P7">/*exit_handler_demo.c*/</text:p>
            <text:p text:style-name="P10">#include &lt;stdio.h&gt;</text:p>
            <text:p text:style-name="P10">#include &lt;stdlib.h&gt;</text:p>
            <text:p text:style-name="P11"/>
            <text:p text:style-name="P10">void my_exit1(){</text:p>
            <text:p text:style-name="P10"><text:s text:c="2"/>printf("FIRST Exit Handler\n");</text:p>
            <text:p text:style-name="P11">}</text:p>
            <text:p text:style-name="P11"/>
            <text:p text:style-name="P10"><text:soft-page-break/>void my_exit2(){</text:p>
            <text:p text:style-name="P10"><text:s text:c="2"/>printf("SECOND Exit Handler\n");</text:p>
            <text:p text:style-name="P11">}</text:p>
            <text:p text:style-name="P11"/>
            <text:p text:style-name="P10">int main(){</text:p>
            <text:p text:style-name="P11"/>
            <text:p text:style-name="P10"><text:s text:c="2"/>//exit handers execute in reverse order of registration <text:s text:c="115"/></text:p>
            <text:p text:style-name="P11"><text:s text:c="2"/>atexit(my_exit1);</text:p>
            <text:p text:style-name="P11"><text:s text:c="2"/>atexit(my_exit2);</text:p>
            <text:p text:style-name="P10"><text:s text:c="2"/>//my_exit2 will run before my_exit1 <text:s text:c="135"/></text:p>
            <text:p text:style-name="P11"/>
            <text:p text:style-name="P10"><text:s text:c="2"/>return; //implicitly calls exit() <text:s text:c="136"/></text:p>
            <text:p text:style-name="P11">}</text:p>
          </table:table-cell>
        </table:table-row>
      </table:table>
      <text:p text:style-name="P3"><text:span text:style-name="Source_20_Text"><text:span text:style-name="T4">The output of this program is: </text:span></text:span></text:p>
      <table:table table:name="Table9" table:style-name="Table9">
        <table:table-column table:style-name="Table9.A"/>
        <table:table-row>
          <table:table-cell table:style-name="Table9.A1" office:value-type="string">
            <text:p text:style-name="P8">#&gt; ./exit_hander_demo</text:p>
            <text:p text:style-name="P11">SECOND Exit Handler</text:p>
            <text:p text:style-name="P11">FIRST Exit Handler</text:p>
          </table:table-cell>
        </table:table-row>
      </table:table>
      <text:p text:style-name="P3"><text:span text:style-name="Source_20_Text"><text:span text:style-name="T4">Một vài điểm khác cần lưu ý ở đây là đối số của atexit() là một </text:span></text:span><text:span text:style-name="Source_20_Text"><text:span text:style-name="Strong_20_Emphasis"><text:span text:style-name="T4">hàm</text:span></text:span></text:span><text:span text:style-name="Source_20_Text"><text:span text:style-name="T4">. Đây là lần đầu tiên chúng ta sử dụng </text:span></text:span><text:span text:style-name="Source_20_Text"><text:span text:style-name="Strong_20_Emphasis"><text:span text:style-name="T4">con trỏ hàm (function pointer)</text:span></text:span></text:span><text:span text:style-name="Source_20_Text"><text:span text:style-name="T4">, hay nói cách khác là một tham chiếu đến một hàm. Sau này trong khóa học, chúng ta sẽ làm điều tương tự khi thiết lập </text:span></text:span><text:span text:style-name="Source_20_Text"><text:span text:style-name="Strong_20_Emphasis"><text:span text:style-name="T4">signal handlers</text:span></text:span></text:span><text:span text:style-name="Source_20_Text"><text:span text:style-name="T4">, tức là đăng ký một hàm sẽ được gọi khi một sự kiện xảy ra.</text:span></text:span></text:p>
      <text:h text:style-name="P2" text:outline-level="3"><text:bookmark text:name="orgheadline6"/><text:span text:style-name="Source_20_Text"><text:span text:style-name="T5">2.5 Exit Statuses</text:span></text:span></text:h>
      <text:p text:style-name="P3"><text:span text:style-name="Source_20_Text"><text:span text:style-name="T4">Phần cuối cùng của “bức tranh” về exit() là </text:span></text:span><text:span text:style-name="Source_20_Text"><text:span text:style-name="Strong_20_Emphasis"><text:span text:style-name="T4">trạng thái thoát (exit status)</text:span></text:span></text:span><text:span text:style-name="Source_20_Text"><text:span text:style-name="T4">. Mỗi chương trình khi kết thúc đều trả về một trạng thái. Trạng thái này có thể được kiểm tra để biết thông tin về quá trình thực thi của tiến trình, ví dụ: chương trình kết thúc thành công hay thất bại, hay xảy ra lỗi?</text:span></text:span></text:p>
      <text:p text:style-name="P17"><text:span text:style-name="T4">Bạn có thể thiết lập </text:span><text:span text:style-name="Strong_20_Emphasis"><text:span text:style-name="T4">exit status</text:span></text:span><text:span text:style-name="T4"> của chương trình thông qua các lời gọi </text:span><text:span text:style-name="Source_20_Text"><text:span text:style-name="T4">exit()</text:span></text:span><text:span text:style-name="T4"> khác nhau:</text:span></text:p>
      <table:table table:name="Table10" table:style-name="Table10">
        <table:table-column table:style-name="Table10.A"/>
        <table:table-row>
          <table:table-cell table:style-name="Table10.A1" office:value-type="string">
            <text:p text:style-name="P7">_exit(int status);</text:p>
            <text:p text:style-name="P11"/>
            <text:p text:style-name="P10">exit(int status);</text:p>
            <text:p text:style-name="P11"/>
            <text:p text:style-name="P10">_Exit(int status);</text:p>
          </table:table-cell>
        </table:table-row>
      </table:table>
      <text:p text:style-name="P3"><text:soft-page-break/><text:span text:style-name="Source_20_Text"><text:span text:style-name="T4">Ngoài ra, giá trị trả về của main() cũng ngầm định thiết lập exit status. Theo quy ước, các giá trị exit status thường là:</text:span></text:span></text:p>
      <text:list text:style-name="L3">
        <text:list-item>
          <text:p text:style-name="P20"><text:span text:style-name="Source_20_Text"><text:span text:style-name="T4">0</text:span></text:span><text:span text:style-name="T4"> : thành công (success)</text:span></text:p>
        </text:list-item>
        <text:list-item>
          <text:p text:style-name="P20"><text:span text:style-name="Source_20_Text"><text:span text:style-name="T4">1</text:span></text:span><text:span text:style-name="T4"> : thất bại (failure)</text:span></text:p>
        </text:list-item>
        <text:list-item>
          <text:p text:style-name="P20"><text:span text:style-name="Source_20_Text"><text:span text:style-name="T4">2</text:span></text:span><text:span text:style-name="T4"> : lỗi (error)</text:span></text:p>
        </text:list-item>
      </text:list>
      <text:p text:style-name="P17"><text:span text:style-name="T4">Chúng ta đã thấy điều này trước đây khi lập trình với </text:span><text:span text:style-name="Strong_20_Emphasis"><text:span text:style-name="T4">bash scripting</text:span></text:span><text:span text:style-name="T4">. Hãy nhớ rằng một câu lệnh </text:span><text:span text:style-name="Source_20_Text"><text:span text:style-name="T4">if</text:span></text:span><text:span text:style-name="T4"> trong bash sẽ thực thi một chương trình:</text:span></text:p>
      <table:table table:name="Table11" table:style-name="Table11">
        <table:table-column table:style-name="Table11.A"/>
        <table:table-row>
          <table:table-cell table:style-name="Table11.A1" office:value-type="string">
            <text:p text:style-name="P7">if cmd <text:s/>#&lt;--- executes command and checks exit status</text:p>
            <text:p text:style-name="P10">then</text:p>
            <text:p text:style-name="P11"/>
            <text:p text:style-name="P10">else</text:p>
            <text:p text:style-name="P11"/>
            <text:p text:style-name="P10">fi</text:p>
          </table:table-cell>
        </table:table-row>
      </table:table>
      <text:p text:style-name="P3"><text:span text:style-name="Source_20_Text"><text:span text:style-name="T4">Khi cmd thực thi thành công, tức là trả về exit status bằng 0, thì khối then sẽ được thực hiện. Nếu cmd thất bại hoặc xảy ra lỗi, khối else sẽ được thực hiện. Biến đặc biệt $? cũng lưu trữ exit status của chương trình vừa được thực thi gần nhất.</text:span></text:span></text:p>
      <text:p text:style-name="P17"><text:span text:style-name="T4">Thực tế, </text:span><text:span text:style-name="Strong_20_Emphasis"><text:span text:style-name="T4">exit status</text:span></text:span><text:span text:style-name="T4"> không chỉ đơn thuần là đối số truyền vào </text:span><text:span text:style-name="Source_20_Text"><text:span text:style-name="T4">_exit()</text:span></text:span><text:span text:style-name="T4">. </text:span><text:span text:style-name="Strong_20_Emphasis"><text:span text:style-name="T4">Kernel</text:span></text:span><text:span text:style-name="T4"> còn chuẩn bị một </text:span><text:span text:style-name="Strong_20_Emphasis"><text:span text:style-name="T4">termination status (trạng thái kết thúc)</text:span></text:span><text:span text:style-name="T4"> cho tiến trình, trong đó exit status chỉ là một phần. Termination status còn chứa thông tin về cách mà chương trình kết thúc, và chúng ta sẽ tìm hiểu sâu hơn về nó khi thảo luận về </text:span><text:span text:style-name="Strong_20_Emphasis"><text:span text:style-name="T4">quản lý tiến trình (process management)</text:span></text:span><text:span text:style-name="T4">.</text:span></text:p>
      <text:h text:style-name="P1" text:outline-level="2"><text:bookmark text:name="orgheadline10"/><text:span text:style-name="Source_20_Text"><text:span text:style-name="T5">3 The Birth of a Process</text:span></text:span></text:h>
      <text:p text:style-name="P3"><text:span text:style-name="Source_20_Text"><text:span text:style-name="T4">Bây giờ khi chúng ta đã hiểu rõ về “cái chết” của một tiến trình, hãy cùng xem xét “sự ra đời” của một tiến trình.</text:span></text:span></text:p>
      <text:p text:style-name="P4"><draw:frame draw:style-name="fr1" draw:name="Image5" text:anchor-type="char" svg:width="5.5083in" svg:height="3.5634in" draw:z-index="4"><draw:image xlink:href="Pictures/10000001000005C9000003BE84A973CD.png" xlink:type="simple" xlink:show="embed" xlink:actuate="onLoad" draw:mime-type="image/png"/></draw:frame><text:soft-page-break/><text:span text:style-name="Source_20_Text"><text:span text:style-name="T6">Figure 5: C Program Life Cycle: exec and startups</text:span></text:span></text:p>
      <text:p text:style-name="P3"><text:span text:style-name="Source_20_Text"><text:span text:style-name="T4">Từ trước đến nay, bạn luôn được học rằng một chương trình bắt đầu từ main(), nhưng điều đó không hoàn toàn chính xác. Phần chương trình mà bạn viết thực sự bắt đầu từ main(), nhưng trên thực tế, khi bạn biên dịch một chương trình, sẽ có một tập hợp các hàm bổ sung được thực thi trước để thiết lập môi trường. Sau khi các bước này hoàn tất, main() mới được gọi, và khi main() kết thúc, nó trả về các </text:span></text:span><text:span text:style-name="Source_20_Text"><text:span text:style-name="Strong_20_Emphasis"><text:span text:style-name="T4">startup routines</text:span></text:span></text:span><text:span text:style-name="Source_20_Text"><text:span text:style-name="T4">, những hàm này cuối cùng sẽ gọi exit()… và chúng ta đã biết câu chuyện đó kết thúc như thế nào.</text:span></text:span></text:p>
      <text:p text:style-name="P17"><text:span text:style-name="T4">Có một câu hỏi cơ bản hơn mà chúng ta chưa đề cập: Làm thế nào một chương trình thực sự được nạp (load) và thực thi dưới dạng một tiến trình? Điều này được thực hiện thông qua họ các lời gọi hệ thống </text:span><text:span text:style-name="Strong_20_Emphasis"><text:span text:style-name="T4">exec</text:span></text:span><text:span text:style-name="T4">, cụ thể là </text:span><text:span text:style-name="Source_20_Text"><text:span text:style-name="T4">execv()</text:span></text:span><text:span text:style-name="T4"> và…</text:span></text:p>
      <text:h text:style-name="P2" text:outline-level="3"><text:bookmark text:name="orgheadline8"/><text:span text:style-name="Source_20_Text"><text:span text:style-name="T5">3.1 Exec System Calls</text:span></text:span></text:h>
      <text:p text:style-name="P3"><text:span text:style-name="Source_20_Text"><text:span text:style-name="T4">Họ các lời gọi hệ thống </text:span></text:span><text:span text:style-name="Strong_20_Emphasis"><text:span text:style-name="Source_20_Text"><text:span text:style-name="T4">exec</text:span></text:span></text:span><text:span text:style-name="Source_20_Text"><text:span text:style-name="T4"> đơn giản là nạp một chương trình từ bộ nhớ và thực thi nó, thay thế chương trình hiện tại của tiến trình. Khi việc nạp các chỉ thị hoàn tất, exec sẽ bắt đầu thực thi thông qua các </text:span></text:span><text:span text:style-name="Source_20_Text"><text:span text:style-name="Strong_20_Emphasis"><text:span text:style-name="T4">startup procedures</text:span></text:span></text:span><text:span text:style-name="Source_20_Text"><text:span text:style-name="T4">. Ở đây, chúng ta chỉ thảo luận về lời gọi hệ thống execv(), với khai báo hàm như sau. Hãy đọc trang </text:span></text:span><text:span text:style-name="Source_20_Text"><text:span text:style-name="Strong_20_Emphasis"><text:span text:style-name="T4">manual (man page)</text:span></text:span></text:span><text:span text:style-name="Source_20_Text"><text:span text:style-name="T4"> để tìm hiểu các biến thể khác của exec, bao gồm execve() và execvp().</text:span></text:span></text:p>
      <table:table table:name="Table12" table:style-name="Table12">
        <table:table-column table:style-name="Table12.A"/>
        <table:table-row>
          <table:table-cell table:style-name="Table12.A1" office:value-type="string">
            <text:p text:style-name="P7">int execv(const char *path, char *const argv[]);</text:p>
          </table:table-cell>
        </table:table-row>
      </table:table>
      <text:p text:style-name="P3"><text:span text:style-name="Source_20_Text"><text:span text:style-name="T4">execv() nhận vào đường dẫn đến chương trình (trong hệ thống tệp) cùng với các đối số truyền cho chương trình đó. Cách hiểu dễ nhất là thông qua một ví dụ. Chương trình dưới đây sẽ thực thi ls.</text:span></text:span></text:p>
      <table:table table:name="Table13" table:style-name="Table13">
        <table:table-column table:style-name="Table13.A"/>
        <table:table-row>
          <table:table-cell table:style-name="Table13.A1" office:value-type="string">
            <text:p text:style-name="P7">/* exec_ls.c*/</text:p>
            <text:p text:style-name="P10">#include &lt;unistd.h&gt;</text:p>
            <text:p text:style-name="P10">#include &lt;stdlib.h&gt;</text:p>
            <text:p text:style-name="P10">#include &lt;stdio.h&gt;</text:p>
            <text:p text:style-name="P11"><text:soft-page-break/></text:p>
            <text:p text:style-name="P10">int main(int argc, char * argv[]){</text:p>
            <text:p text:style-name="P11"/>
            <text:p text:style-name="P10"><text:s text:c="2"/>//arguments for ls</text:p>
            <text:p text:style-name="P10"><text:s text:c="2"/>char * ls_args[2] = { "/bin/ls", NULL} ;</text:p>
            <text:p text:style-name="P11"/>
            <text:p text:style-name="P10"><text:s text:c="2"/>//execute ls</text:p>
            <text:p text:style-name="P11"><text:s text:c="2"/>execv( ls_args[0], ls_args);</text:p>
            <text:p text:style-name="P11"/>
            <text:p text:style-name="P10"><text:s text:c="2"/>//only get here if exec failed <text:s text:c="140"/></text:p>
            <text:p text:style-name="P10"><text:s text:c="2"/>perror("execve failed");</text:p>
            <text:p text:style-name="P11"/>
            <text:p text:style-name="P10"><text:s text:c="2"/>return 2; //return error status <text:s text:c="139"/></text:p>
            <text:p text:style-name="P11">}</text:p>
          </table:table-cell>
        </table:table-row>
      </table:table>
      <text:p text:style-name="P3"><text:span text:style-name="Source_20_Text"><text:span text:style-name="T4">Lời gọi hệ thống execv() nhận đường dẫn tới chương trình, trong trường hợp này là "/bin/ls", cùng với một mảng đối số argv. Với lần gọi exec này, đối số duy nhất là tên chương trình, ls_args[0]. Bạn có thể nhận thấy rằng các đối số của execv() tương ứng với các đối số của main() liên quan đến mảng argv, và điều này là có chủ ý. Ở một khía cạnh nào đó, bạn có thể xem exec như việc gọi trực tiếp hàm main() của chương trình với các đối số đó. Bạn phải đặt phần tử cuối cùng là NULL để exec có thể đếm tổng số đối số, từ đó thiết lập argc.</text:span></text:span></text:p>
      <text:p text:style-name="P17"><text:span text:style-name="T4">Ví dụ, chúng ta có thể mở rộng chương trình để truyền thêm đối số cho </text:span><text:span text:style-name="Source_20_Text"><text:span text:style-name="T4">ls</text:span></text:span><text:span text:style-name="T4">, nhằm hiển thị danh sách chi tiết (long listing) của thư mục </text:span><text:span text:style-name="Source_20_Text"><text:span text:style-name="T4">/bin</text:span></text:span><text:span text:style-name="T4">. Nếu thực hiện trong shell, ta sẽ gọi như sau:</text:span></text:p>
      <table:table table:name="Table14" table:style-name="Table14">
        <table:table-column table:style-name="Table14.A"/>
        <table:table-row>
          <table:table-cell table:style-name="Table14.A1" office:value-type="string">
            <text:p text:style-name="P8">ls -l /bin</text:p>
          </table:table-cell>
        </table:table-row>
      </table:table>
      <text:p text:style-name="P3"><text:span text:style-name="Source_20_Text"><text:span text:style-name="T4">Ta có thể chuyển lời gọi này thành một mảng argv với các giá trị như sau:</text:span></text:span></text:p>
      <table:table table:name="Table15" table:style-name="Table15">
        <table:table-column table:style-name="Table15.A"/>
        <table:table-row>
          <table:table-cell table:style-name="Table15.A1" office:value-type="string">
            <text:p text:style-name="P7">//arguments for ls, will run: ls <text:s/>-l /bin <text:s text:c="129"/></text:p>
            <text:p text:style-name="P10"><text:s text:c="2"/>char * ls_args[4] = { "/bin/ls", "-l", "/bin", NULL} ;</text:p>
            <text:p text:style-name="P10"><text:s text:c="2"/>// <text:s text:c="12"/>^ <text:s text:c="18"/>^ <text:s text:c="5"/>^ <text:s text:c="127"/></text:p>
            <text:p text:style-name="P10"><text:s text:c="2"/>// <text:s text:c="12"/>' <text:s text:c="20"/>| <text:s text:c="5"/>| <text:s text:c="127"/></text:p>
            <text:p text:style-name="P10"><text:s text:c="2"/>// <text:s text:c="4"/>Now with an argument to ls -'------'</text:p>
          </table:table-cell>
        </table:table-row>
      </table:table>
      <text:p text:style-name="P3"><text:span text:style-name="Source_20_Text"><text:span text:style-name="T4">Trong trường hợp này, ls_argv có 3 phần tử được thiết lập (không tính NULL). Sau đó, ta có thể truyền mảng này vào exec:</text:span></text:span></text:p>
      <table:table table:name="Table16" table:style-name="Table16">
        <table:table-column table:style-name="Table16.A"/>
        <text:soft-page-break/>
        <table:table-row>
          <table:table-cell table:style-name="Table16.A1" office:value-type="string">
            <text:p text:style-name="P7">/*exec_ls_arg.c*/ </text:p>
            <text:p text:style-name="P10">#include &lt;unistd.h&gt;</text:p>
            <text:p text:style-name="P10">#include &lt;stdlib.h&gt;</text:p>
            <text:p text:style-name="P10">#include &lt;stdio.h&gt;</text:p>
            <text:p text:style-name="P11"/>
            <text:p text:style-name="P10">int main(int argc, char * argv[]){</text:p>
            <text:p text:style-name="P11"/>
            <text:p text:style-name="P10"><text:s text:c="2"/>//arguments for ls, will run: ls <text:s/>-l /bin <text:s text:c="129"/></text:p>
            <text:p text:style-name="P10"><text:s text:c="2"/>char * ls_args[4] = { "/bin/ls", "-l", "/bin", NULL} ;</text:p>
            <text:p text:style-name="P10"><text:s text:c="2"/>// <text:s text:c="12"/>^ <text:s text:c="18"/>^ <text:s text:c="5"/>^ <text:s text:c="127"/></text:p>
            <text:p text:style-name="P10"><text:s text:c="2"/>// <text:s text:c="12"/>' <text:s text:c="21"/>| <text:s text:c="5"/>| <text:s text:c="127"/></text:p>
            <text:p text:style-name="P10"><text:s text:c="2"/>// <text:s text:c="4"/>Now with an argument to ls -'------' <text:s text:c="127"/></text:p>
            <text:p text:style-name="P11"/>
            <text:p text:style-name="P10"><text:s text:c="2"/>//execute ls <text:s text:c="158"/></text:p>
            <text:p text:style-name="P11"><text:s text:c="2"/>execv( ls_args[0], ls_args);</text:p>
            <text:p text:style-name="P11"/>
            <text:p text:style-name="P10"><text:s text:c="2"/>//only get here if exec failed <text:s text:c="140"/></text:p>
            <text:p text:style-name="P10"><text:s text:c="2"/>perror("execve failed");</text:p>
            <text:p text:style-name="P11"/>
            <text:p text:style-name="P10"><text:s text:c="2"/>return 2; //return error status <text:s text:c="139"/></text:p>
            <text:p text:style-name="P11">}</text:p>
          </table:table-cell>
        </table:table-row>
      </table:table>
      <text:p text:style-name="P3"><text:span text:style-name="Source_20_Text"><text:span text:style-name="T4">Một điểm cần lưu ý là khi thực thi thành công, exec </text:span></text:span><text:span text:style-name="Source_20_Text"><text:span text:style-name="Strong_20_Emphasis"><text:span text:style-name="T4">không bao giờ trả về</text:span></text:span></text:span><text:span text:style-name="Source_20_Text"><text:span text:style-name="T4">. Thay vào đó, toàn bộ chương trình hiện tại sẽ bị thay thế bởi chương trình được gọi bởi exec. Khi chương trình mới kết thúc, đó chính là lần trả về cuối cùng. Để kiểm tra việc exec có thất bại hay không, bạn không cần dùng câu lệnh if.</text:span></text:span></text:p>
      <text:h text:style-name="P2" text:outline-level="3"><text:bookmark text:name="orgheadline9"/><text:span text:style-name="Source_20_Text"><text:span text:style-name="T5">3.2 Creating A New Processes</text:span></text:span></text:h>
      <text:p text:style-name="P3"><text:span text:style-name="Source_20_Text"><text:span text:style-name="T4">Vẫn còn một điểm còn thiếu. Chúng ta đã hiểu cách thực thi một chương trình mới, nhưng vẫn chưa thực sự đề cập đến cách </text:span></text:span><text:span text:style-name="Source_20_Text"><text:span text:style-name="Strong_20_Emphasis"><text:span text:style-name="T4">tạo ra các tiến trình mới</text:span></text:span></text:span><text:span text:style-name="Source_20_Text"><text:span text:style-name="T4">. Các tiến trình mới được tạo ra bằng cách </text:span></text:span><text:span text:style-name="Source_20_Text"><text:span text:style-name="Strong_20_Emphasis"><text:span text:style-name="T4">nhân bản (duplicate)</text:span></text:span></text:span><text:span text:style-name="Source_20_Text"><text:span text:style-name="T4"> một tiến trình khác, quá trình này được gọi là </text:span></text:span><text:span text:style-name="Source_20_Text"><text:span text:style-name="Strong_20_Emphasis"><text:span text:style-name="T4">forking</text:span></text:span></text:span><text:span text:style-name="Source_20_Text"><text:span text:style-name="T4">, và chúng ta sử dụng lời gọi hệ thống fork() để yêu cầu hệ điều hành thực hiện.</text:span></text:span></text:p>
      <text:p text:style-name="P17"><text:span text:style-name="T4">Một lời gọi </text:span><text:span text:style-name="Source_20_Text"><text:span text:style-name="T4">fork()</text:span></text:span><text:span text:style-name="T4"> sẽ tạo ra một bản sao chính xác của tiến trình đã gọi nó, hình thành hai tiến trình: </text:span><text:span text:style-name="Strong_20_Emphasis"><text:span text:style-name="T4">tiến trình cha (parent)</text:span></text:span><text:span text:style-name="T4"> và </text:span><text:span text:style-name="Strong_20_Emphasis"><text:span text:style-name="T4">tiến trình con (child)</text:span></text:span><text:span text:style-name="T4">. Mỗi tiến trình sau đó sẽ thực thi độc lập và song song. Trong tiến trình con, sau khi </text:span><text:span text:style-name="Source_20_Text"><text:span text:style-name="T4">fork</text:span></text:span><text:span text:style-name="T4">, nó có thể gọi </text:span><text:span text:style-name="Source_20_Text"><text:span text:style-name="T4">exec()</text:span></text:span><text:span text:style-name="T4">, thao tác này sẽ thay thế phần mã được kế thừa từ tiến trình cha bằng một chương trình mới, và như vậy </text:span><text:soft-page-break/><text:span text:style-name="Strong_20_Emphasis"><text:span text:style-name="T4">vòng đời của tiến trình được hoàn tất</text:span></text:span><text:span text:style-name="T4">. Chúng ta sẽ dành phần thảo luận chi tiết hơn về </text:span><text:span text:style-name="Source_20_Text"><text:span text:style-name="T4">fork()</text:span></text:span><text:span text:style-name="T4"> trong phần lab.</text:span></text:p>
      <text:p text:style-name="P3"><text:span text:style-name="Source_20_Text"><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0T23:40:05.201948797</meta:creation-date>
    <dc:date>2026-03-21T00:31:13.071037365</dc:date>
    <meta:editing-duration>PT49M8S</meta:editing-duration>
    <meta:editing-cycles>32</meta:editing-cycles>
    <meta:generator>LibreOffice/24.2.7.2$Linux_X86_64 LibreOffice_project/420$Build-2</meta:generator>
    <meta:document-statistic meta:table-count="16" meta:image-count="5" meta:object-count="0" meta:page-count="14" meta:paragraph-count="185" meta:word-count="3712" meta:character-count="21256" meta:non-whitespace-character-count="14756"/>
  </office:meta>
</office:document-meta>
</file>