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2" style:family="paragraph" style:parent-style-name="Preformatted_20_Text">
      <style:paragraph-properties fo:line-height="100%" fo:text-align="justify" style:justify-single-word="false"/>
    </style:style>
    <style:style style:name="P3" style:family="paragraph" style:parent-style-name="Preformatted_20_Text">
      <style:paragraph-properties fo:line-height="100%" fo:text-align="justify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4" style:family="paragraph" style:parent-style-name="Preformatted_20_Text">
      <style:paragraph-properties fo:margin-left="0in" fo:margin-right="0in" fo:text-indent="0in" style:auto-text-indent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5" style:family="paragraph" style:parent-style-name="Preformatted_20_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6" style:family="paragraph" style:parent-style-name="Text_20_body">
      <style:paragraph-properties fo:line-height="100%" fo:text-align="justify" style:justify-single-word="false"/>
      <style:text-properties officeooo:paragraph-rsid="001685e6"/>
    </style:style>
    <style:style style:name="P7" style:family="paragraph" style:parent-style-name="Text_20_body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4" style:family="text">
      <style:text-properties style:font-name="Liberation Serif" fo:font-size="13pt" style:font-size-asian="13pt" style:font-size-complex="13pt"/>
    </style:style>
    <style:style style:name="T5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6" style:family="text">
      <style:text-properties style:font-name="Liberation Serif" fo:font-weight="normal" style:font-weight-asian="normal" style:font-weight-complex="normal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&gt; redirect: xoa noi dung file roi moi ghi vao</text:p>
      <text:p text:style-name="P3">&gt;&gt; append: them vao cuoi noi dung file</text:p>
      <text:p text:style-name="P3"/>
      <text:p text:style-name="P6"><text:span text:style-name="Strong_20_Emphasis"><text:span text:style-name="T5">Nhờ cơ chế FD nên Unix làm được:</text:span></text:span></text:p>
      <text:p text:style-name="P6"><text:span text:style-name="Strong_20_Emphasis"><text:span text:style-name="T3">- </text:span></text:span><text:span text:style-name="T3">Redirection:</text:span></text:p>
      <text:section text:style-name="Sect1" text:name="code-block-viewer">
        <text:p text:style-name="P4">command &gt; file</text:p>
      </text:section>
      <text:p text:style-name="P7">Shell làm:</text:p>
      <text:section text:style-name="Sect1" text:name="Section1">
        <text:p text:style-name="P4"><text:bookmark text:name="code-block-viewer"/>FD 1 -&gt; file</text:p>
      </text:section>
      <text:h text:style-name="P1" text:outline-level="3">- Pipes:</text:h>
      <text:section text:style-name="Sect1" text:name="Section2">
        <text:p text:style-name="P4"><text:bookmark text:name="code-block-viewer Copy 1"/>ls | grep txt</text:p>
      </text:section>
      <text:p text:style-name="P7">Kernel tạo:</text:p>
      <text:section text:style-name="Sect1" text:name="Section3">
        <text:p text:style-name="P4"><text:bookmark text:name="code-block-viewer Copy 2"/>ls stdout -&gt; pipe -&gt; grep stdin</text:p>
      </text:section>
      <text:p text:style-name="P7">Tức là:</text:p>
      <text:section text:style-name="Sect1" text:name="Section4">
        <text:p text:style-name="P4"><text:bookmark text:name="code-block-viewer Copy 3"/>FD 1 -&gt; pipe</text:p>
        <text:p text:style-name="P5">pipe -&gt; FD 0</text:p>
      </text:section>
      <text:p text:style-name="P2"><text:span text:style-name="Strong_20_Emphasis"><text:span text:style-name="T3"/>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4T17:08:42.632992682</dc:date>
    <meta:editing-duration>PT6M38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14" meta:word-count="62" meta:character-count="259" meta:non-whitespace-character-count="211"/>
  </office:meta>
</office:document-meta>
</file>