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font-size-asian="13pt" style:font-size-complex="13pt"/>
    </style:style>
    <style:style style:name="P2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Khái niệm chung về đường dẫn (Path)</text:p>
      <text:p text:style-name="P1">Đường dẫn (path) là cách để chỉ ra vị trí của file hoặc thư mục trong hệ thống.</text:p>
      <text:p text:style-name="P4">Ví dụ:</text:p>
      <text:p text:style-name="P1">/home/user/Documents/file.txt</text:p>
      <text:p text:style-name="P1">Trong Linux, hệ thống file có dạng cây, bắt đầu từ thư mục gốc /.</text:p>
      <text:p text:style-name="P1"/>
      <text:p text:style-name="P2">2. Đường dẫn tuyệt đối (Absolute Path)</text:p>
      <text:p text:style-name="P3">2.1. Định nghĩa</text:p>
      <text:p text:style-name="P1">Đường dẫn tuyệt đối là đường dẫn:</text:p>
      <text:p text:style-name="P1"><text:s text:c="4"/>• Bắt đầu từ thư mục gốc /</text:p>
      <text:p text:style-name="P1"><text:s text:c="4"/>• Không phụ thuộc vào thư mục hiện tại bạn đang đứng</text:p>
      <text:p text:style-name="P1">Dù bạn đang đâu, đường dẫn này luôn trỏ đúng vị trí.</text:p>
      <text:p text:style-name="P3">2.2. Ví dụ</text:p>
      <text:p text:style-name="P1">/home/user/Desktop/test.txt</text:p>
      <text:p text:style-name="P1">/etc/passwd</text:p>
      <text:p text:style-name="P1">/usr/bin/python3</text:p>
      <text:p text:style-name="P1">Dấu hiệu nhận biết: Bắt đầu bằng /</text:p>
      <text:p text:style-name="P3">2.3. Ví dụ minh họa</text:p>
      <text:p text:style-name="P4">Giả sử:</text:p>
      <text:p text:style-name="P1">pwd</text:p>
      <text:p text:style-name="P1">/home/user</text:p>
      <text:p text:style-name="P1">Chạy:</text:p>
      <text:p text:style-name="P1">cat /home/user/Desktop/test.txt</text:p>
      <text:p text:style-name="P1">File được mở bất kể bạn đang ở thư mục nào</text:p>
      <text:p text:style-name="P1"/>
      <text:p text:style-name="P2">3. Đường dẫn tương đối (Relative Path)</text:p>
      <text:p text:style-name="P3">3.1. Định nghĩa</text:p>
      <text:p text:style-name="P1">Đường dẫn tương đối là đường dẫn:</text:p>
      <text:p text:style-name="P1"><text:s text:c="4"/>• Tính từ thư mục hiện tại</text:p>
      <text:p text:style-name="P1"><text:s text:c="4"/>• KHÔNG bắt đầu bằng /</text:p>
      <text:p text:style-name="P3">3.2. Ký hiệu quan trọng</text:p>
      <text:p text:style-name="P3">3.3. Ví dụ</text:p>
      <text:p text:style-name="P4">Giả sử:</text:p>
      <text:p text:style-name="P1">pwd</text:p>
      <text:p text:style-name="P1">/home/user</text:p>
      <text:p text:style-name="P1">Cấu trúc:</text:p>
      <text:p text:style-name="P1">/home/user</text:p>
      <text:p text:style-name="P1"><text:s/>├── Documents</text:p>
      <text:p text:style-name="P1"><text:s/>│ <text:s text:c="3"/>└── file.txt</text:p>
      <text:p text:style-name="P1">Truy cập file bằng đường dẫn tương đối:</text:p>
      <text:p text:style-name="P1"><text:tab/>cat Documents/file.txt</text:p>
      <text:p text:style-name="P1">Dùng .:</text:p>
      <text:p text:style-name="P1"><text:tab/>cat ./Documents/file.txt</text:p>
      <text:p text:style-name="P1">Dùng .. (đi lên 1 cấp):</text:p>
      <text:p text:style-name="P1"><text:tab/>cd Documents</text:p>
      <text:p text:style-name="P1"><text:tab/>pwd</text:p>
      <text:p text:style-name="P1"><text:tab/>/home/user/Documents</text:p>
      <text:p text:style-name="P1"/>
      <text:p text:style-name="P1"><text:soft-page-break/><text:tab/>cd ..</text:p>
      <text:p text:style-name="P1"><text:tab/>pwd</text:p>
      <text:p text:style-name="P1"><text:tab/>/home/us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6:05:14.109855471</dc:date>
    <meta:editing-duration>PT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8" meta:word-count="208" meta:character-count="1078" meta:non-whitespace-character-count="889"/>
  </office:meta>
</office:document-meta>
</file>