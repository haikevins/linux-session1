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Heading_20_1">
      <style:paragraph-properties fo:margin-top="0.0201in" fo:margin-bottom="0.0201in" style:contextual-spacing="false" fo:line-height="100%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2" style:family="paragraph" style:parent-style-name="Heading_20_1">
      <style:paragraph-properties fo:margin-top="0.0201in" fo:margin-bottom="0.0201in" style:contextual-spacing="false" fo:line-height="100%"/>
      <style:text-properties style:font-name="Liberation Serif" fo:font-size="15pt" style:font-size-asian="15pt" style:font-size-complex="15pt"/>
    </style:style>
    <style:style style:name="P3" style:family="paragraph" style:parent-style-name="Heading_20_2">
      <style:paragraph-properties fo:margin-top="0.0201in" fo:margin-bottom="0.0201in" style:contextual-spacing="false" fo:line-height="100%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4" style:family="paragraph" style:parent-style-name="Heading_20_3">
      <style:paragraph-properties fo:margin-top="0.0201in" fo:margin-bottom="0.0201in" style:contextual-spacing="false" fo:line-height="100%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5" style:family="paragraph" style:parent-style-name="Heading_20_3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7" style:family="paragraph" style:parent-style-name="Preformatted_20_Text">
      <style:paragraph-properties fo:margin-left="0in" fo:margin-right="0in" fo:margin-top="0.0201in" fo:margin-bottom="0.0201in" style:contextual-spacing="false" fo:line-height="100%" fo:text-indent="0in" style:auto-text-indent="false"/>
      <style:text-properties officeooo:paragraph-rsid="000a9bdf"/>
    </style:style>
    <style:style style:name="P8" style:family="paragraph" style:parent-style-name="Text_20_body">
      <style:paragraph-properties fo:margin-top="0.0201in" fo:margin-bottom="0.0201in" style:contextual-spacing="false" fo:line-height="100%"/>
      <style:text-properties style:font-name="Liberation Serif" fo:font-size="13pt" style:font-size-asian="13pt" style:font-size-complex="13pt"/>
    </style:style>
    <style:style style:name="P9" style:family="paragraph" style:parent-style-name="Text_20_body" style:list-style-name="L2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10" style:family="paragraph" style:parent-style-name="Text_20_body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11" style:family="paragraph" style:parent-style-name="Text_20_body" style:list-style-name="L5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12" style:family="paragraph" style:parent-style-name="Text_20_body" style:list-style-name="L6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13" style:family="paragraph" style:parent-style-name="Text_20_body" style:list-style-name="L7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14" style:family="paragraph" style:parent-style-name="Text_20_body" style:list-style-name="L8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15" style:family="paragraph" style:parent-style-name="Text_20_body" style:list-style-name="L9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16" style:family="paragraph" style:parent-style-name="Text_20_body" style:list-style-name="L10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17" style:family="paragraph" style:parent-style-name="Text_20_body" style:list-style-name="L11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18" style:family="paragraph" style:parent-style-name="Text_20_body" style:list-style-name="L13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19" style:family="paragraph" style:parent-style-name="Text_20_body" style:list-style-name="L14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20" style:family="paragraph" style:parent-style-name="Text_20_body" style:list-style-name="L15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21" style:family="paragraph" style:parent-style-name="Text_20_body" style:list-style-name="L16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22" style:family="paragraph" style:parent-style-name="Text_20_body" style:list-style-name="L17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23" style:family="paragraph" style:parent-style-name="Text_20_body" style:list-style-name="L18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24" style:family="paragraph" style:parent-style-name="Text_20_body" style:list-style-name="L19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25" style:family="paragraph" style:parent-style-name="Text_20_body" style:list-style-name="L20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26" style:family="paragraph" style:parent-style-name="Text_20_body" style:list-style-name="L21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27" style:family="paragraph" style:parent-style-name="Text_20_body" style:list-style-name="L22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28" style:family="paragraph" style:parent-style-name="Text_20_body" style:list-style-name="L23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29" style:family="paragraph" style:parent-style-name="Text_20_body" style:list-style-name="L24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30" style:family="paragraph" style:parent-style-name="Text_20_body" style:list-style-name="L25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31" style:family="paragraph" style:parent-style-name="Text_20_body" style:list-style-name="L26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32" style:family="paragraph" style:parent-style-name="Text_20_body" style:list-style-name="L27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33" style:family="paragraph" style:parent-style-name="Text_20_body" style:list-style-name="L28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34" style:family="paragraph" style:parent-style-name="Text_20_body">
      <style:paragraph-properties fo:margin-top="0.0201in" fo:margin-bottom="0.0201in" style:contextual-spacing="false" fo:line-height="100%"/>
    </style:style>
    <style:style style:name="P35" style:family="paragraph" style:parent-style-name="Text_20_body" style:list-style-name="L1">
      <style:paragraph-properties fo:margin-top="0.0201in" fo:margin-bottom="0.0201in" style:contextual-spacing="false" fo:line-height="100%"/>
    </style:style>
    <style:style style:name="P36" style:family="paragraph" style:parent-style-name="Text_20_body" style:list-style-name="L2">
      <style:paragraph-properties fo:margin-top="0.0201in" fo:margin-bottom="0.0201in" style:contextual-spacing="false" fo:line-height="100%"/>
    </style:style>
    <style:style style:name="P37" style:family="paragraph" style:parent-style-name="Text_20_body" style:list-style-name="L3">
      <style:paragraph-properties fo:margin-top="0.0201in" fo:margin-bottom="0.0201in" style:contextual-spacing="false" fo:line-height="100%"/>
    </style:style>
    <style:style style:name="P38" style:family="paragraph" style:parent-style-name="Text_20_body" style:list-style-name="L4">
      <style:paragraph-properties fo:margin-top="0.0201in" fo:margin-bottom="0.0201in" style:contextual-spacing="false" fo:line-height="100%"/>
    </style:style>
    <style:style style:name="P39" style:family="paragraph" style:parent-style-name="Text_20_body" style:list-style-name="L5">
      <style:paragraph-properties fo:margin-top="0.0201in" fo:margin-bottom="0.0201in" style:contextual-spacing="false" fo:line-height="100%"/>
    </style:style>
    <style:style style:name="P40" style:family="paragraph" style:parent-style-name="Text_20_body" style:list-style-name="L6">
      <style:paragraph-properties fo:margin-top="0.0201in" fo:margin-bottom="0.0201in" style:contextual-spacing="false" fo:line-height="100%"/>
    </style:style>
    <style:style style:name="P41" style:family="paragraph" style:parent-style-name="Text_20_body" style:list-style-name="L7">
      <style:paragraph-properties fo:margin-top="0.0201in" fo:margin-bottom="0.0201in" style:contextual-spacing="false" fo:line-height="100%"/>
    </style:style>
    <style:style style:name="P42" style:family="paragraph" style:parent-style-name="Text_20_body" style:list-style-name="L8">
      <style:paragraph-properties fo:margin-top="0.0201in" fo:margin-bottom="0.0201in" style:contextual-spacing="false" fo:line-height="100%"/>
    </style:style>
    <style:style style:name="P43" style:family="paragraph" style:parent-style-name="Text_20_body" style:list-style-name="L9">
      <style:paragraph-properties fo:margin-top="0.0201in" fo:margin-bottom="0.0201in" style:contextual-spacing="false" fo:line-height="100%"/>
    </style:style>
    <style:style style:name="P44" style:family="paragraph" style:parent-style-name="Text_20_body" style:list-style-name="L10">
      <style:paragraph-properties fo:margin-top="0.0201in" fo:margin-bottom="0.0201in" style:contextual-spacing="false" fo:line-height="100%"/>
    </style:style>
    <style:style style:name="P45" style:family="paragraph" style:parent-style-name="Text_20_body" style:list-style-name="L12">
      <style:paragraph-properties fo:margin-top="0.0201in" fo:margin-bottom="0.0201in" style:contextual-spacing="false" fo:line-height="100%"/>
    </style:style>
    <style:style style:name="P46" style:family="paragraph" style:parent-style-name="Text_20_body" style:list-style-name="L16">
      <style:paragraph-properties fo:margin-top="0.0201in" fo:margin-bottom="0.0201in" style:contextual-spacing="false" fo:line-height="100%"/>
    </style:style>
    <style:style style:name="P47" style:family="paragraph" style:parent-style-name="Text_20_body" style:list-style-name="L25">
      <style:paragraph-properties fo:margin-top="0.0201in" fo:margin-bottom="0.0201in" style:contextual-spacing="false" fo:line-height="100%"/>
    </style:style>
    <style:style style:name="P48" style:family="paragraph" style:parent-style-name="Text_20_body" style:list-style-name="L27">
      <style:paragraph-properties fo:margin-top="0.0201in" fo:margin-bottom="0.0201in" style:contextual-spacing="false" fo:line-height="100%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3pt" style:font-size-asian="13pt" style:font-size-complex="13pt"/>
    </style:style>
    <style:style style:name="T3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4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1. Cách định danh của một thiết bị trong mạng LAN</text:h>
      <text:p text:style-name="P34"><text:span text:style-name="T4">Trong mạng LAN, </text:span><text:span text:style-name="Strong_20_Emphasis"><text:span text:style-name="T4">mỗi thiết bị được định danh theo 2 lớp khác nhau</text:span></text:span><text:span text:style-name="T4">:</text:span></text:p>
      <text:h text:style-name="P4" text:outline-level="3">1.1. Định danh ở tầng liên kết dữ liệu (Layer 2)</text:h>
      <text:list text:style-name="L1">
        <text:list-item>
          <text:p text:style-name="P35"><text:span text:style-name="T4">Sử dụng </text:span><text:span text:style-name="Strong_20_Emphasis"><text:span text:style-name="T4">địa chỉ MAC (Media Access Control)</text:span></text:span><text:span text:style-name="T4"> </text:span></text:p>
        </text:list-item>
        <text:list-item>
          <text:p text:style-name="P35"><text:span text:style-name="T4">Đây là địa chỉ </text:span><text:span text:style-name="Strong_20_Emphasis"><text:span text:style-name="T4">duy nhất gắn với card mạng (NIC)</text:span></text:span><text:span text:style-name="T4"> </text:span></text:p>
        </text:list-item>
      </text:list>
      <text:h text:style-name="P4" text:outline-level="3">1.2. Định danh ở tầng mạng (Layer 3)</text:h>
      <text:list text:style-name="L2">
        <text:list-item>
          <text:p text:style-name="P36"><text:span text:style-name="T4">Sử dụng </text:span><text:span text:style-name="Strong_20_Emphasis"><text:span text:style-name="T4">địa chỉ IP (Internet Protocol)</text:span></text:span><text:span text:style-name="T4"> </text:span></text:p>
        </text:list-item>
        <text:list-item>
          <text:p text:style-name="P9">Là địa chỉ logic do người quản trị hoặc DHCP cấp phát </text:p>
        </text:list-item>
      </text:list>
      <text:p text:style-name="P10">Như vậy:</text:p>
      <text:list text:style-name="L3">
        <text:list-item>
          <text:p text:style-name="P37"><text:span text:style-name="Strong_20_Emphasis"><text:span text:style-name="T4">MAC → định danh vật lý (trong LAN)</text:span></text:span><text:span text:style-name="T4"> </text:span></text:p>
        </text:list-item>
        <text:list-item>
          <text:p text:style-name="P37"><text:span text:style-name="Strong_20_Emphasis"><text:span text:style-name="T4">IP → định danh logic (trong toàn mạng / Internet)</text:span></text:span><text:span text:style-name="T4"> </text:span></text:p>
        </text:list-item>
      </text:list>
      <text:p text:style-name="P10">Trong Linux:</text:p>
      <text:list text:style-name="L4">
        <text:list-item>
          <text:p text:style-name="P38"><text:span text:style-name="T4">Một host có thể có </text:span><text:span text:style-name="Strong_20_Emphasis"><text:span text:style-name="T4">nhiều interface → nhiều MAC + nhiều IP</text:span></text:span><text:span text:style-name="T4"> </text:span></text:p>
        </text:list-item>
        <text:list-item>
          <text:p text:style-name="P38"><text:span text:style-name="T4">Linux xem IP thuộc về </text:span><text:span text:style-name="Strong_20_Emphasis"><text:span text:style-name="T4">host (không phải interface tuyệt đối)</text:span></text:span></text:p>
        </text:list-item>
      </text:list>
      <text:h text:style-name="P2" text:outline-level="1">2. Địa chỉ IP và địa chỉ MAC</text:h>
      <text:h text:style-name="P3" text:outline-level="2">2.1. Địa chỉ MAC</text:h>
      <text:list text:style-name="L5">
        <text:list-item>
          <text:p text:style-name="P39"><text:span text:style-name="T4">Dài 48 bit (6 byte), ví dụ: </text:span><text:span text:style-name="Source_20_Text"><text:span text:style-name="T4">00:20:ED:76:1E:13</text:span></text:span><text:span text:style-name="T4"> </text:span></text:p>
        </text:list-item>
        <text:list-item>
          <text:p text:style-name="P11">Do nhà sản xuất NIC cấp </text:p>
        </text:list-item>
        <text:list-item>
          <text:p text:style-name="P39"><text:span text:style-name="T4">Hoạt động ở </text:span><text:span text:style-name="Strong_20_Emphasis"><text:span text:style-name="T4">Ethernet frame</text:span></text:span><text:span text:style-name="T4"> </text:span></text:p>
        </text:list-item>
      </text:list>
      <text:h text:style-name="P5" text:outline-level="3">Vai trò:</text:h>
      <text:list text:style-name="L6">
        <text:list-item>
          <text:p text:style-name="P40"><text:span text:style-name="T4">Xác định </text:span><text:span text:style-name="Strong_20_Emphasis"><text:span text:style-name="T4">thiết bị đích trong cùng LAN</text:span></text:span><text:span text:style-name="T4"> </text:span></text:p>
        </text:list-item>
        <text:list-item>
          <text:p text:style-name="P12">Dùng để truyền frame trực tiếp </text:p>
        </text:list-item>
      </text:list>
      <text:h text:style-name="P3" text:outline-level="2">2.2. Địa chỉ IP</text:h>
      <text:list text:style-name="L7">
        <text:list-item>
          <text:p text:style-name="P41"><text:span text:style-name="T4">Ví dụ: </text:span><text:span text:style-name="Source_20_Text"><text:span text:style-name="T4">10.0.0.4</text:span></text:span><text:span text:style-name="T4"> </text:span></text:p>
        </text:list-item>
        <text:list-item>
          <text:p text:style-name="P13">Có thể: </text:p>
          <text:list>
            <text:list-item>
              <text:p text:style-name="P13">Cấu hình tĩnh </text:p>
            </text:list-item>
            <text:list-item>
              <text:p text:style-name="P13">Cấp động (DHCP) </text:p>
            </text:list-item>
          </text:list>
        </text:list-item>
      </text:list>
      <text:h text:style-name="P5" text:outline-level="3">Vai trò:</text:h>
      <text:list text:style-name="L8">
        <text:list-item>
          <text:p text:style-name="P42"><text:span text:style-name="T4">Xác định thiết bị ở </text:span><text:span text:style-name="Strong_20_Emphasis"><text:span text:style-name="T4">tầng mạng</text:span></text:span><text:span text:style-name="T4"> </text:span></text:p>
        </text:list-item>
        <text:list-item>
          <text:p text:style-name="P14">Dùng để định tuyến (routing)</text:p>
        </text:list-item>
      </text:list>
      <text:h text:style-name="P3" text:outline-level="2">2.3. Quan hệ giữa IP và MAC (rất quan trọng)</text:h>
      <text:p text:style-name="P34"><text:span text:style-name="T4">Trong LAN, dữ liệu </text:span><text:span text:style-name="Strong_20_Emphasis"><text:span text:style-name="T4">không gửi bằng IP trực tiếp</text:span></text:span><text:span text:style-name="T4">, mà:</text:span></text:p>
      <text:p text:style-name="P34"><text:span text:style-name="Strong_20_Emphasis"><text:span text:style-name="T4">IP → phải chuyển thành MAC → mới gửi được</text:span></text:span></text:p>
      <text:p text:style-name="P10">Cơ chế chuyển đổi này dùng:</text:p>
      <text:h text:style-name="P1" text:outline-level="1">2.4. ARP (Address Resolution Protocol)</text:h>
      <text:list text:style-name="L9">
        <text:list-item>
          <text:p text:style-name="P43"><text:span text:style-name="T4">Dùng để </text:span><text:span text:style-name="Strong_20_Emphasis"><text:span text:style-name="T4">map IP → MAC</text:span></text:span><text:span text:style-name="T4"> </text:span></text:p>
        </text:list-item>
        <text:list-item>
          <text:p text:style-name="P15">Là thành phần cực kỳ quan trọng trong LAN </text:p>
        </text:list-item>
      </text:list>
      <text:h text:style-name="P5" text:outline-level="3">Cách hoạt động:</text:h>
      <text:list text:style-name="L10">
        <text:list-item>
          <text:p text:style-name="P16">Host A muốn gửi tới IP B </text:p>
        </text:list-item>
        <text:list-item>
          <text:p text:style-name="P44"><text:soft-page-break/><text:span text:style-name="T4">Nếu chưa biết MAC:<text:line-break/>→ gửi </text:span><text:span text:style-name="Strong_20_Emphasis"><text:span text:style-name="T4">ARP Request (broadcast)</text:span></text:span><text:span text:style-name="T4"><text:line-break/>“Ai có IP này?” </text:span></text:p>
        </text:list-item>
        <text:list-item>
          <text:p text:style-name="P44"><text:span text:style-name="T4">Host B trả lời:<text:line-break/>→ </text:span><text:span text:style-name="Strong_20_Emphasis"><text:span text:style-name="T4">ARP Reply (unicast)</text:span></text:span><text:span text:style-name="T4"> với MAC của mình </text:span></text:p>
        </text:list-item>
      </text:list>
      <text:p text:style-name="P10">Ví dụ thực tế:</text:p>
      <text:list text:style-name="L11">
        <text:list-item>
          <text:p text:style-name="P17">IP: 10.0.0.4 → MAC: 00:20:ED:76:1E:15 </text:p>
        </text:list-item>
        <text:list-item>
          <text:p text:style-name="P17">IP: 10.0.0.2 → MAC: 00:20:ED:76:1E:13</text:p>
        </text:list-item>
      </text:list>
      <text:h text:style-name="P2" text:outline-level="1">3. Gửi – nhận và phân luồng gói tin trong mạng LAN</text:h>
      <text:h text:style-name="P3" text:outline-level="2">3.1. Nguyên lý đóng gói (Encapsulation)</text:h>
      <text:p text:style-name="P10">Dữ liệu đi qua các tầng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span text:style-name="Source_20_Text"><text:span text:style-name="T4">Application → TCP → IP → Ethernet → Physical</text:span></text:span></text:p>
          </table:table-cell>
        </table:table-row>
      </table:table>
      <text:list text:style-name="L12">
        <text:list-header>
          <text:p text:style-name="P45"><text:span text:style-name="Source_20_Text"><text:span text:style-name="T4"/></text:span></text:p>
        </text:list-header>
        <text:list-item>
          <text:p text:style-name="P45"><text:span text:style-name="T4">TCP segment → IP datagram → Ethernet frame</text:span></text:p>
        </text:list-item>
      </text:list>
      <text:h text:style-name="P3" text:outline-level="2">3.2. Quy trình gửi gói tin (Transmission)</text:h>
      <text:p text:style-name="P10">Theo Linux kernel:</text:p>
      <text:h text:style-name="P5" text:outline-level="3">Bước 1: Chọn đích (routing)</text:h>
      <text:list text:style-name="L13">
        <text:list-item>
          <text:p text:style-name="P18">Kernel xác định: </text:p>
          <text:list>
            <text:list-item>
              <text:p text:style-name="P18">IP đích </text:p>
            </text:list-item>
            <text:list-item>
              <text:p text:style-name="P18">Next-hop</text:p>
            </text:list-item>
          </text:list>
        </text:list-item>
      </text:list>
      <text:h text:style-name="P5" text:outline-level="3">Bước 2: Phân giải địa chỉ (ARP)</text:h>
      <text:list text:style-name="L14">
        <text:list-item>
          <text:p text:style-name="P19">Nếu chưa có MAC → gửi ARP Request </text:p>
        </text:list-item>
      </text:list>
      <text:h text:style-name="P5" text:outline-level="3">Bước 3: Đóng gói</text:h>
      <text:list text:style-name="L15">
        <text:list-item>
          <text:p text:style-name="P20">IP packet → bọc vào Ethernet frame </text:p>
        </text:list-item>
        <text:list-item>
          <text:p text:style-name="P20">Gắn: </text:p>
          <text:list>
            <text:list-item>
              <text:p text:style-name="P20">MAC nguồn </text:p>
            </text:list-item>
            <text:list-item>
              <text:p text:style-name="P20">MAC đích </text:p>
            </text:list-item>
          </text:list>
        </text:list-item>
      </text:list>
      <text:h text:style-name="P5" text:outline-level="3">Bước 4: Gửi xuống driver</text:h>
      <text:list text:style-name="L16">
        <text:list-item>
          <text:p text:style-name="P46"><text:span text:style-name="T4">Gọi </text:span><text:span text:style-name="Source_20_Text"><text:span text:style-name="T4">dev_queue_xmit()</text:span></text:span><text:span text:style-name="T4"> </text:span></text:p>
        </text:list-item>
        <text:list-item>
          <text:p text:style-name="P21">NIC gửi frame ra mạng </text:p>
        </text:list-item>
      </text:list>
      <text:h text:style-name="P3" text:outline-level="2">3.3. Quy trình nhận gói tin (Reception)</text:h>
      <text:h text:style-name="P5" text:outline-level="3">Bước 1: NIC nhận frame</text:h>
      <text:list text:style-name="L17">
        <text:list-item>
          <text:p text:style-name="P22">Gây interrupt </text:p>
        </text:list-item>
      </text:list>
      <text:h text:style-name="P5" text:outline-level="3">Bước 2: Driver xử lý</text:h>
      <text:list text:style-name="L18">
        <text:list-item>
          <text:p text:style-name="P23">Tạo buffer (sk_buff) </text:p>
        </text:list-item>
      </text:list>
      <text:h text:style-name="P5" text:outline-level="3">Bước 3: Kernel xử lý</text:h>
      <text:list text:style-name="L19">
        <text:list-item>
          <text:p text:style-name="P24">Phân tích header: </text:p>
          <text:list>
            <text:list-item>
              <text:p text:style-name="P24">Ethernet → IP → TCP/UDP </text:p>
            </text:list-item>
          </text:list>
        </text:list-item>
      </text:list>
      <text:h text:style-name="P5" text:outline-level="3">Bước 4: Phân luồng lên đúng tiến trình</text:h>
      <text:list text:style-name="L20">
        <text:list-item>
          <text:p text:style-name="P25">Dựa vào: </text:p>
          <text:list>
            <text:list-item>
              <text:p text:style-name="P25"><text:soft-page-break/>Port (TCP/UDP) </text:p>
            </text:list-item>
            <text:list-item>
              <text:p text:style-name="P25">Socket </text:p>
            </text:list-item>
          </text:list>
        </text:list-item>
      </text:list>
      <text:h text:style-name="P3" text:outline-level="2">3.4. Phân luồng gói tin (Packet Flow / Demultiplexing)</text:h>
      <text:p text:style-name="P10">Linux phân luồng theo từng tầng:</text:p>
      <text:h text:style-name="P5" text:outline-level="3">Tầng 2 (Ethernet)</text:h>
      <text:list text:style-name="L21">
        <text:list-item>
          <text:p text:style-name="P26">Dựa vào MAC: </text:p>
          <text:list>
            <text:list-item>
              <text:p text:style-name="P26">Unicast → 1 host </text:p>
            </text:list-item>
            <text:list-item>
              <text:p text:style-name="P26">Broadcast → tất cả </text:p>
            </text:list-item>
            <text:list-item>
              <text:p text:style-name="P26">Multicast → nhóm </text:p>
            </text:list-item>
          </text:list>
        </text:list-item>
      </text:list>
      <text:h text:style-name="P5" text:outline-level="3">Tầng 3 (IP)</text:h>
      <text:list text:style-name="L22">
        <text:list-item>
          <text:p text:style-name="P27">Dựa vào IP đích: </text:p>
          <text:list>
            <text:list-item>
              <text:p text:style-name="P27">Local → xử lý nội bộ </text:p>
            </text:list-item>
            <text:list-item>
              <text:p text:style-name="P27">Remote → forward (router) </text:p>
            </text:list-item>
          </text:list>
        </text:list-item>
      </text:list>
      <text:h text:style-name="P5" text:outline-level="3">Tầng 4 (TCP/UDP)</text:h>
      <text:list text:style-name="L23">
        <text:list-item>
          <text:p text:style-name="P28">Dựa vào: </text:p>
          <text:list>
            <text:list-item>
              <text:p text:style-name="P28">Port </text:p>
            </text:list-item>
            <text:list-item>
              <text:p text:style-name="P28">Socket </text:p>
            </text:list-item>
          </text:list>
        </text:list-item>
      </text:list>
      <text:p text:style-name="P34"><text:span text:style-name="T4">Đây là cơ chế </text:span><text:span text:style-name="Strong_20_Emphasis"><text:span text:style-name="T4">demultiplexing</text:span></text:span></text:p>
      <text:h text:style-name="P3" text:outline-level="2">3.5. Các kiểu truyền trong LAN</text:h>
      <text:h text:style-name="P5" text:outline-level="3">Unicast</text:h>
      <text:list text:style-name="L24">
        <text:list-item>
          <text:p text:style-name="P29">1 → 1 (phổ biến nhất) </text:p>
        </text:list-item>
      </text:list>
      <text:h text:style-name="P5" text:outline-level="3">Broadcast</text:h>
      <text:list text:style-name="L25">
        <text:list-item>
          <text:p text:style-name="P30">1 → tất cả </text:p>
        </text:list-item>
        <text:list-item>
          <text:p text:style-name="P47"><text:span text:style-name="T4">MAC: </text:span><text:span text:style-name="Source_20_Text"><text:span text:style-name="T4">FF:FF:FF:FF:FF:FF</text:span></text:span><text:span text:style-name="T4"> </text:span></text:p>
        </text:list-item>
      </text:list>
      <text:h text:style-name="P5" text:outline-level="3">Multicast</text:h>
      <text:list text:style-name="L26">
        <text:list-item>
          <text:p text:style-name="P31">1 → nhóm </text:p>
        </text:list-item>
        <text:list-item>
          <text:p text:style-name="P31">MAC được suy ra từ IP multicast </text:p>
        </text:list-item>
      </text:list>
      <text:h text:style-name="P3" text:outline-level="2">3.6. Cơ chế hàng đợi và xử lý trong Linux</text:h>
      <text:p text:style-name="P10">Linux kernel dùng:</text:p>
      <text:list text:style-name="L27">
        <text:list-item>
          <text:p text:style-name="P48"><text:span text:style-name="Source_20_Text"><text:span text:style-name="T4">net_device</text:span></text:span><text:span text:style-name="T4"> → đại diện card mạng </text:span></text:p>
        </text:list-item>
        <text:list-item>
          <text:p text:style-name="P48"><text:span text:style-name="Source_20_Text"><text:span text:style-name="T4">sk_buff</text:span></text:span><text:span text:style-name="T4"> → buffer gói tin </text:span></text:p>
        </text:list-item>
        <text:list-item>
          <text:p text:style-name="P32">Queue: </text:p>
          <text:list>
            <text:list-item>
              <text:p text:style-name="P32">TX queue (gửi) </text:p>
            </text:list-item>
            <text:list-item>
              <text:p text:style-name="P32">RX queue (nhận) </text:p>
            </text:list-item>
          </text:list>
        </text:list-item>
      </text:list>
      <text:p text:style-name="P10">Gói tin được:</text:p>
      <text:list text:style-name="L28">
        <text:list-item>
          <text:p text:style-name="P33">Xếp hàng </text:p>
        </text:list-item>
        <text:list-item>
          <text:p text:style-name="P33">Lập lịch </text:p>
        </text:list-item>
        <text:list-item>
          <text:p text:style-name="P33">Xử lý theo interrupt / softirq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3T23:16:52.901214232</meta:creation-date>
    <dc:date>2026-05-03T23:26:53.102621602</dc:date>
    <meta:editing-duration>PT9M57S</meta:editing-duration>
    <meta:editing-cycles>11</meta:editing-cycles>
    <meta:generator>LibreOffice/24.2.7.2$Linux_X86_64 LibreOffice_project/420$Build-2</meta:generator>
    <meta:document-statistic meta:table-count="1" meta:image-count="0" meta:object-count="0" meta:page-count="3" meta:paragraph-count="114" meta:word-count="666" meta:character-count="2989" meta:non-whitespace-character-count="2442"/>
  </office:meta>
</office:document-meta>
</file>