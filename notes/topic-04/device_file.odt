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2.6229in" table:align="left"/>
    </style:style>
    <style:style style:name="Table1.A" style:family="table-column">
      <style:table-column-properties style:column-width="0.5563in"/>
    </style:style>
    <style:style style:name="Table1.B" style:family="table-column">
      <style:table-column-properties style:column-width="0.6278in"/>
    </style:style>
    <style:style style:name="Table1.C" style:family="table-column">
      <style:table-column-properties style:column-width="0.5681in"/>
    </style:style>
    <style:style style:name="Table1.D" style:family="table-column">
      <style:table-column-properties style:column-width="0.8708in"/>
    </style:style>
    <style:style style:name="Table1.A1" style:family="table-cell">
      <style:table-cell-properties style:vertical-align="middle" fo:padding="0.0194in" fo:border="none"/>
    </style:style>
    <style:style style:name="Table2" style:family="table">
      <style:table-properties style:width="4.0153in" table:align="left"/>
    </style:style>
    <style:style style:name="Table2.A" style:family="table-column">
      <style:table-column-properties style:column-width="1.7049in"/>
    </style:style>
    <style:style style:name="Table2.B" style:family="table-column">
      <style:table-column-properties style:column-width="1.1736in"/>
    </style:style>
    <style:style style:name="Table2.C" style:family="table-column">
      <style:table-column-properties style:column-width="1.1368in"/>
    </style:style>
    <style:style style:name="Table2.A1" style:family="table-cell">
      <style:table-cell-properties style:vertical-align="middle" fo:padding="0.0194in" fo:border="none"/>
    </style:style>
    <style:style style:name="P1" style:family="paragraph" style:parent-style-name="Preformatted_20_Text">
      <style:paragraph-properties fo:line-height="100%" fo:text-align="justify" style:justify-single-word="false"/>
      <style:text-properties style:font-name="Liberation Serif" fo:font-size="13pt" style:font-size-asian="13pt" style:font-size-complex="13pt"/>
    </style:style>
    <style:style style:name="P2" style:family="paragraph" style:parent-style-name="Table_20_Contents">
      <style:paragraph-properties fo:line-height="100%" fo:text-align="justify" style:justify-single-word="false"/>
      <style:text-properties style:font-name="Liberation Serif" fo:font-size="13pt" style:font-size-asian="13pt" style:font-size-complex="13pt"/>
    </style:style>
    <style:style style:name="P3" style:family="paragraph" style:parent-style-name="Table_20_Heading">
      <style:paragraph-properties fo:line-height="100%" fo:text-align="justify" style:justify-single-word="false"/>
      <style:text-properties style:font-name="Liberation Serif" fo:font-size="13pt" style:font-size-asian="13pt" style:font-size-complex="13pt"/>
    </style:style>
    <style:style style:name="P4" style:family="paragraph" style:parent-style-name="Preformatted_20_Text">
      <style:paragraph-properties fo:line-height="100%" fo:text-align="justify" style:justify-single-word="false"/>
      <style:text-properties style:font-name="Liberation Serif" fo:font-size="13pt" fo:font-weight="bold" style:font-size-asian="13pt" style:font-weight-asian="bold" style:font-size-complex="13pt" style:font-weight-complex="bold"/>
    </style:style>
    <style:style style:name="P5" style:family="paragraph" style:parent-style-name="Preformatted_20_Text">
      <style:paragraph-properties fo:line-height="100%" fo:text-align="justify" style:justify-single-word="false"/>
      <style:text-properties style:font-name="Liberation Serif" fo:font-size="13pt" fo:font-style="italic" fo:font-weight="bold" style:font-size-asian="13pt" style:font-style-asian="italic" style:font-weight-asian="bold" style:font-size-complex="13pt" style:font-style-complex="italic" style:font-weight-complex="bold"/>
    </style:style>
    <style:style style:name="P6" style:family="paragraph" style:parent-style-name="Preformatted_20_Text">
      <style:paragraph-properties fo:line-height="100%" fo:text-align="justify" style:justify-single-word="false"/>
      <style:text-properties style:font-name="Liberation Serif" fo:font-size="13pt" style:text-underline-style="solid" style:text-underline-width="auto" style:text-underline-color="font-color" style:font-size-asian="13pt" style:font-size-complex="13pt"/>
    </style:style>
    <style:style style:name="P7" style:family="paragraph" style:parent-style-name="Preformatted_20_Text">
      <style:paragraph-properties fo:line-height="100%" fo:text-align="justify" style:justify-single-word="false"/>
      <style:text-properties style:font-name="Liberation Serif" fo:font-size="13pt" fo:font-weight="bold" style:font-size-asian="13pt" style:font-weight-asian="bold" style:font-size-complex="13pt" style:font-weight-complex="bold"/>
    </style:style>
    <style:style style:name="P8" style:family="paragraph" style:parent-style-name="Preformatted_20_Text">
      <style:paragraph-properties fo:line-height="100%" fo:text-align="justify" style:justify-single-word="false"/>
      <style:text-properties style:font-name="Liberation Serif" fo:font-size="13pt" style:font-size-asian="13pt" style:font-size-complex="13pt"/>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Device File là gì?</text:p>
      <text:p text:style-name="P1">Trong Linux, mọi thứ đều được biểu diễn như file (“Everything is a file”).</text:p>
      <text:p text:style-name="P1">Device file (hay còn gọi là device node) là một file đặc biệt trong hệ thống, đại diện cho một thiết bị phần cứng hoặc thiết bị ảo, cho phép chương trình giao tiếp với thiết bị đó thông qua cơ chế đọc/ghi file thông thường.</text:p>
      <text:p text:style-name="P1">Theo Wikipedia, device file là một loại special file cung cấp giao diện tới device driver trong kernel.</text:p>
      <text:p text:style-name="P1"/>
      <text:p text:style-name="P4">2️. Vị trí của Device File</text:p>
      <text:p text:style-name="P1">Tất cả device file nằm trong thư mục:</text:p>
      <text:p text:style-name="P1">/dev</text:p>
      <text:p text:style-name="P1">Thư mục này được quản lý động bởi hệ thống như udev (trên hầu hết distro hiện đại như Arch Linux hoặc Gentoo).</text:p>
      <text:p text:style-name="P1">Ví dụ:</text:p>
      <text:p text:style-name="P1">/dev/sda</text:p>
      <text:p text:style-name="P1">/dev/tty</text:p>
      <text:p text:style-name="P1">/dev/null</text:p>
      <text:p text:style-name="P1">/dev/zero</text:p>
      <text:p text:style-name="P1"/>
      <text:p text:style-name="P4">3️. Phân loại Device File</text:p>
      <text:p text:style-name="P1">Linux chia device file thành 2 loại chính:</text:p>
      <text:p text:style-name="P5">3.1 Character Device (c)</text:p>
      <text:p text:style-name="P1"><text:s text:c="4"/>• Ký hiệu: c</text:p>
      <text:p text:style-name="P1"><text:s text:c="4"/>• Truyền dữ liệu từng byte một</text:p>
      <text:p text:style-name="P1"><text:s text:c="4"/>• Không có cơ chế buffering theo block</text:p>
      <text:p text:style-name="P6">Ví dụ:</text:p>
      <text:p text:style-name="P1">/dev/tty</text:p>
      <text:p text:style-name="P1">/dev/null</text:p>
      <text:p text:style-name="P1">/dev/urandom</text:p>
      <text:p text:style-name="P1">Dùng cho:</text:p>
      <text:p text:style-name="P1"><text:s text:c="4"/>• Bàn phím</text:p>
      <text:p text:style-name="P1"><text:s text:c="4"/>• Chuột</text:p>
      <text:p text:style-name="P1"><text:s text:c="4"/>• Cổng serial</text:p>
      <text:p text:style-name="P1"><text:s text:c="4"/>• Thiết bị stream</text:p>
      <text:p text:style-name="P5">3.2 Block Device (b)</text:p>
      <text:p text:style-name="P1"><text:s text:c="4"/>• Ký hiệu: b</text:p>
      <text:p text:style-name="P1"><text:s text:c="4"/>• Truyền dữ liệu theo block</text:p>
      <text:p text:style-name="P1"><text:s text:c="4"/>• Có buffering</text:p>
      <text:p text:style-name="P1"><text:s text:c="4"/>• Hỗ trợ random access</text:p>
      <text:p text:style-name="P6">Ví dụ:</text:p>
      <text:p text:style-name="P1">/dev/sda</text:p>
      <text:p text:style-name="P1">/dev/mmcblk0</text:p>
      <text:p text:style-name="P1">Dùng cho:</text:p>
      <text:p text:style-name="P1"><text:s text:c="4"/>• Ổ cứng</text:p>
      <text:p text:style-name="P1"><text:s text:c="4"/>• USB</text:p>
      <text:p text:style-name="P1"><text:s text:c="4"/>• SD card</text:p>
      <text:p text:style-name="P4">4️. Major Number và Minor Number</text:p>
      <text:p text:style-name="P1">Khi bạn chạy:</text:p>
      <text:p text:style-name="P1"><text:soft-page-break/>ls -l /dev/sda</text:p>
      <text:p text:style-name="P1">Bạn sẽ thấy dạng:</text:p>
      <text:p text:style-name="P1">brw-rw---- 1 root disk 8, 0 ...</text:p>
      <text:p text:style-name="P1">Trong đó:</text:p>
      <text:p text:style-name="P1"><text:s text:c="4"/>• 8 → Major number</text:p>
      <text:p text:style-name="P1"><text:s text:c="4"/>• 0 → Minor number</text:p>
      <text:p text:style-name="P1">Ý nghĩa:</text:p>
      <text:p text:style-name="P1">Major Number</text:p>
      <text:p text:style-name="P1"><text:s text:c="4"/>• Xác định driver nào trong kernel sẽ xử lý thiết bị này.</text:p>
      <text:p text:style-name="P1">Minor Number</text:p>
      <text:p text:style-name="P1"><text:s text:c="4"/>• Xác định thiết bị cụ thể được driver đó quản lý.</text:p>
      <text:p text:style-name="P1">Kernel sử dụng cặp (major, minor) để ánh xạ từ device file sang driver tương ứng.</text:p>
      <text:p text:style-name="P6">Ví dụ:</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Device</text:p>
            </table:table-cell>
            <table:table-cell table:style-name="Table1.A1" office:value-type="string">
              <text:p text:style-name="P3">Major</text:p>
            </table:table-cell>
            <table:table-cell table:style-name="Table1.A1" office:value-type="string">
              <text:p text:style-name="P3">Minor</text:p>
            </table:table-cell>
            <table:table-cell table:style-name="Table1.A1" office:value-type="string">
              <text:p text:style-name="P3">Ghi chú</text:p>
            </table:table-cell>
          </table:table-row>
        </table:table-header-rows>
        <table:table-row>
          <table:table-cell table:style-name="Table1.A1" office:value-type="string">
            <text:p text:style-name="P2">sda</text:p>
          </table:table-cell>
          <table:table-cell table:style-name="Table1.A1" office:value-type="string">
            <text:p text:style-name="P2">8</text:p>
          </table:table-cell>
          <table:table-cell table:style-name="Table1.A1" office:value-type="string">
            <text:p text:style-name="P2">0</text:p>
          </table:table-cell>
          <table:table-cell table:style-name="Table1.A1" office:value-type="string">
            <text:p text:style-name="P2">disk 1</text:p>
          </table:table-cell>
        </table:table-row>
        <table:table-row>
          <table:table-cell table:style-name="Table1.A1" office:value-type="string">
            <text:p text:style-name="P2">sda1</text:p>
          </table:table-cell>
          <table:table-cell table:style-name="Table1.A1" office:value-type="string">
            <text:p text:style-name="P2">8</text:p>
          </table:table-cell>
          <table:table-cell table:style-name="Table1.A1" office:value-type="string">
            <text:p text:style-name="P2">1</text:p>
          </table:table-cell>
          <table:table-cell table:style-name="Table1.A1" office:value-type="string">
            <text:p text:style-name="P2">partition 1</text:p>
          </table:table-cell>
        </table:table-row>
        <table:table-row>
          <table:table-cell table:style-name="Table1.A1" office:value-type="string">
            <text:p text:style-name="P2">sdb</text:p>
          </table:table-cell>
          <table:table-cell table:style-name="Table1.A1" office:value-type="string">
            <text:p text:style-name="P2">8</text:p>
          </table:table-cell>
          <table:table-cell table:style-name="Table1.A1" office:value-type="string">
            <text:p text:style-name="P2">16</text:p>
          </table:table-cell>
          <table:table-cell table:style-name="Table1.A1" office:value-type="string">
            <text:p text:style-name="P2">disk 2</text:p>
          </table:table-cell>
        </table:table-row>
        <table:table-row>
          <table:table-cell table:style-name="Table1.A1" office:value-type="string">
            <text:p text:style-name="P2">sdb1</text:p>
          </table:table-cell>
          <table:table-cell table:style-name="Table1.A1" office:value-type="string">
            <text:p text:style-name="P2">8</text:p>
          </table:table-cell>
          <table:table-cell table:style-name="Table1.A1" office:value-type="string">
            <text:p text:style-name="P2">17</text:p>
          </table:table-cell>
          <table:table-cell table:style-name="Table1.A1" office:value-type="string">
            <text:p text:style-name="P2">partition</text:p>
          </table:table-cell>
        </table:table-row>
      </table:table>
      <text:p text:style-name="P1">Tại sao nhảy lên 16?</text:p>
      <text:p text:style-name="P1">Vì driver reserve 16 minor numbers cho mỗi disk:</text:p>
      <text:p text:style-name="P1">minor = disk_index * 16 + partition_number</text:p>
      <text:p text:style-name="P1"/>
      <text:p text:style-name="P4">5️. Cách Device File hoạt động</text:p>
      <text:p text:style-name="P1">Khi chương trình thực hiện:</text:p>
      <text:p text:style-name="P1">fd = open("/dev/tty", O_RDWR);</text:p>
      <text:p text:style-name="P1">read(fd, buf, size);</text:p>
      <text:p text:style-name="P1">Luồng xử lý:<text:tab/></text:p>
      <text:p text:style-name="P1">User Program</text:p>
      <text:p text:style-name="P1"><text:s text:c="4"/>↓</text:p>
      <text:p text:style-name="P1">System Call (read)</text:p>
      <text:p text:style-name="P1"><text:s text:c="4"/>↓</text:p>
      <text:p text:style-name="P1">VFS (Virtual File System)</text:p>
      <text:p text:style-name="P1"><text:s text:c="4"/>↓</text:p>
      <text:p text:style-name="P1">Device Driver (theo major number)</text:p>
      <text:p text:style-name="P1"><text:s text:c="4"/>↓</text:p>
      <text:p text:style-name="P1">Hardware</text:p>
      <text:p text:style-name="P1">Device file thực chất chỉ là một interface entry point vào driver.</text:p>
      <text:p text:style-name="P1">Nó không chứa dữ liệu thực như regular file.</text:p>
      <text:p text:style-name="P4">6️. Tạo Device File</text:p>
      <text:p text:style-name="P1">Dùng lệnh:</text:p>
      <text:p text:style-name="P1">mknod</text:p>
      <text:p text:style-name="P6">Ví dụ:</text:p>
      <text:p text:style-name="P1">mknod /dev/mydevice c 240 0</text:p>
      <text:p text:style-name="P1">Trong đó:</text:p>
      <text:p text:style-name="P1"><text:s text:c="4"/>• c → character device</text:p>
      <text:p text:style-name="P1"><text:s text:c="4"/>• 240 → major</text:p>
      <text:p text:style-name="P1"><text:s text:c="4"/>• 0 → minor</text:p>
      <text:p text:style-name="P1"><text:soft-page-break/>Tuy nhiên trong hệ thống hiện đại, device file thường được tạo tự động bởi udev.</text:p>
      <text:p text:style-name="P4">7️. Device File và udev</text:p>
      <text:p text:style-name="P1">Hệ thống hiện đại sử dụng:</text:p>
      <text:p text:style-name="P1">udev</text:p>
      <text:p text:style-name="P1">udev:</text:p>
      <text:p text:style-name="P1"><text:s text:c="4"/>• Tự động tạo/xóa device file khi thiết bị được gắn/rút</text:p>
      <text:p text:style-name="P1"><text:s text:c="4"/>• Gán permission phù hợp</text:p>
      <text:p text:style-name="P1"><text:s text:c="4"/>• Tạo symbolic link thuận tiện</text:p>
      <text:p text:style-name="P6">Ví dụ:</text:p>
      <text:p text:style-name="P1"><text:s text:c="4"/>• /dev/sda</text:p>
      <text:p text:style-name="P1"><text:s text:c="4"/>• /dev/disk/by-uuid/...</text:p>
      <text:p text:style-name="P4">8️. Một số Device File đặc biệt</text:p>
      <text:p text:style-name="P1">/dev/null</text:p>
      <text:p text:style-name="P1"><text:s text:c="4"/>• Mọi dữ liệu ghi vào sẽ bị bỏ</text:p>
      <text:p text:style-name="P1"><text:s text:c="4"/>• Đọc sẽ trả về EOF</text:p>
      <text:p text:style-name="P1">/dev/zero</text:p>
      <text:p text:style-name="P1"><text:s text:c="4"/>• Đọc trả về chuỗi byte 0</text:p>
      <text:p text:style-name="P1">/dev/random và /dev/urandom</text:p>
      <text:p text:style-name="P1"><text:s text:c="4"/>• Sinh số ngẫu nhiên</text:p>
      <text:p text:style-name="P4">9️. So sánh Device File và Regular File</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Thuộc tính</text:p>
            </table:table-cell>
            <table:table-cell table:style-name="Table2.A1" office:value-type="string">
              <text:p text:style-name="P3">Regular File</text:p>
            </table:table-cell>
            <table:table-cell table:style-name="Table2.A1" office:value-type="string">
              <text:p text:style-name="P3">Device File</text:p>
            </table:table-cell>
          </table:table-row>
        </table:table-header-rows>
        <table:table-row>
          <table:table-cell table:style-name="Table2.A1" office:value-type="string">
            <text:p text:style-name="P2">Lưu dữ liệu trên disk</text:p>
          </table:table-cell>
          <table:table-cell table:style-name="Table2.A1" office:value-type="string">
            <text:p text:style-name="P2">Có</text:p>
          </table:table-cell>
          <table:table-cell table:style-name="Table2.A1" office:value-type="string">
            <text:p text:style-name="P2">Không</text:p>
          </table:table-cell>
        </table:table-row>
        <table:table-row>
          <table:table-cell table:style-name="Table2.A1" office:value-type="string">
            <text:p text:style-name="P2">Có inode</text:p>
          </table:table-cell>
          <table:table-cell table:style-name="Table2.A1" office:value-type="string">
            <text:p text:style-name="P2">Có</text:p>
          </table:table-cell>
          <table:table-cell table:style-name="Table2.A1" office:value-type="string">
            <text:p text:style-name="P2">Có</text:p>
          </table:table-cell>
        </table:table-row>
        <table:table-row>
          <table:table-cell table:style-name="Table2.A1" office:value-type="string">
            <text:p text:style-name="P2">Có major/minor</text:p>
          </table:table-cell>
          <table:table-cell table:style-name="Table2.A1" office:value-type="string">
            <text:p text:style-name="P2">Không</text:p>
          </table:table-cell>
          <table:table-cell table:style-name="Table2.A1" office:value-type="string">
            <text:p text:style-name="P2">Có</text:p>
          </table:table-cell>
        </table:table-row>
        <table:table-row>
          <table:table-cell table:style-name="Table2.A1" office:value-type="string">
            <text:p text:style-name="P2">read/write gọi driver</text:p>
          </table:table-cell>
          <table:table-cell table:style-name="Table2.A1" office:value-type="string">
            <text:p text:style-name="P2">Không</text:p>
          </table:table-cell>
          <table:table-cell table:style-name="Table2.A1" office:value-type="string">
            <text:p text:style-name="P2">Có</text:p>
          </table:table-cell>
        </table:table-row>
        <table:table-row>
          <table:table-cell table:style-name="Table2.A1" office:value-type="string">
            <text:p text:style-name="P2">Đại diện phần cứng</text:p>
          </table:table-cell>
          <table:table-cell table:style-name="Table2.A1" office:value-type="string">
            <text:p text:style-name="P2">Không</text:p>
          </table:table-cell>
          <table:table-cell table:style-name="Table2.A1" office:value-type="string">
            <text:p text:style-name="P2">Có</text:p>
          </table:table-cell>
        </table:table-row>
      </table:table>
      <text:p text:style-name="P1"><text:span text:style-name="T1">10. Vai trò trong Embedded Linux</text:span></text:p>
      <text:p text:style-name="P1">Trong Embedded Linux:</text:p>
      <text:p text:style-name="P1"><text:s text:c="4"/>• Driver expose thiết bị qua device file</text:p>
      <text:p text:style-name="P1"><text:s text:c="4"/>• Ứng dụng user space điều khiển phần cứng thông qua:</text:p>
      <text:p text:style-name="P1"><text:s text:c="8"/>◦ open</text:p>
      <text:p text:style-name="P1"><text:s text:c="8"/>◦ read</text:p>
      <text:p text:style-name="P1"><text:s text:c="8"/>◦ write</text:p>
      <text:p text:style-name="P1"><text:s text:c="8"/>◦ ioctl</text:p>
      <text:p text:style-name="P6">Ví dụ:</text:p>
      <text:p text:style-name="P1"><text:s text:c="4"/>• Điều khiển LED</text:p>
      <text:p text:style-name="P1"><text:s text:c="4"/>• Đọc cảm biến</text:p>
      <text:p text:style-name="P1"><text:s text:c="4"/>• Giao tiếp UART</text:p>
      <text:p text:style-name="P1">Device file chính là cầu nối giữa user space và kernel spa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vi" fo:country="V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vi" fo:country="VN"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3-15T16:18:26.301548844</dc:date>
    <meta:editing-duration>PT12M44S</meta:editing-duration>
    <meta:editing-cycles>11</meta:editing-cycles>
    <meta:generator>LibreOffice/24.2.7.2$Linux_X86_64 LibreOffice_project/420$Build-2</meta:generator>
    <meta:document-statistic meta:table-count="2" meta:image-count="0" meta:object-count="0" meta:page-count="3" meta:paragraph-count="154" meta:word-count="635" meta:character-count="3178" meta:non-whitespace-character-count="2508"/>
  </office:meta>
</office:document-meta>
</file>