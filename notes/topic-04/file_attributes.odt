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2951in" table:align="left"/>
    </style:style>
    <style:style style:name="Table1.A" style:family="table-column">
      <style:table-column-properties style:column-width="0.8674in"/>
    </style:style>
    <style:style style:name="Table1.B" style:family="table-column">
      <style:table-column-properties style:column-width="5.4278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Preformatted_20_Text">
      <style:paragraph-properties fo:line-height="100%" fo:text-align="justify" style:justify-single-word="false"/>
      <style:text-properties style:font-name="Liberation Serif" fo:font-size="13pt" style:font-size-asian="13pt" style:font-size-complex="13pt"/>
    </style:style>
    <style:style style:name="P2" style:family="paragraph" style:parent-style-name="Preformatted_20_Text">
      <style:paragraph-properties fo:line-height="100%" fo:text-align="justify" style:justify-single-word="false"/>
      <style:text-properties style:font-name="Liberation Serif"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P3" style:family="paragraph" style:parent-style-name="Preformatted_20_Text">
      <style:paragraph-properties fo:line-height="100%" fo:text-align="justify" style:justify-single-word="false"/>
      <style:text-properties style:font-name="Liberation Serif" fo:font-size="18pt" fo:font-weight="bold" style:font-size-asian="18pt" style:font-weight-asian="bold" style:font-size-complex="18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1️. Các thuộc tính lưu trong inode (quản lý lâu dài trên đĩa)</text:p>
      <text:p text:style-name="P1">Mỗi file có một inode. Inode chứa toàn bộ metadata để filesystem quản lý file.</text:p>
      <text:p text:style-name="P1">Theo sách, các thuộc tính chính gồm:</text:p>
      <text:p text:style-name="P2">1. File type (Loại file)</text:p>
      <text:p text:style-name="P1">Cho biết file thuộc loại nào:</text:p>
      <text:p text:style-name="P1"><text:s text:c="4"/>• Regular file</text:p>
      <text:p text:style-name="P1"><text:s text:c="4"/>• Directory</text:p>
      <text:p text:style-name="P1"><text:s text:c="4"/>• Symbolic link</text:p>
      <text:p text:style-name="P1"><text:s text:c="4"/>• Block device</text:p>
      <text:p text:style-name="P1"><text:s text:c="4"/>• Character device</text:p>
      <text:p text:style-name="P1"><text:s text:c="4"/>• FIFO</text:p>
      <text:p text:style-name="P1"><text:s text:c="4"/>• Socket</text:p>
      <text:p text:style-name="P1">Thông tin này nằm trong mode field của inode.</text:p>
      <text:p text:style-name="P2">2. Number of hard links</text:p>
      <text:p text:style-name="P1"><text:s text:c="4"/>• Số lượng hard link trỏ tới inode</text:p>
      <text:p text:style-name="P1"><text:s text:c="4"/>• Khi link count = 0 và không còn process mở file → inode bị giải phóng</text:p>
      <text:p text:style-name="P1">Đây là cơ chế quản lý vòng đời file rất quan trọng.</text:p>
      <text:p text:style-name="P2">3. File size (Kích thước file)</text:p>
      <text:p text:style-name="P1"><text:s text:c="4"/>• Đơn vị: byte</text:p>
      <text:p text:style-name="P1"><text:s text:c="4"/>• Cho biết tổng số byte dữ liệu của file</text:p>
      <text:p text:style-name="P2">4. Device ID</text:p>
      <text:p text:style-name="P1"><text:s text:c="4"/>• Xác định thiết bị (partition/disk) chứa file</text:p>
      <text:p text:style-name="P1"><text:s text:c="4"/>• Giúp phân biệt inode giữa các filesystem khác nhau</text:p>
      <text:p text:style-name="P2">5. Inode number</text:p>
      <text:p text:style-name="P1"><text:s text:c="4"/>• Số định danh duy nhất trong một filesystem</text:p>
      <text:p text:style-name="P1"><text:s text:c="4"/>• Tên file trong directory chỉ ánh xạ tới inode number</text:p>
      <text:p text:style-name="P2">6. Owner (UID)</text:p>
      <text:p text:style-name="P1"><text:s text:c="4"/>• User ID của chủ file</text:p>
      <text:p text:style-name="P2">7. Group (GID)</text:p>
      <text:p text:style-name="P1"><text:s text:c="4"/>• Group ID của file</text:p>
      <text:p text:style-name="P2">8. Timestamps (3 mốc thời gian)</text:p>
      <text:p text:style-name="P1">Linux quản lý 3 loại thời gian: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Thuộc tính</text:p>
            </table:table-cell>
            <table:table-cell table:style-name="Table1.A1" office:value-type="string">
              <text:p text:style-name="Table_20_Heading">Ý nghĩa</text:p>
            </table:table-cell>
          </table:table-row>
        </table:table-header-rows>
        <table:table-row>
          <table:table-cell table:style-name="Table1.A1" office:value-type="string">
            <text:p text:style-name="Table_20_Contents">atime</text:p>
          </table:table-cell>
          <table:table-cell table:style-name="Table1.A1" office:value-type="string">
            <text:p text:style-name="Table_20_Contents">Last access time (thời gian file được truy cập lần cuối)</text:p>
          </table:table-cell>
        </table:table-row>
        <table:table-row>
          <table:table-cell table:style-name="Table1.A1" office:value-type="string">
            <text:p text:style-name="Table_20_Contents">mtime</text:p>
          </table:table-cell>
          <table:table-cell table:style-name="Table1.A1" office:value-type="string">
            <text:p text:style-name="Table_20_Contents">Last modification time (thời gian nội dung file được sửa lần cuối)</text:p>
          </table:table-cell>
        </table:table-row>
        <table:table-row>
          <table:table-cell table:style-name="Table1.A1" office:value-type="string">
            <text:p text:style-name="Table_20_Contents">ctime</text:p>
          </table:table-cell>
          <table:table-cell table:style-name="Table1.A1" office:value-type="string">
            <text:p text:style-name="Table_20_Contents">Last status change time (thời gian thay đổi trạng thái/metadata của file lần cuối)</text:p>
          </table:table-cell>
        </table:table-row>
      </table:table>
      <text:p text:style-name="P1">Lưu ý:</text:p>
      <text:p text:style-name="P1"><text:s text:c="4"/>• mtime thay đổi khi nội dung file thay đổi</text:p>
      <text:p text:style-name="P1"><text:s text:c="4"/>• ctime thay đổi khi metadata thay đổi (chmod, chown…)</text:p>
      <text:p text:style-name="P2">9. Access rights &amp; file mode</text:p>
      <text:p text:style-name="P1">Bao gồm:</text:p>
      <text:p text:style-name="P1">9 quyền cơ bản:</text:p>
      <text:p text:style-name="P1"><text:s text:c="4"/>• read (r)</text:p>
      <text:p text:style-name="P1"><text:s text:c="4"/>• write (w)</text:p>
      <text:p text:style-name="P1"><text:s text:c="4"/>• execute (x)</text:p>
      <text:p text:style-name="P1">Cho 3 nhóm:</text:p>
      <text:p text:style-name="P1"><text:s text:c="4"/>• owner</text:p>
      <text:p text:style-name="P1"><text:soft-page-break/><text:s text:c="4"/>• group</text:p>
      <text:p text:style-name="P1"><text:s text:c="4"/>• others</text:p>
      <text:p text:style-name="P2">10. Special mode bits</text:p>
      <text:p text:style-name="P1"><text:s text:c="4"/>• SUID</text:p>
      <text:p text:style-name="P1"><text:s text:c="4"/>• SGID</text:p>
      <text:p text:style-name="P1"><text:s text:c="4"/>• Sticky bit</text:p>
      <text:p text:style-name="P1">Được lưu trong cùng trường mode của inode.</text:p>
      <text:p text:style-name="P1"/>
      <text:p text:style-name="P3">2️. Thuộc tính quản lý ở mức runtime (Open File Description)</text:p>
      <text:p text:style-name="P1">Ngoài inode (lưu lâu dài), khi file được mở, kernel tạo struct file.</text:p>
      <text:p text:style-name="P1">Các thuộc tính quản lý khi file đang được sử dụng:</text:p>
      <text:p text:style-name="P2">1. File offset (vị trí đầu đọc/ghi)</text:p>
      <text:p text:style-name="P1"><text:s text:c="4"/>• Byte offset hiện tại</text:p>
      <text:p text:style-name="P1"><text:s text:c="4"/>• Cập nhật sau read/write</text:p>
      <text:p text:style-name="P1"><text:s text:c="4"/>• Không nằm trong inode</text:p>
      <text:p text:style-name="P1"><text:s text:c="4"/>• Nằm trong open file object</text:p>
      <text:p text:style-name="P2">2. File status flags</text:p>
      <text:p text:style-name="P1">Ví dụ:</text:p>
      <text:p text:style-name="P1"><text:s text:c="4"/>• O_RDONLY</text:p>
      <text:p text:style-name="P1"><text:s text:c="4"/>• O_WRONLY</text:p>
      <text:p text:style-name="P1"><text:s text:c="4"/>• O_RDWR</text:p>
      <text:p text:style-name="P1"><text:s text:c="4"/>• O_APPEND</text:p>
      <text:p text:style-name="P1"><text:s text:c="4"/>• O_NONBLOCK</text:p>
      <text:p text:style-name="P1">Được lưu trong open file description.</text:p>
      <text:p text:style-name="P2">3️. Thuộc tính ở mức directory entry (dentry)</text:p>
      <text:p text:style-name="P1">Directory lưu:</text:p>
      <text:p text:style-name="P1"><text:s text:c="4"/>• Filename</text:p>
      <text:p text:style-name="P1"><text:s text:c="4"/>• Inode number</text:p>
      <text:p text:style-name="P1">Quan trọng:</text:p>
      <text:p text:style-name="P1">Tên file không nằm trong inode.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vi" fo:country="V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vi" fo:country="VN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3-15T16:13:57.716539553</dc:date>
    <meta:editing-duration>PT2M23S</meta:editing-duration>
    <meta:editing-cycles>6</meta:editing-cycles>
    <meta:generator>LibreOffice/24.2.7.2$Linux_X86_64 LibreOffice_project/420$Build-2</meta:generator>
    <meta:document-statistic meta:table-count="1" meta:image-count="0" meta:object-count="0" meta:page-count="2" meta:paragraph-count="80" meta:word-count="432" meta:character-count="2222" meta:non-whitespace-character-count="1714"/>
  </office:meta>
</office:document-meta>
</file>