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5.5021in"/>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1" style:family="table-row">
      <style:table-row-properties style:min-row-height="0.2465in"/>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Heading_20_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 style:family="paragraph" style:parent-style-name="Table_20_Contents">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5" style:family="paragraph" style:parent-style-name="Text_20_body">
      <style:paragraph-properties fo:margin-top="0.0598in" fo:margin-bottom="0.0598in" style:contextual-spacing="false" fo:line-height="100%" fo:text-align="justify" style:justify-single-word="false"/>
      <style:text-properties style:font-name="Liberation Serif" fo:font-size="13pt" officeooo:paragraph-rsid="001b94f7" style:font-size-asian="13pt" style:font-size-complex="13pt"/>
    </style:style>
    <style:style style:name="P6"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bold" style:font-size-asian="13pt" style:font-size-complex="13pt"/>
    </style:style>
    <style:style style:name="P7"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bold" officeooo:paragraph-rsid="001b94f7" style:font-size-asian="13pt" style:font-weight-asian="bold" style:font-size-complex="13pt" style:font-weight-complex="bold"/>
    </style:style>
    <style:style style:name="P8"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9" style:family="paragraph" style:parent-style-name="Text_20_body">
      <style:paragraph-properties fo:margin-top="0.0598in" fo:margin-bottom="0.0598in" style:contextual-spacing="false" fo:line-height="100%" fo:text-align="justify" style:justify-single-word="false"/>
      <style:text-properties officeooo:paragraph-rsid="001b94f7"/>
    </style:style>
    <style:style style:name="P10" style:family="paragraph" style:parent-style-name="Text_20_body">
      <style:paragraph-properties fo:margin-top="0.0598in" fo:margin-bottom="0.0598in" style:contextual-spacing="false" fo:line-height="100%" fo:text-align="justify" style:justify-single-word="false"/>
    </style:style>
    <style:style style:name="P11"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2"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T1" style:family="text">
      <style:text-properties fo:font-weight="bold"/>
    </style:style>
    <style:style style:name="T2" style:family="text">
      <style:text-properties style:font-name="Liberation Serif"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nux cung cấp các cơ chế mạnh mẽ để các tiến trình giao tiếp với nhau, được gọi là <text:span text:style-name="T1">Truyền thông liên tiến trình (IPC)</text:span>. Trong số các cơ chế IPC đơn giản và được sử dụng phổ biến nhất là các <text:span text:style-name="T1">đường ống (pipes)</text:span>. Các đường ống cho phép các tiến trình trao đổi dữ liệu theo một luồng đơn hướng, đảm bảo rằng dữ liệu được ghi bởi một tiến trình có thể được đọc bởi một tiến trình khác theo cách thức đồng bộ.</text:p>
      <text:p text:style-name="P4">Tuy nhiên, không phải tất cả các đường ống đều giống nhau. Linux hỗ trợ hai loại đường ống: <text:span text:style-name="T1">Đường ống không tên (Unnamed Pipes)</text:span> và <text:span text:style-name="T1">Đường ống có tên (Named Pipes - FIFOs)</text:span>. Mặc dù chúng đều phục vụ mục đích chung là tạo điều kiện chuyển dữ liệu, nhưng cách thức chúng được tạo ra và sử dụng lại khác biệt đáng kể.</text:p>
      <text:h text:style-name="P1" text:outline-level="3">Đường ống không tên (Unnamed Pipes) là gì?</text:h>
      <text:p text:style-name="P10"><text:span text:style-name="T2">Đường ống không tên, thường được gọi là đường ống ẩn danh (anonymous pipes), là các kênh truyền thông tạm thời được sử dụng giữa các tiến trình có liên quan với nhau. Các đường ống này được tạo ra bằng lời gọi hệ thống </text:span><text:span text:style-name="Source_20_Text"><text:span text:style-name="T2">pipe()</text:span></text:span><text:span text:style-name="T2">, trả về hai bộ mô tả tệp (file descriptors) đại diện cho đầu đọc và đầu ghi của đường ống.</text:span></text:p>
      <text:p text:style-name="P10"><text:span text:style-name="T2">Đường ống không tên thường được sử dụng giữa tiến trình cha và tiến trình con của nó. Sau khi một đường ống được tạo, tiến trình cha có thể thực hiện lệnh </text:span><text:span text:style-name="Source_20_Text"><text:span text:style-name="T2">fork()</text:span></text:span><text:span text:style-name="T2"> để tạo một tiến trình con, cho phép cả hai chia sẻ các bộ mô tả tệp của đường ống đó. Điều này cho phép trao đổi dữ liệu trực tiếp giữa hai tiến trình mà không cần bất kỳ sự can thiệp nào của hệ thống tệp (filesystem).</text:span></text:p>
      <text:h text:style-name="P1" text:outline-level="3">Cú pháp của pipe()</text:h>
      <text:p text:style-name="P4">Để tạo một đường ống không tên, lời gọi hệ thống sau đây được sử dụng: </text:p>
      <table:table table:name="Table1" table:style-name="Table1">
        <table:table-column table:style-name="Table1.A"/>
        <table:table-row>
          <table:table-cell table:style-name="Table1.A1" office:value-type="string">
            <text:p text:style-name="P9"><text:span text:style-name="Source_20_Text"><text:span text:style-name="T2">int pipe(int pipefd[2]);</text:span></text:span></text:p>
          </table:table-cell>
        </table:table-row>
      </table:table>
      <text:p text:style-name="P10"><text:span text:style-name="T2">Tại đây, </text:span><text:span text:style-name="Source_20_Text"><text:span text:style-name="T2">pipefd[0]</text:span></text:span><text:span text:style-name="T2"> là bộ mô tả tệp cho đầu đọc, và </text:span><text:span text:style-name="Source_20_Text"><text:span text:style-name="T2">pipefd[1]</text:span></text:span><text:span text:style-name="T2"> là bộ mô tả tệp cho đầu ghi. Nhân hệ điều hành (kernel) sẽ đệm dữ liệu được ghi vào </text:span><text:span text:style-name="Source_20_Text"><text:span text:style-name="T2">pipefd[1]</text:span></text:span><text:span text:style-name="T2"> cho đến khi nó được đọc từ </text:span><text:span text:style-name="Source_20_Text"><text:span text:style-name="T2">pipefd[0]</text:span></text:span><text:span text:style-name="T2">. Đường ống cung cấp một luồng dữ liệu đơn hướng từ phía người ghi sang phía người đọc.</text:span></text:p>
      <text:h text:style-name="P1" text:outline-level="3">Đồng bộ hóa trong Đường ống không tên</text:h>
      <text:p text:style-name="P4">Một đặc tính quan trọng của đường ống không tên là <text:span text:style-name="T1">tính chất chặn (blocking nature)</text:span>. Nếu một tiến trình cố gắng đọc từ đường ống khi không có dữ liệu, nó sẽ bị chặn và đợi cho đến khi dữ liệu có sẵn. Điều này đảm bảo rằng các tiến trình luôn được đồng bộ, cho phép dữ liệu chỉ luân chuyển khi cả hai đầu đều được kết nối.</text:p>
      <text:p text:style-name="P10"><text:span text:style-name="T2">Đường ống không tên bị giới hạn trong các tiến trình có chung tổ tiên vì các bộ mô tả tệp được truyền qua sự kế thừa, thường là thông qua lời gọi hệ thống </text:span><text:span text:style-name="Source_20_Text"><text:span text:style-name="T2">fork()</text:span></text:span><text:span text:style-name="T2">. Các tiến trình không liên quan không thể sử dụng đường ống không tên để liên lạc với nhau.</text:span></text:p>
      <text:p text:style-name="P6">Ví dụ cho Unnamed pipe():</text:p>
      <table:table table:name="Table2" table:style-name="Table2">
        <table:table-column table:style-name="Table2.A"/>
        <table:table-row table:style-name="Table2.1">
          <table:table-cell table:style-name="Table2.A1" office:value-type="string">
            <text:p text:style-name="P3">#include &lt;stdio.h&gt;</text:p>
            <text:p text:style-name="P3">#include &lt;unistd.h&gt;</text:p>
            <text:p text:style-name="P3">#include &lt;sys/wait.h&gt;</text:p>
            <text:p text:style-name="P3"/>
            <text:p text:style-name="P3">int factorial(int n) {</text:p>
            <text:p text:style-name="P3"><text:s text:c="4"/>return (n == 0) ? 1 : n * factorial(n - 1);</text:p>
            <text:p text:style-name="P3">}</text:p>
            <text:p text:style-name="P3"/>
            <text:p text:style-name="P3">int main() {</text:p>
            <text:p text:style-name="P3"><text:s text:c="4"/>int fd[2];</text:p>
            <text:p text:style-name="P3"><text:s text:c="4"/>pipe(fd);</text:p>
            <text:p text:style-name="P3"/>
            <text:p text:style-name="P3"><text:s text:c="4"/>pid_t pid = fork();</text:p>
            <text:p text:style-name="P3"/>
            <text:p text:style-name="P3"><text:s text:c="4"/>if (pid &gt; 0)</text:p>
            <text:p text:style-name="P3"><text:s text:c="4"/>{</text:p>
            <text:p text:style-name="P3"><text:s text:c="8"/>// Tiến trình cha</text:p>
            <text:p text:style-name="P3"><text:s text:c="8"/>close(fd[0]); // Đóng đầu đọc</text:p>
            <text:p text:style-name="P3"><text:s text:c="8"/>int num = 5;</text:p>
            <text:p text:style-name="P3"><text:s text:c="8"/>write(fd[1], &amp;num, sizeof(num)); // Ghi dữ liệu vào ống</text:p>
            <text:p text:style-name="P3"><text:s text:c="8"/>close(fd[1]); // Đóng đầu ghi sau khi hoàn tất</text:p>
            <text:p text:style-name="P3"><text:s text:c="8"/>wait(NULL); // Đợi tiến trình con</text:p>
            <text:p text:style-name="P3"><text:s text:c="4"/>}</text:p>
            <text:p text:style-name="P3"><text:s text:c="4"/>else if (pid == 0)</text:p>
            <text:p text:style-name="P3"><text:s text:c="4"/>{</text:p>
            <text:p text:style-name="P3"><text:s text:c="8"/>// Tiến trình con</text:p>
            <text:p text:style-name="P3"><text:s text:c="8"/>close(fd[1]); // Đóng đầu ghi</text:p>
            <text:p text:style-name="P3"><text:s text:c="8"/>int n;</text:p>
            <text:p text:style-name="P3"><text:s text:c="8"/>read(fd[0], &amp;n, sizeof(n)); // Đọc dữ liệu từ ống</text:p>
            <text:p text:style-name="P3"><text:s text:c="8"/>printf("Child received number: %d\n", n);</text:p>
            <text:p text:style-name="P3"><text:soft-page-break/><text:s text:c="8"/>printf("Factorial of %d is %d\n", n, factorial(n));</text:p>
            <text:p text:style-name="P3"><text:s text:c="8"/>close(fd[0]); // Đóng đầu đọc sau khi hoàn tất</text:p>
            <text:p text:style-name="P3"><text:s text:c="4"/>}</text:p>
            <text:p text:style-name="P3"/>
            <text:p text:style-name="P3"><text:s text:c="4"/>return 0;</text:p>
            <text:p text:style-name="P3">}</text:p>
          </table:table-cell>
        </table:table-row>
      </table:table>
      <text:p text:style-name="P8">Kết quả:</text:p>
      <table:table table:name="Table3" table:style-name="Table3">
        <table:table-column table:style-name="Table3.A"/>
        <table:table-row>
          <table:table-cell table:style-name="Table3.A1" office:value-type="string">
            <text:p text:style-name="P3">Child received number: 5</text:p>
            <text:p text:style-name="P3">Factorial of 5 is 120</text:p>
          </table:table-cell>
        </table:table-row>
      </table:table>
      <text:p text:style-name="P4">Chương trình tạo một đường ống và sau đó phân nhánh một tiến trình con. Tiến trình cha đóng đầu đọc của đường ống, ghi một số nguyên vào đó, và chờ tiến trình con. Tiến trình con đóng đầu ghi, đọc số nguyên từ đường ống, tính giai thừa của nó và in kết quả. Điều này cho thấy cách dữ liệu có thể được gửi từ tiến trình cha đến tiến trình con bằng cách sử dụng một đường ống, và cách tiến trình con có thể sử dụng dữ liệu đó để thực hiện một tác vụ.</text:p>
      <text:h text:style-name="P1" text:outline-level="3">Đường ống có tên (Named Pipes - FIFOs) là gì?</text:h>
      <text:p text:style-name="P4">Đường ống có tên, hay FIFOs (First In, First Out), mở rộng khái niệm đường ống bằng cách cho phép các tiến trình không liên quan giao tiếp với nhau thông qua một tệp đặc biệt chung trong hệ thống tệp. Không giống như đường ống không tên vốn thuần túy là cấu trúc trong bộ nhớ, đường ống có tên được biểu diễn dưới dạng các tệp và có thể được truy cập bởi bất kỳ tiến trình nào biết đường dẫn của chúng.</text:p>
      <text:p text:style-name="P4">Process A <text:s/>---&gt; <text:s/>FIFO file <text:s/>---&gt; <text:s/>Process B</text:p>
      <text:p text:style-name="P4"><text:s text:c="16"/>(kernel quản lý)</text:p>
      <text:p text:style-name="P10"><text:span text:style-name="T2">Đường ống có tên được tạo ra bằng lời gọi hệ thống </text:span><text:span text:style-name="Source_20_Text"><text:span text:style-name="T2">mkfifo()</text:span></text:span><text:span text:style-name="T2">, lệnh này tạo một tệp đặc biệt trong hệ thống tệp đóng vai trò như một điểm cuối truyền thông. Mặc dù đường ống tồn tại dưới dạng một tệp, dữ liệu đi qua nó không được lưu trữ trên đĩa mà được quản lý trong bộ nhớ bởi nhân hệ điều hành (kernel).</text:span></text:p>
      <text:h text:style-name="P1" text:outline-level="3">Cú pháp của mkfifo()</text:h>
      <text:p text:style-name="P10"><text:span text:style-name="T2">Để tạo một đường ống có tên, lời gọi hệ thống sau đây được sử dụng: </text:span><text:span text:style-name="Source_20_Text"><text:span text:style-name="T2">int mkfifo(const char *pathname, mode_t mode);</text:span></text:span><text:span text:style-name="T2"> </text:span><text:span text:style-name="Source_20_Text"><text:span text:style-name="T2">pathname</text:span></text:span><text:span text:style-name="T2"> xác định vị trí trong hệ thống tệp nơi đường ống có tên sẽ được tạo. Tham số </text:span><text:span text:style-name="Source_20_Text"><text:span text:style-name="T2">mode</text:span></text:span><text:span text:style-name="T2"> thiết lập quyền truy cập cho đường ống.</text:span></text:p>
      <text:h text:style-name="P1" text:outline-level="3">Đồng bộ hóa trong Đường ống có tên</text:h>
      <text:p text:style-name="P10"><text:span text:style-name="T2">Đường ống có tên thực thi việc đồng bộ hóa thông qua cách thức hoạt động của lời gọi hệ thống </text:span><text:span text:style-name="Source_20_Text"><text:span text:style-name="T2">open()</text:span></text:span><text:span text:style-name="T2">. Nếu một tiến trình cố gắng mở một đường ống có tên để đọc, lời gọi đó sẽ bị chặn (block) cho đến khi một tiến trình khác mở chính đường ống đó để ghi. Tương tự, nếu một tiến trình mở đường ống để ghi, nó sẽ bị chặn cho đến khi có một người đọc kết nối.</text:span></text:p>
      <text:p text:style-name="P6">Ví dụ cho Named pipe():</text:p>
      <text:p text:style-name="P8"><text:soft-page-break/>reader.c</text:p>
      <table:table table:name="Table4" table:style-name="Table4">
        <table:table-column table:style-name="Table4.A"/>
        <table:table-row table:style-name="Table4.1">
          <table:table-cell table:style-name="Table4.A1" office:value-type="string">
            <text:p text:style-name="P3">#include &lt;stdio.h&gt;</text:p>
            <text:p text:style-name="P3">#include &lt;fcntl.h&gt;</text:p>
            <text:p text:style-name="P3">#include &lt;sys/stat.h&gt;</text:p>
            <text:p text:style-name="P3">#include &lt;sys/types.h&gt;</text:p>
            <text:p text:style-name="P3">#include &lt;unistd.h&gt;</text:p>
            <text:p text:style-name="P3"/>
            <text:p text:style-name="P3">int main()</text:p>
            <text:p text:style-name="P3">{</text:p>
            <text:p text:style-name="P3"><text:s text:c="4"/>const char *file_name = "named_pipe";</text:p>
            <text:p text:style-name="P3"><text:s text:c="4"/>int status = mkfifo(file_name, 0666);</text:p>
            <text:p text:style-name="P3"><text:s text:c="4"/></text:p>
            <text:p text:style-name="P3"><text:s text:c="4"/>if (status == -1)</text:p>
            <text:p text:style-name="P3"><text:s text:c="8"/>perror(file_name);</text:p>
            <text:p text:style-name="P3"><text:s text:c="4"/></text:p>
            <text:p text:style-name="P3"><text:s text:c="4"/>// Lưu ý: Trong ảnh bạn sử dụng S_IRUSR làm cờ mở file</text:p>
            <text:p text:style-name="P3"><text:s text:c="4"/>int fd = open(file_name, S_IRUSR);</text:p>
            <text:p text:style-name="P3"><text:s text:c="4"/></text:p>
            <text:p text:style-name="P3"><text:s text:c="4"/>if (fd == -1)</text:p>
            <text:p text:style-name="P3"><text:s text:c="8"/>perror("opening in file");</text:p>
            <text:p text:style-name="P3"><text:s text:c="4"/></text:p>
            <text:p text:style-name="P3"><text:s text:c="4"/>char buffer[100];</text:p>
            <text:p text:style-name="P3"><text:s text:c="4"/>read(fd, buffer, 50);</text:p>
            <text:p text:style-name="P3"><text:s text:c="4"/></text:p>
            <text:p text:style-name="P3"><text:s text:c="4"/>// Bạn có thể thêm dòng printf để kiểm tra dữ liệu nhận được:</text:p>
            <text:p text:style-name="P3"><text:s text:c="4"/>// printf("Received: %s\n", buffer);</text:p>
            <text:p text:style-name="P3"><text:s text:c="4"/></text:p>
            <text:p text:style-name="P3"><text:s text:c="4"/>close(fd);</text:p>
            <text:p text:style-name="P3"><text:s text:c="4"/>return 0;</text:p>
            <text:p text:style-name="P3">}</text:p>
          </table:table-cell>
        </table:table-row>
      </table:table>
      <text:p text:style-name="P8">writer.c</text:p>
      <table:table table:name="Table5" table:style-name="Table5">
        <table:table-column table:style-name="Table5.A"/>
        <text:soft-page-break/>
        <table:table-row>
          <table:table-cell table:style-name="Table5.A1" office:value-type="string">
            <text:p text:style-name="P3">#include &lt;stdio.h&gt;</text:p>
            <text:p text:style-name="P3">#include &lt;stdlib.h&gt;</text:p>
            <text:p text:style-name="P3">#include &lt;fcntl.h&gt;</text:p>
            <text:p text:style-name="P3">#include &lt;unistd.h&gt;</text:p>
            <text:p text:style-name="P3">#include &lt;string.h&gt;</text:p>
            <text:p text:style-name="P3"/>
            <text:p text:style-name="P3">int main() {</text:p>
            <text:p text:style-name="P3"><text:s text:c="4"/>const char *pipe_path = "named_pipe";</text:p>
            <text:p text:style-name="P3"><text:s text:c="4"/>int fd = open(pipe_path, O_WRONLY);</text:p>
            <text:p text:style-name="P3"><text:s text:c="4"/></text:p>
            <text:p text:style-name="P3"><text:s text:c="4"/>if (fd == -1) {</text:p>
            <text:p text:style-name="P3"><text:s text:c="8"/>perror("Error opening named pipe for writing");</text:p>
            <text:p text:style-name="P3"><text:s text:c="8"/>exit(EXIT_FAILURE);</text:p>
            <text:p text:style-name="P3"><text:s text:c="4"/>}</text:p>
            <text:p text:style-name="P3"><text:s text:c="4"/></text:p>
            <text:p text:style-name="P3"><text:s text:c="4"/>const char *message = "Hello Reader, this is Writer!";</text:p>
            <text:p text:style-name="P3"><text:s text:c="4"/>ssize_t bytes_written = write(fd, message, strlen(message));</text:p>
            <text:p text:style-name="P3"><text:s text:c="4"/></text:p>
            <text:p text:style-name="P3"><text:s text:c="4"/>if (bytes_written == -1) {</text:p>
            <text:p text:style-name="P3"><text:s text:c="8"/>perror("Error writing to pipe");</text:p>
            <text:p text:style-name="P3"><text:s text:c="4"/>} else {</text:p>
            <text:p text:style-name="P3"><text:s text:c="8"/>printf("Writer: Successfully wrote %ld bytes.\n", bytes_written);</text:p>
            <text:p text:style-name="P3"><text:s text:c="4"/>}</text:p>
            <text:p text:style-name="P3"><text:s text:c="4"/></text:p>
            <text:p text:style-name="P3"><text:s text:c="4"/>close(fd);</text:p>
            <text:p text:style-name="P3"><text:s text:c="4"/>return 0;</text:p>
            <text:p text:style-name="P3">}</text:p>
          </table:table-cell>
        </table:table-row>
      </table:table>
      <text:p text:style-name="P4">Trong ví dụ này, trước tiên chúng ta chạy chương trình Người ghi (Writer). Người ghi cố gắng mở đường ống có tên để ghi. Nhưng vì chưa có Người đọc (Reader) nào mở đường ống, Người ghi sẽ bị chặn và đợi. Nó sẽ không gửi bất kỳ dữ liệu nào vì không có tiến trình nào sẵn sàng để đọc. Sau đó, khi chúng ta chạy chương trình Người đọc, nó mở cùng một đường ống có tên đó để đọc. Ngay khi Người đọc kết nối, Người ghi được giải phóng trạng <text:soft-page-break/>thái chặn và gửi thông điệp của mình qua đường ống. Người đọc nhận thông điệp và in nó ra. Điều này cho thấy cách các đường ống có tên đồng bộ hóa cả hai tiến trình.</text:p>
      <text:h text:style-name="P1" text:outline-level="3">Sự khác biệt chính giữa Đường ống có tên và Đường ống không tên</text:h>
      <text:p text:style-name="P5">Sự khác biệt cơ bản giữa đường ống không tên và đường ống có tên nằm ở đối tượng có thể sử dụng chúng. Đường ống không tên bị giới hạn trong các tiến trình có liên quan chia sẻ các bộ mô tả tệp, trong khi đường ống có tên cung cấp một cách để các tiến trình độc lập, không liên quan giao tiếp thông qua một đường dẫn tệp đã biết.</text:p>
      <text:p text:style-name="P7">Kết luận</text:p>
      <text:p text:style-name="P10"><text:span text:style-name="T2">Các đường ống là một trong những cách đơn giản nhất để hai chương trình gửi dữ liệu cho nhau. Chúng giúp các chương trình giao tiếp trực tiếp mà không cần sử dụng các tệp hoặc cơ sở dữ liệu thông thường. Đường ống không tên được sử dụng khi hai chương trình có liên quan, chẳng hạn như chương trình cha và chương trình con của nó. Chúng được tạo bằng hàm </text:span><text:span text:style-name="Source_20_Text"><text:span text:style-name="T2">pipe()</text:span></text:span><text:span text:style-name="T2"> và hoạt động thông qua các bộ mô tả tệp dùng chung giữa cha và con. Đường ống có tên, được tạo bằng </text:span><text:span text:style-name="Source_20_Text"><text:span text:style-name="T2">mkfifo()</text:span></text:span><text:span text:style-name="T2">, linh hoạt hơn. Chúng cho phép bất kỳ hai chương trình nào, ngay cả khi không liên quan, giao tiếp bằng một tệp đặc biệt trong hệ thống tệp. Cả đường ống không tên và đường ống có tên đều đảm bảo rằng người gửi và người nhận đã sẵn sàng trước khi dữ liệu được gửi. Nếu một bên vắng mặt, bên kia sẽ chờ đợi.</text:span></text:p>
      <text:p text:style-name="P4">Ví dụ: một cuộc điện thoại. Một người quay số và đợi cho đến khi người kia nhấc máy. Chỉ khi cả hai đã kết nối thì cuộc hội thoại mới có thể bắt đầu. Tương tự, các đường ống đảm bảo rằng cả người gửi và người nhận đều được kết nối trước khi dữ liệu luân chuyển giữa chúng. Điều này giúp dễ dàng xây dựng các hệ thống nơi các chương trình trao đổi thông điệp mà không bị mất đồng bộ.</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4-20T03:01:00.269632872</dc:date>
    <meta:editing-duration>PT4H54M27S</meta:editing-duration>
    <meta:editing-cycles>17</meta:editing-cycles>
    <meta:generator>LibreOffice/24.2.7.2$Linux_X86_64 LibreOffice_project/420$Build-2</meta:generator>
    <meta:document-statistic meta:table-count="5" meta:image-count="0" meta:object-count="0" meta:page-count="6" meta:paragraph-count="120" meta:word-count="1721" meta:character-count="8660" meta:non-whitespace-character-count="6702"/>
  </office:meta>
</office:document-meta>
</file>