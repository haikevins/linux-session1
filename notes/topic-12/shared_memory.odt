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0035in" style:rel-column-width="9825*"/>
    </style:style>
    <style:style style:name="Table1.B" style:family="table-column">
      <style:table-column-properties style:column-width="2.5382in" style:rel-column-width="24852*"/>
    </style:style>
    <style:style style:name="Table1.C" style:family="table-column">
      <style:table-column-properties style:column-width="3.1514in" style:rel-column-width="30858*"/>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C3" style:family="table-cell">
      <style:table-cell-properties style:vertical-align="" fo:padding="0.0382in" fo:border-left="0.5pt solid #000000" fo:border-right="0.5pt solid #000000" fo:border-top="none" fo:border-bottom="0.5pt solid #000000"/>
    </style:style>
    <style:style style:name="Table1.6" style:family="table-row">
      <style:table-row-properties style:min-row-height="1.0264in"/>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5pt solid #000000"/>
    </style:style>
    <style:style style:name="P1" style:family="paragraph" style:parent-style-name="Heading_20_2">
      <style:paragraph-properties fo:line-height="100%" fo:text-align="justify" style:justify-single-word="false"/>
      <style:text-properties fo:font-weight="bold"/>
    </style:style>
    <style:style style:name="P2" style:family="paragraph" style:parent-style-name="Heading_20_2">
      <style:paragraph-properties fo:line-height="100%" fo:text-align="justify" style:justify-single-word="false"/>
      <style:text-properties style:font-name="Liberation Serif" fo:font-size="13pt" style:font-size-asian="13pt" style:font-size-complex="13pt"/>
    </style:style>
    <style:style style:name="P3" style:family="paragraph" style:parent-style-name="Text_20_body">
      <style:paragraph-properties fo:line-height="100%" fo:text-align="justify" style:justify-single-word="false"/>
      <style:text-properties style:font-name="Liberation Serif" fo:font-size="13pt" officeooo:paragraph-rsid="000ff794" style:font-size-asian="13pt" style:font-size-complex="13pt"/>
    </style:style>
    <style:style style:name="P4" style:family="paragraph" style:parent-style-name="Table_20_Contents">
      <style:paragraph-properties fo:line-height="100%" fo:text-align="justify" style:justify-single-word="false"/>
    </style:style>
    <style:style style:name="P5" style:family="paragraph" style:parent-style-name="Text_20_body">
      <style:paragraph-properties fo:line-height="100%" fo:text-align="justify" style:justify-single-word="false"/>
      <style:text-properties officeooo:paragraph-rsid="000eb808"/>
    </style:style>
    <style:style style:name="P6" style:family="paragraph" style:parent-style-name="Table_20_Contents">
      <style:paragraph-properties fo:line-height="100%" fo:text-align="start" style:justify-single-word="false"/>
    </style:style>
    <style:style style:name="P7" style:family="paragraph" style:parent-style-name="Standard">
      <style:paragraph-properties fo:line-height="100%" fo:text-align="justify" style:justify-single-word="false"/>
      <style:text-properties style:font-name="Liberation Serif" fo:font-size="13pt" style:font-size-asian="13pt" style:font-size-complex="13pt"/>
    </style:style>
    <style:style style:name="P8" style:family="paragraph" style:parent-style-name="Table_20_Contents">
      <style:paragraph-properties fo:line-height="100%" fo:text-align="justify" style:justify-single-word="false"/>
      <style:text-properties style:font-name="Liberation Serif" fo:font-size="13pt" officeooo:rsid="0006966f" officeooo:paragraph-rsid="0006966f" style:font-size-asian="13pt" style:font-size-complex="13pt"/>
    </style:style>
    <style:style style:name="P9" style:family="paragraph" style:parent-style-name="Table_20_Contents">
      <style:paragraph-properties fo:line-height="100%" fo:text-align="justify" style:justify-single-word="false"/>
      <style:text-properties style:font-name="Liberation Serif" fo:font-size="13pt" style:font-size-asian="13pt" style:font-size-complex="13pt"/>
    </style:style>
    <style:style style:name="P10" style:family="paragraph" style:parent-style-name="Table_20_Contents">
      <style:paragraph-properties fo:line-height="100%" fo:text-align="justify" style:justify-single-word="false"/>
      <style:text-properties style:font-name="Liberation Serif" fo:font-size="13pt" officeooo:paragraph-rsid="0009c04a" style:font-size-asian="13pt" style:font-size-complex="13pt"/>
    </style:style>
    <style:style style:name="P11" style:family="paragraph" style:parent-style-name="Table_20_Contents">
      <style:paragraph-properties fo:line-height="100%" fo:text-align="justify" style:justify-single-word="false"/>
      <style:text-properties style:font-name="Liberation Serif" fo:font-size="13pt" officeooo:paragraph-rsid="000d0176" style:font-size-asian="13pt" style:font-size-complex="13pt"/>
    </style:style>
    <style:style style:name="P12" style:family="paragraph" style:parent-style-name="Table_20_Contents">
      <style:paragraph-properties fo:line-height="100%" fo:text-align="start" style:justify-single-word="false"/>
      <style:text-properties style:font-name="Liberation Serif" fo:font-size="13pt" style:font-size-asian="13pt" style:font-size-complex="13pt"/>
    </style:style>
    <style:style style:name="P13" style:family="paragraph" style:parent-style-name="Heading_20_3">
      <style:paragraph-properties fo:line-height="100%" fo:text-align="justify" style:justify-single-word="false"/>
      <style:text-properties style:font-name="Liberation Serif" fo:font-size="13pt" style:font-size-asian="13pt" style:font-size-complex="13pt"/>
    </style:style>
    <style:style style:name="P14" style:family="paragraph" style:parent-style-name="Text_20_body" style:list-style-name="L2">
      <style:paragraph-properties fo:line-height="100%" fo:text-align="justify" style:justify-single-word="false"/>
    </style:style>
    <style:style style:name="P15" style:family="paragraph" style:parent-style-name="Text_20_body">
      <style:paragraph-properties fo:line-height="100%" fo:text-align="justify" style:justify-single-word="false"/>
      <style:text-properties style:font-name="Liberation Serif" fo:font-size="13pt" style:font-size-asian="13pt" style:font-size-complex="13pt"/>
    </style:style>
    <style:style style:name="P16" style:family="paragraph" style:parent-style-name="Text_20_body" style:list-style-name="L1">
      <style:paragraph-properties fo:line-height="100%" fo:text-align="justify" style:justify-single-word="false"/>
      <style:text-properties style:font-name="Liberation Serif" fo:font-size="13pt" style:font-size-asian="13pt" style:font-size-complex="13pt"/>
    </style:style>
    <style:style style:name="P17" style:family="paragraph" style:parent-style-name="Text_20_body">
      <style:paragraph-properties fo:line-height="100%" fo:text-align="justify" style:justify-single-word="false"/>
      <style:text-properties style:font-name="Liberation Serif" fo:font-size="13pt" officeooo:paragraph-rsid="0011e8a8" style:font-size-asian="13pt" style:font-size-complex="13pt"/>
    </style:style>
    <style:style style:name="P18" style:family="paragraph" style:parent-style-name="Text_20_body" style:list-style-name="L2">
      <style:paragraph-properties fo:line-height="100%" fo:text-align="justify" style:justify-single-word="false"/>
      <style:text-properties style:font-name="Liberation Serif" fo:font-size="13pt" style:font-size-asian="13pt" style:font-size-complex="13pt"/>
    </style:style>
    <style:style style:name="P19" style:family="paragraph" style:parent-style-name="Text_20_body" style:list-style-name="L3">
      <style:paragraph-properties fo:line-height="100%" fo:text-align="justify" style:justify-single-word="false"/>
      <style:text-properties style:font-name="Liberation Serif" fo:font-size="13pt" style:font-size-asian="13pt" style:font-size-complex="13pt"/>
    </style:style>
    <style:style style:name="P20" style:family="paragraph" style:parent-style-name="Text_20_body" style:list-style-name="L4">
      <style:paragraph-properties fo:line-height="100%" fo:text-align="justify" style:justify-single-word="false"/>
      <style:text-properties style:font-name="Liberation Serif" fo:font-size="13pt" style:font-size-asian="13pt" style:font-size-complex="13pt"/>
    </style:style>
    <style:style style:name="P21" style:family="paragraph" style:parent-style-name="Text_20_body">
      <style:paragraph-properties fo:line-height="100%" fo:text-align="justify" style:justify-single-word="false"/>
      <style:text-properties style:font-name="Liberation Serif" fo:font-size="13pt" fo:font-weight="bold" officeooo:paragraph-rsid="0011e8a8" style:font-size-asian="13pt" style:font-weight-asian="bold" style:font-size-complex="13pt" style:font-weight-complex="bold"/>
    </style:style>
    <style:style style:name="P22" style:family="paragraph" style:parent-style-name="Text_20_body">
      <style:paragraph-properties fo:line-height="100%" fo:text-align="justify" style:justify-single-word="false"/>
      <style:text-properties style:font-name="Liberation Serif" fo:font-size="13pt" fo:font-weight="bold" style:font-size-asian="13pt" style:font-size-complex="13pt"/>
    </style:style>
    <style:style style:name="P23" style:family="paragraph" style:parent-style-name="Text_20_body">
      <style:paragraph-properties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24" style:family="paragraph" style:parent-style-name="Text_20_body">
      <style:paragraph-properties fo:line-height="100%" fo:text-align="justify" style:justify-single-word="false"/>
      <style:text-properties style:font-name="Liberation Serif" fo:font-size="13pt" fo:font-weight="normal" officeooo:paragraph-rsid="000ff794" style:font-size-asian="13pt" style:font-weight-asian="normal" style:font-size-complex="13pt" style:font-weight-complex="normal"/>
    </style:style>
    <style:style style:name="P25" style:family="paragraph" style:parent-style-name="Text_20_body">
      <style:paragraph-properties fo:line-height="100%" fo:text-align="start" style:justify-single-word="false"/>
      <style:text-properties style:font-name="Liberation Serif" fo:font-size="13pt" fo:font-weight="normal" style:font-size-asian="13pt" style:font-weight-asian="normal" style:font-size-complex="13pt" style:font-weight-complex="normal"/>
    </style:style>
    <style:style style:name="P26" style:family="paragraph" style:parent-style-name="Text_20_body">
      <style:paragraph-properties fo:line-height="100%" fo:text-align="justify" style:justify-single-word="false"/>
      <style:text-properties style:font-name="Liberation Serif" fo:font-size="13pt" fo:font-style="normal" fo:font-weight="bold" officeooo:paragraph-rsid="000eb808" style:font-size-asian="13pt" style:font-style-asian="normal" style:font-weight-asian="bold" style:font-size-complex="13pt" style:font-style-complex="normal" style:font-weight-complex="bold"/>
    </style:style>
    <style:style style:name="T1" style:family="text">
      <style:text-properties fo:font-weight="bold"/>
    </style:style>
    <style:style style:name="T2" style:family="text">
      <style:text-properties officeooo:rsid="0006966f"/>
    </style:style>
    <style:style style:name="T3" style:family="text">
      <style:text-properties style:font-name="Liberation Serif"/>
    </style:style>
    <style:style style:name="T4" style:family="text">
      <style:text-properties style:font-name="Liberation Serif" fo:font-size="13pt" fo:font-weight="bold" style:font-size-asian="13pt" style:font-size-complex="13pt"/>
    </style:style>
    <style:style style:name="T5" style:family="text">
      <style:text-properties style:font-name="Liberation Serif" fo:font-size="13pt" style:font-size-asian="13pt" style:font-size-complex="13pt"/>
    </style:style>
    <style:style style:name="T6" style:family="text">
      <style:text-properties style:font-name="Liberation Serif" fo:font-size="13pt" fo:font-weight="normal" style:font-size-asian="13pt" style:font-weight-asian="normal" style:font-size-complex="13pt" style:font-weight-complex="normal"/>
    </style:style>
    <style:style style:name="T7" style:family="text">
      <style:text-properties style:font-name="Liberation Serif" fo:font-weight="bold"/>
    </style:style>
    <style:style style:name="T8" style:family="text">
      <style:text-properties officeooo:rsid="001b9791"/>
    </style:style>
    <style:style style:name="T9" style:family="text">
      <style:text-properties officeooo:rsid="001e3499"/>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ruyền thông liên tiến trình (IPC) là một khái niệm cơ bản trong các hệ điều hành, cho phép nhiều tiến trình giao tiếp và đồng bộ hóa các hành động của chúng. Trong số các phương thức IPC khác nhau, bộ nhớ dùng chung là một trong những cơ chế hiệu quả nhất, đặc biệt là đối với các ứng dụng yêu cầu khắt khe về hiệu năng. Bài viết này đi sâu vào khái niệm IPC thông qua bộ nhớ dùng chung, giải thích cách thức hoạt động, ưu điểm và nhược điểm của nó.</text:p>
      <text:p text:style-name="P15">Truyền thông liên tiến trình thông qua bộ nhớ dùng chung là một khái niệm mà trong đó hai hoặc nhiều tiến trình có thể truy cập vào vùng bộ nhớ chung, và việc giao tiếp được thực hiện thông qua bộ nhớ dùng chung này, nơi những thay đổi do một tiến trình thực hiện có thể được quan sát bởi tiến trình khác.</text:p>
      <text:p text:style-name="P15">Vấn đề với các đường ống (pipes), FIFO và hàng đợi thông điệp (message queue) là để hai tiến trình trao đổi thông tin, thông tin đó phải đi qua nhân hệ điều hành (kernel).</text:p>
      <text:list text:style-name="L1">
        <text:list-item>
          <text:p text:style-name="P16">Máy chủ đọc từ tệp đầu vào.</text:p>
        </text:list-item>
        <text:list-item>
          <text:p text:style-name="P16">Máy chủ ghi dữ liệu này vào một thông điệp bằng cách sử dụng đường ống, FIFO hoặc hàng đợi thông điệp.</text:p>
        </text:list-item>
        <text:list-item>
          <text:p text:style-name="P16">Máy khách đọc dữ liệu từ kênh IPC, việc này lại yêu cầu dữ liệu phải được sao chép từ vùng đệm IPC của nhân sang vùng đệm của máy khách.</text:p>
        </text:list-item>
        <text:list-item>
          <text:p text:style-name="P16">Cuối cùng, dữ liệu được sao chép từ vùng đệm của máy khách.</text:p>
        </text:list-item>
      </text:list>
      <text:p text:style-name="P15">Luồng dữ liệu thực tế:</text:p>
      <text:p text:style-name="P15">[File] → [User buffer A] → [Kernel buffer] → [User buffer B] → [Output]</text:p>
      <text:p text:style-name="P17">Cần bốn lần sao chép dữ liệu (2 lần đọc và 2 lần ghi). Vì vậy, bộ nhớ dùng chung cung cấp một cách để cho phép hai hoặc nhiều tiến trình chia sẻ một phân đoạn bộ nhớ. Với Bộ nhớ dùng chung, dữ liệu chỉ được sao chép hai lần: từ tệp đầu vào vào bộ nhớ dùng chung và từ bộ nhớ dùng chung sang tệp đầu ra.</text:p>
      <text:p text:style-name="P17">Luồng dữ liệu thực tế của Shared Memory:</text:p>
      <text:p text:style-name="P17">[File] → [Shared Memory] → [Process khác đọc trực tiếp]</text:p>
      <text:p text:style-name="P17">Đó chính là lý do tại sao Shared Memory nhanh hơn so với Pipe, FIFO.</text:p>
      <text:p text:style-name="P21">IPC là gì?</text:p>
      <text:p text:style-name="P15">Truyền thông liên tiến trình (IPC) đề cập đến tập hợp các kỹ thuật cho phép các tiến trình trao đổi dữ liệu và tín hiệu với nhau. IPC đóng vai trò quan trọng đối với các hệ điều hành hiện đại hỗ trợ đa nhiệm, vì nó cho phép các phương thức khác nhau cộng tác và chia sẻ tài nguyên một cách hiệu quả. Các cơ chế IPC phổ biến bao gồm truyền thông điệp (message passing), semaphore, đường ống (pipes), tín hiệu (signals) và bộ nhớ dùng chung (shared memory).</text:p>
      <text:h text:style-name="P13" text:outline-level="3">Bộ nhớ dùng chung là gì?</text:h>
      <text:p text:style-name="P15">Bộ nhớ dùng chung là một phân đoạn bộ nhớ mà nhiều tiến trình có thể truy cập đồng thời. Đây là một trong những phương thức IPC nhanh nhất vì các tiến trình giao tiếp bằng cách đọc và ghi vào một khối bộ nhớ chung. Không giống như các cơ chế IPC khác đòi hỏi các thủ tục trao đổi dữ liệu và đồng bộ hóa phức tạp hơn, bộ nhớ dùng chung cung cấp một cách thức trực tiếp để các tiến trình chia sẻ dữ liệu.</text:p>
      <text:h text:style-name="P13" text:outline-level="3"><text:soft-page-break/>Bộ nhớ dùng chung IPC hoạt động như thế nào?</text:h>
      <text:p text:style-name="P15">Bộ nhớ dùng chung IPC hoạt động bằng cách tạo ra một phân đoạn bộ nhớ mà nhiều tiến trình có thể truy cập được. Dưới đây là phác thảo cơ bản về cách thức vận hành của nó:</text:p>
      <text:list text:style-name="L2">
        <text:list-item>
          <text:p text:style-name="P14"><text:span text:style-name="T4">Tạo phân đoạn bộ nhớ dùng chung (Creation of Shared Memory Segment):</text:span><text:span text:style-name="T5"> Một tiến trình, thường là tiến trình cha, tạo ra một phân đoạn bộ nhớ dùng chung bằng cách sử dụng các lời gọi hệ thống như </text:span><text:span text:style-name="Source_20_Text"><text:span text:style-name="T5">shmget()</text:span></text:span><text:span text:style-name="T5"> trong các hệ thống tương tự Unix. Phân đoạn này được gán một định danh duy nhất (</text:span><text:span text:style-name="Source_20_Text"><text:span text:style-name="T5">shmid</text:span></text:span><text:span text:style-name="T5">).</text:span></text:p>
        </text:list-item>
        <text:list-item>
          <text:p text:style-name="P14"><text:span text:style-name="T4">Gắn vào phân đoạn bộ nhớ dùng chung (Attaching to the Shared Memory Segment):</text:span><text:span text:style-name="T5"> Các tiến trình cần truy cập vào bộ nhớ dùng chung sẽ tự gắn mình vào phân đoạn này bằng lời gọi hệ thống </text:span><text:span text:style-name="Source_20_Text"><text:span text:style-name="T5">shmat()</text:span></text:span><text:span text:style-name="T5">. Sau khi đã gắn vào, các tiến trình có thể trực tiếp đọc từ và ghi vào bộ nhớ dùng chung.</text:span></text:p>
        </text:list-item>
        <text:list-item>
          <text:p text:style-name="P18"><text:span text:style-name="T1">Đồng bộ hóa (Synchronization):</text:span> Vì nhiều tiến trình có thể truy cập bộ nhớ dùng chung đồng thời, các cơ chế đồng bộ hóa như <text:span text:style-name="T1">semaphores</text:span> thường được sử dụng để ngăn chặn tình trạng tranh đua (<text:span text:style-name="T1">race conditions</text:span>) và đảm bảo tính nhất quán của dữ liệu.</text:p>
        </text:list-item>
        <text:list-item>
          <text:p text:style-name="P14"><text:span text:style-name="T4">Hủy gắn và Xóa phân đoạn (Detaching and Deleting the Segment):</text:span><text:span text:style-name="T5"> Khi một tiến trình không còn cần truy cập vào bộ nhớ dùng chung, nó có thể hủy gắn khỏi phân đoạn bằng lời gọi hệ thống </text:span><text:span text:style-name="Source_20_Text"><text:span text:style-name="T5">shmdt()</text:span></text:span><text:span text:style-name="T5">. Phân đoạn bộ nhớ dùng chung có thể được loại bỏ hoàn toàn khỏi hệ thống bằng </text:span><text:span text:style-name="Source_20_Text"><text:span text:style-name="T5">shmctl()</text:span></text:span><text:span text:style-name="T5"> sau khi tất cả các tiến trình đã hủy gắn. </text:span></text:p>
        </text:list-item>
      </text:list>
      <text:h text:style-name="P13" text:outline-level="3">Ưu điểm của Bộ nhớ dùng chung IPC</text:h>
      <text:list text:style-name="L3">
        <text:list-item>
          <text:p text:style-name="P19"><text:span text:style-name="T1">Tốc độ (Speed):</text:span> Bộ nhớ dùng chung IPC nhanh hơn nhiều so với các phương thức IPC khác như truyền thông điệp (message passing) vì các tiến trình đọc và ghi trực tiếp vào vị trí bộ nhớ dùng chung, không cần qua kernel nhiều lần.</text:p>
        </text:list-item>
        <text:list-item>
          <text:p text:style-name="P19"><text:span text:style-name="T1">Chi phí xử lý thấp (Low Overhead):</text:span> Nó loại bỏ các chi phí liên quan đến việc truyền thông điệp, nơi dữ liệu phải được sao chép từ tiến trình này sang tiến trình khác.</text:p>
        </text:list-item>
        <text:list-item>
          <text:p text:style-name="P19"><text:span text:style-name="T1">Tính linh hoạt (Flexibility):</text:span> Bộ nhớ dùng chung có thể được sử dụng để chia sẻ các cấu trúc dữ liệu phức tạp như mảng, danh sách liên kết và ma trận giữa các tiến trình.</text:p>
        </text:list-item>
        <text:list-item>
          <text:p text:style-name="P19"><text:span text:style-name="T1">Truyền tải dữ liệu lớn (Large Data Transfers):</text:span> Bộ nhớ dùng chung đặc biệt hữu ích cho việc truyền tải một lượng lớn dữ liệu giữa các tiến trình vì nó tránh được nhu cầu sao chép dữ liệu nhiều lần.</text:p>
        </text:list-item>
      </text:list>
      <text:h text:style-name="P13" text:outline-level="3">Nhược điểm của Bộ nhớ dùng chung IPC</text:h>
      <text:list text:style-name="L4">
        <text:list-item>
          <text:p text:style-name="P20"><text:span text:style-name="T1">Đồng bộ hóa phức tạp (Complex Synchronization):</text:span> Bộ nhớ dùng chung yêu cầu đồng bộ hóa rõ ràng để ngăn chặn tình trạng tranh đua, điều này có thể làm cho mã nguồn trở nên phức tạp hơn và dễ phát sinh lổi, không giống như Pipe có read(<text:span text:style-name="T8">) sẽ block tự đồng bộ </text:span><text:span text:style-name="T9">(đợi khi nào có dữ liệu đến với đọc).</text:span></text:p>
        </text:list-item>
        <text:list-item>
          <text:p text:style-name="P20"><text:span text:style-name="T1">Rủi ro bảo mật (Security Risks):</text:span> Vì bộ nhớ dùng chung có thể được truy cập bởi nhiều tiến trình, nó có thể gây ra rủi ro bảo mật nếu không được quản lý đúng cách, do các tiến trình trái phép có thể truy cập hoặc sửa đổi dữ liệu.</text:p>
        </text:list-item>
        <text:list-item>
          <text:p text:style-name="P20"><text:soft-page-break/><text:span text:style-name="T1">Dọn dẹp thủ công (Manual Cleanup):</text:span> Các phân đoạn bộ nhớ dùng chung phải được hủy gắn và xóa thủ công, điều này có thể dẫn đến rò rỉ tài nguyên nếu không được thực hiện chính xác.</text:p>
        </text:list-item>
        <text:list-item>
          <text:p text:style-name="P20"><text:span text:style-name="T1">Khả năng tương thích (Portability):</text:span> Bộ nhớ dùng chung IPC phụ thuộc vào nền tảng và có thể không dễ dàng chuyển đổi qua lại giữa các hệ điều hành khác nhau.</text:p>
        </text:list-item>
      </text:list>
      <text:h text:style-name="P13" text:outline-level="3">Các lời gọi hệ thống được sử dụng</text:h>
      <text:p text:style-name="P15">Các lời gọi hệ thống được sử dụng trong chương trình là:</text:p>
      <table:table table:name="Table1" table:style-name="Table1">
        <table:table-column table:style-name="Table1.A"/>
        <table:table-column table:style-name="Table1.B"/>
        <table:table-column table:style-name="Table1.C"/>
        <table:table-row>
          <table:table-cell table:style-name="Table1.A1" office:value-type="string">
            <text:p text:style-name="P8">Hàm</text:p>
          </table:table-cell>
          <table:table-cell table:style-name="Table1.A1" office:value-type="string">
            <text:p text:style-name="P9">Chữ ký</text:p>
          </table:table-cell>
          <table:table-cell table:style-name="Table1.C1" office:value-type="string">
            <text:p text:style-name="P9">Mô tả</text:p>
          </table:table-cell>
        </table:table-row>
        <table:table-row>
          <table:table-cell table:style-name="Table1.A2" office:value-type="string">
            <text:p text:style-name="P12">ftok(<text:span text:style-name="T2">)</text:span></text:p>
          </table:table-cell>
          <table:table-cell table:style-name="Table1.A2" office:value-type="string">
            <text:p text:style-name="P12">key_t ftok()</text:p>
          </table:table-cell>
          <table:table-cell table:style-name="Table1.C2" office:value-type="string">
            <text:p text:style-name="P9">Được sử dụng để tạo ra một khóa (key) duy nhất.</text:p>
          </table:table-cell>
        </table:table-row>
        <table:table-row>
          <table:table-cell table:style-name="Table1.A2" office:value-type="string">
            <text:p text:style-name="P12">shmget()</text:p>
          </table:table-cell>
          <table:table-cell table:style-name="Table1.A2" office:value-type="string">
            <text:p text:style-name="P6"><text:span text:style-name="Source_20_Text"><text:span text:style-name="T5">int shmget(key_t key, size_t size, int shmflg);</text:span></text:span></text:p>
          </table:table-cell>
          <table:table-cell table:style-name="Table1.C3" office:value-type="string">
            <text:p text:style-name="P4"><text:span text:style-name="T5">Khi hoàn tất thành công, </text:span><text:span text:style-name="Source_20_Text"><text:span text:style-name="T5">shmget()</text:span></text:span><text:span text:style-name="T5"> trả về một định danh (identifier) cho phân đoạn bộ nhớ dùng chung.</text:span></text:p>
          </table:table-cell>
        </table:table-row>
        <table:table-row>
          <table:table-cell table:style-name="Table1.A2" office:value-type="string">
            <text:p text:style-name="P12">shmat()</text:p>
          </table:table-cell>
          <table:table-cell table:style-name="Table1.A2" office:value-type="string">
            <text:p text:style-name="P6"><text:span text:style-name="Source_20_Text"><text:span text:style-name="T5">void *shmat(int shmid, void *shmaddr, int shmflg);</text:span></text:span></text:p>
          </table:table-cell>
          <table:table-cell table:style-name="Table1.C2" office:value-type="string">
            <text:p text:style-name="P4"><text:span text:style-name="T5">Trước khi có thể sử dụng một phân đoạn bộ nhớ dùng chung, bạn phải gắn (attach) tiến trình vào đó bằng </text:span><text:span text:style-name="Source_20_Text"><text:span text:style-name="T5">shmat()</text:span></text:span><text:span text:style-name="T5">. Tại đây, </text:span><text:span text:style-name="Source_20_Text"><text:span text:style-name="T5">shmid</text:span></text:span><text:span text:style-name="T5"> là ID của bộ nhớ dùng chung và </text:span><text:span text:style-name="Source_20_Text"><text:span text:style-name="T5">shmaddr</text:span></text:span><text:span text:style-name="T5"> xác định địa chỉ cụ thể để sử dụng; tuy nhiên chúng ta nên thiết lập nó bằng 0 để hệ điều hành tự động chọn địa chỉ.</text:span></text:p>
          </table:table-cell>
        </table:table-row>
        <table:table-row>
          <table:table-cell table:style-name="Table1.A2" office:value-type="string">
            <text:p text:style-name="P12">shmdt()</text:p>
          </table:table-cell>
          <table:table-cell table:style-name="Table1.A2" office:value-type="string">
            <text:p text:style-name="P6"><text:span text:style-name="Source_20_Text"><text:span text:style-name="T5">int shmdt(void *shmaddr);</text:span></text:span></text:p>
          </table:table-cell>
          <table:table-cell table:style-name="Table1.C2" office:value-type="string">
            <text:p text:style-name="P4"><text:span text:style-name="T5">Khi bạn đã hoàn tất với phân đoạn bộ nhớ dùng chung, chương trình của bạn nên tự hủy gắn (detach) khỏi nó bằng cách sử dụng </text:span><text:span text:style-name="Source_20_Text"><text:span text:style-name="T5">shmdt()</text:span></text:span><text:span text:style-name="T5">.</text:span></text:p>
          </table:table-cell>
        </table:table-row>
        <table:table-row table:style-name="Table1.6">
          <table:table-cell table:style-name="Table1.A2" office:value-type="string">
            <text:p text:style-name="P12">shmctl()</text:p>
          </table:table-cell>
          <table:table-cell table:style-name="Table1.A2" office:value-type="string">
            <text:p text:style-name="P12">shmctl(int shmid, IPC_RMID, NULL);</text:p>
          </table:table-cell>
          <table:table-cell table:style-name="Table1.C2" office:value-type="string">
            <text:p text:style-name="P4"><text:span text:style-name="T5">Khi bạn hủy gắn khỏi bộ nhớ dùng chung, phân đoạn đó không bị phá hủy. Vì vậy, để xóa bỏ hoàn toàn phân đoạn bộ nhớ, </text:span><text:span text:style-name="Source_20_Text"><text:span text:style-name="T5">shmctl()</text:span></text:span><text:span text:style-name="T5"> được sử dụng.</text:span></text:p>
          </table:table-cell>
        </table:table-row>
      </table:table>
      <text:p text:style-name="P25">ftok() <text:s text:c="5"/>→ tạo key</text:p>
      <text:p text:style-name="P25"><text:s text:c="3"/>↓</text:p>
      <text:p text:style-name="P25">shmget() <text:s text:c="3"/>→ tạo / lấy segment</text:p>
      <text:p text:style-name="P25"><text:s text:c="3"/>↓</text:p>
      <text:p text:style-name="P25">shmat() <text:s text:c="4"/>→ attach vào process</text:p>
      <text:p text:style-name="P25"><text:s text:c="3"/>↓</text:p>
      <text:p text:style-name="P25">[ đọc / ghi dữ liệu ]</text:p>
      <text:p text:style-name="P25"><text:s text:c="3"/>↓</text:p>
      <text:p text:style-name="P25">shmdt() <text:s text:c="4"/>→ detach</text:p>
      <text:p text:style-name="P25"><text:s text:c="3"/>↓</text:p>
      <text:p text:style-name="P25"><text:soft-page-break/>shmctl() <text:s text:c="3"/>→ xóa (nếu cần)</text:p>
      <text:p text:style-name="P22">Bài toán Ví dụ - Tiến trình Sản xuất &amp; Tiêu thụ (Producer &amp; Consumer)</text:p>
      <text:p text:style-name="P23">Có hai tiến trình: Tiến trình Sản xuất (Producer) và Tiến trình Tiêu thụ (Consumer). Tiến trình sản xuất tạo ra các mặt hàng (items) và Tiến trình tiêu thụ sẽ tiêu thụ các mặt hàng đó. Hai tiến trình này chia sẻ một không gian chung hoặc một vị trí bộ nhớ được gọi là vùng đệm (buffer), nơi các mặt hàng do Tiến trình sản xuất tạo ra được lưu trữ và là nơi Tiến trình tiêu thụ lấy mặt hàng ra để sử dụng khi cần.</text:p>
      <text:p text:style-name="P23">Có hai phiên bản của bài toán này: phiên bản đầu tiên được gọi là bài toán vùng đệm không giới hạn (unbounded buffer), trong đó Tiến trình sản xuất có thể liên tục tạo ra các mặt hàng và không có giới hạn về kích thước của vùng đệm; phiên bản thứ hai được gọi là bài toán vùng đệm giới hạn (bounded buffer), trong đó Tiến trình sản xuất chỉ có thể tạo ra một số lượng mặt hàng nhất định trước khi phải dừng lại để chờ Tiến trình tiêu thụ tiêu thụ chúng.</text:p>
      <text:p text:style-name="P15">Chúng ta sẽ thảo luận về bài toán vùng đệm giới hạn. Đầu tiên, Tiến trình sản xuất và Tiến trình tiêu thụ sẽ chia sẻ một vùng bộ nhớ dùng chung, sau đó tiến trình sản xuất sẽ bắt đầu tạo ra các mặt hàng. Nếu tổng số mặt hàng đã sản xuất bằng với kích thước của vùng đệm, tiến trình sản xuất sẽ đợi cho đến khi mặt hàng được tiêu thụ bởi Tiến trình tiêu thụ. Tương tự, tiến trình tiêu thụ trước tiên sẽ kiểm tra tính sẵn có của mặt hàng. Nếu không có mặt hàng nào, Tiến trình tiêu thụ sẽ đợi Tiến trình sản xuất tạo ra chúng. Nếu có sẵn mặt hàng, Tiến trình tiêu thụ sẽ tiêu thụ chúng. Mã giả minh họa được cung cấp bên dưới:</text:p>
      <text:p text:style-name="P22">Dữ liệu dùng chung giữa hai tiến trình (Shared Data Between the two Processes)</text:p>
      <table:table table:name="Table3" table:style-name="Table3">
        <table:table-column table:style-name="Table3.A"/>
        <table:table-row>
          <table:table-cell table:style-name="Table3.A1" office:value-type="string">
            <text:p text:style-name="P10">#define buff_max 25</text:p>
            <text:p text:style-name="P10">#define mod %</text:p>
            <text:p text:style-name="P10"/>
            <text:p text:style-name="P10"><text:s text:c="4"/>struct item{</text:p>
            <text:p text:style-name="P10"/>
            <text:p text:style-name="P10"><text:s text:c="8"/>// các thành phần khác nhau của dữ liệu được sản xuất </text:p>
            <text:p text:style-name="P10"><text:s text:c="8"/>// hoặc dữ liệu được tiêu thụ <text:s text:c="3"/></text:p>
            <text:p text:style-name="P10"><text:s text:c="8"/>---------</text:p>
            <text:p text:style-name="P10"><text:s text:c="4"/>}</text:p>
            <text:p text:style-name="P10"><text:s text:c="4"/></text:p>
            <text:p text:style-name="P10"><text:s text:c="4"/>// Cần một mảng để chứa các mặt hàng. </text:p>
            <text:p text:style-name="P10"><text:s text:c="4"/>// Đây là không gian dùng chung sẽ được <text:s/></text:p>
            <text:p text:style-name="P10"><text:s text:c="4"/>// truy cập bởi cả hai tiến trình <text:s text:c="2"/></text:p>
            <text:p text:style-name="P10"><text:s text:c="4"/>// item shared_buff [ buff_max ];</text:p>
            <text:p text:style-name="P10"><text:s text:c="5"/></text:p>
            <text:p text:style-name="P10"><text:s text:c="4"/>// Hai biến dùng để theo dõi </text:p>
            <text:p text:style-name="P10"><text:s text:c="4"/>// các chỉ mục của các mặt hàng được tạo ra bởi tiến trình sản xuất </text:p>
            <text:p text:style-name="P10"><text:s text:c="4"/>// và tiến trình tiêu thụ. free_index trỏ đến </text:p>
            <text:p text:style-name="P10"><text:s text:c="4"/>// chỉ mục trống tiếp theo. full_index trỏ đến </text:p>
            <text:p text:style-name="P10"><text:s text:c="4"/>// chỉ mục đầy đầu tiên. </text:p>
            <text:p text:style-name="P10"><text:s text:c="4"/>int free_index = 0;</text:p>
            <text:p text:style-name="P10"><text:s text:c="4"/>int full_index = 0;</text:p>
          </table:table-cell>
        </table:table-row>
      </table:table>
      <text:h text:style-name="P1" text:outline-level="2"><text:soft-page-break/><text:span text:style-name="Strong_20_Emphasis"><text:span text:style-name="T4">Producer Process Code</text:span></text:span></text:h>
      <table:table table:name="Table2" table:style-name="Table2">
        <table:table-column table:style-name="Table2.A"/>
        <table:table-row>
          <table:table-cell table:style-name="Table2.A1" office:value-type="string">
            <text:p text:style-name="P11">// Tiến trình sản xuất (Producer)</text:p>
            <text:p text:style-name="P11">item nextProduced;</text:p>
            <text:p text:style-name="P11"><text:s text:c="4"/></text:p>
            <text:p text:style-name="P11"><text:s text:c="4"/>while(1){</text:p>
            <text:p text:style-name="P11"><text:s text:c="8"/></text:p>
            <text:p text:style-name="P11"><text:s text:c="8"/>// kiểm tra nếu không còn chỗ trống </text:p>
            <text:p text:style-name="P11"><text:s text:c="8"/>// để sản xuất.</text:p>
            <text:p text:style-name="P11"><text:s text:c="8"/>// nếu vậy thì tiếp tục chờ.</text:p>
            <text:p text:style-name="P11"><text:s text:c="8"/>while((free_index+1) mod buff_max == full_index);</text:p>
            <text:p text:style-name="P11"><text:s text:c="8"/></text:p>
            <text:p text:style-name="P11"><text:s text:c="8"/>shared_buff[free_index] = nextProduced;</text:p>
            <text:p text:style-name="P11"><text:s text:c="8"/>free_index = (free_index + 1) mod buff_max;</text:p>
            <text:p text:style-name="P11"><text:s text:c="4"/>}</text:p>
          </table:table-cell>
        </table:table-row>
      </table:table>
      <text:h text:style-name="P2" text:outline-level="2"><text:span text:style-name="Strong_20_Emphasis"><text:span text:style-name="T7">Consumer Process Code</text:span></text:span></text:h>
      <table:table table:name="Table4" table:style-name="Table4">
        <table:table-column table:style-name="Table4.A"/>
        <table:table-row>
          <table:table-cell table:style-name="Table4.A1" office:value-type="string">
            <text:p text:style-name="P11">// Tiến trình tiêu thụ (Consumer)</text:p>
            <text:p text:style-name="P11">item nextConsumed;</text:p>
            <text:p text:style-name="P11"><text:s text:c="4"/></text:p>
            <text:p text:style-name="P11"><text:s text:c="4"/>while(1){</text:p>
            <text:p text:style-name="P11"><text:s text:c="8"/></text:p>
            <text:p text:style-name="P11"><text:s text:c="8"/>// kiểm tra xem có mặt hàng nào sẵn có </text:p>
            <text:p text:style-name="P11"><text:s text:c="8"/>// để tiêu thụ hay không. </text:p>
            <text:p text:style-name="P11"><text:s text:c="8"/>// nếu không, tiếp tục chờ cho đến khi </text:p>
            <text:p text:style-name="P11"><text:s text:c="8"/>// chúng được sản xuất.</text:p>
            <text:p text:style-name="P11"><text:s text:c="8"/>while(free_index == full_index);</text:p>
            <text:p text:style-name="P11"><text:s text:c="8"/></text:p>
            <text:p text:style-name="P11"><text:s text:c="8"/>nextConsumed = shared_buff[full_index];</text:p>
            <text:p text:style-name="P11"><text:s text:c="8"/>full_index = (full_index + 1) mod buff_max;</text:p>
            <text:p text:style-name="P11"><text:s text:c="4"/>}</text:p>
          </table:table-cell>
        </table:table-row>
      </table:table>
      <text:p text:style-name="P7"/>
      <text:p text:style-name="P3"><text:span text:style-name="T3">Trong đoạn mã trên, Tiến trình sản xuất (Producer) sẽ bắt đầu sản xuất lại khi </text:span><text:span text:style-name="Source_20_Text"><text:span text:style-name="T3">(free_index+1) mod buff_max</text:span></text:span><text:span text:style-name="T3"> trống, bởi vì nếu nó không trống, điều này ngụ ý rằng vẫn còn các mặt hàng mà Tiến trình tiêu thụ (Consumer) có thể tiêu thụ, do đó không cần sản xuất thêm. Tương tự, nếu </text:span><text:span text:style-name="Source_20_Text"><text:span text:style-name="T3">free_index</text:span></text:span><text:span text:style-name="T3"> và </text:span><text:span text:style-name="Source_20_Text"><text:span text:style-name="T3">full_index</text:span></text:span><text:span text:style-name="T3"> trỏ đến cùng một chỉ mục, điều này ngụ ý rằng không còn mặt hàng nào để tiêu thụ.</text:span></text:p>
      <text:p text:style-name="P24">Triển khai C++ tổng quát:</text:p>
      <table:table table:name="Table5" table:style-name="Table5">
        <table:table-column table:style-name="Table5.A"/>
        <table:table-row>
          <table:table-cell table:style-name="Table5.A1" office:value-type="string">
            <text:p text:style-name="P9">#include &lt;iostream&gt;</text:p>
            <text:p text:style-name="P9">#include &lt;mutex&gt;</text:p>
            <text:p text:style-name="P9">#include &lt;thread&gt;</text:p>
            <text:p text:style-name="P9">#include &lt;vector&gt;</text:p>
            <text:p text:style-name="P9">#include &lt;atomic&gt;</text:p>
            <text:p text:style-name="P9"/>
            <text:p text:style-name="P9">#define buff_max 25</text:p>
            <text:p text:style-name="P9">#define mod %</text:p>
            <text:p text:style-name="P9"/>
            <text:p text:style-name="P9"><text:soft-page-break/>struct item {</text:p>
            <text:p text:style-name="P9"><text:s text:c="2"/>// các thành phần khác nhau của dữ liệu được sản xuất </text:p>
            <text:p text:style-name="P9"><text:s text:c="2"/>// hoặc dữ liệu được tiêu thụ <text:s text:c="3"/></text:p>
            <text:p text:style-name="P9"><text:s text:c="2"/>// ---------</text:p>
            <text:p text:style-name="P9">};</text:p>
            <text:p text:style-name="P9"/>
            <text:p text:style-name="P9">// Cần một mảng để chứa các mặt hàng. </text:p>
            <text:p text:style-name="P9">// Đây là không gian dùng chung sẽ được <text:s/></text:p>
            <text:p text:style-name="P9">// truy cập bởi cả hai tiến trình <text:s text:c="2"/></text:p>
            <text:p text:style-name="P9">// item shared_buff[buff_max];</text:p>
            <text:p text:style-name="P9"/>
            <text:p text:style-name="P9">// Hai biến dùng để theo dõi </text:p>
            <text:p text:style-name="P9">// các chỉ mục của các mặt hàng được tạo ra bởi tiến trình sản xuất </text:p>
            <text:p text:style-name="P9">// và tiến trình tiêu thụ. free_index trỏ đến </text:p>
            <text:p text:style-name="P9">// chỉ mục trống tiếp theo. full_index trỏ đến </text:p>
            <text:p text:style-name="P9">// chỉ mục đầy đầu tiên. </text:p>
            <text:p text:style-name="P9">std::atomic&lt;int&gt; free_index(0);</text:p>
            <text:p text:style-name="P9">std::atomic&lt;int&gt; full_index(0);</text:p>
            <text:p text:style-name="P9">std::mutex mtx;</text:p>
            <text:p text:style-name="P9"/>
            <text:p text:style-name="P9">void producer() {</text:p>
            <text:p text:style-name="P9"><text:s text:c="2"/>item new_item;</text:p>
            <text:p text:style-name="P9"><text:s text:c="2"/>while (true) {</text:p>
            <text:p text:style-name="P9"><text:s text:c="4"/>// Sản xuất mặt hàng</text:p>
            <text:p text:style-name="P9"><text:s text:c="4"/>// ...</text:p>
            <text:p text:style-name="P9"><text:s text:c="4"/>std::this_thread::sleep_for(std::chrono::milliseconds(100));</text:p>
            <text:p text:style-name="P9"/>
            <text:p text:style-name="P9"><text:s text:c="4"/>// Thêm mặt hàng vào vùng đệm</text:p>
            <text:p text:style-name="P9"><text:s text:c="4"/>while (((free_index + 1) mod buff_max) == full_index) {</text:p>
            <text:p text:style-name="P9"><text:s text:c="6"/>// Vùng đệm đầy, chờ tiến trình tiêu thụ</text:p>
            <text:p text:style-name="P9"><text:s text:c="6"/>std::this_thread::sleep_for(std::chrono::milliseconds(100));</text:p>
            <text:p text:style-name="P9"><text:s text:c="4"/>}</text:p>
            <text:p text:style-name="P9"/>
            <text:p text:style-name="P9"><text:s text:c="4"/>mtx.lock();</text:p>
            <text:p text:style-name="P9"><text:s text:c="4"/>// Thêm mặt hàng vào vùng đệm</text:p>
            <text:p text:style-name="P9"><text:s text:c="4"/>// shared_buff[free_index] = new_item;</text:p>
            <text:p text:style-name="P9"><text:s text:c="4"/>free_index = (free_index + 1) mod buff_max;</text:p>
            <text:p text:style-name="P9"><text:s text:c="4"/>mtx.unlock();</text:p>
            <text:p text:style-name="P9"><text:s text:c="2"/>}</text:p>
            <text:p text:style-name="P9">}</text:p>
            <text:p text:style-name="P9"/>
            <text:p text:style-name="P9">void consumer() {</text:p>
            <text:p text:style-name="P9"><text:s text:c="2"/>item consumed_item;</text:p>
            <text:p text:style-name="P9"><text:s text:c="2"/>while (true) {</text:p>
            <text:p text:style-name="P9"><text:s text:c="4"/>while (free_index == full_index) {</text:p>
            <text:p text:style-name="P9"><text:s text:c="6"/>// Vùng đệm trống, chờ tiến trình sản xuất</text:p>
            <text:p text:style-name="P9"><text:s text:c="6"/>std::this_thread::sleep_for(std::chrono::milliseconds(100));</text:p>
            <text:p text:style-name="P9"><text:s text:c="4"/>}</text:p>
            <text:p text:style-name="P9"><text:soft-page-break/></text:p>
            <text:p text:style-name="P9"><text:s text:c="4"/>mtx.lock();</text:p>
            <text:p text:style-name="P9"><text:s text:c="4"/>// Tiêu thụ mặt hàng từ vùng đệm</text:p>
            <text:p text:style-name="P9"><text:s text:c="4"/>// consumed_item = shared_buff[full_index];</text:p>
            <text:p text:style-name="P9"><text:s text:c="4"/>full_index = (full_index + 1) mod buff_max;</text:p>
            <text:p text:style-name="P9"><text:s text:c="4"/>mtx.unlock();</text:p>
            <text:p text:style-name="P9"/>
            <text:p text:style-name="P9"><text:s text:c="4"/>// Tiêu thụ mặt hàng</text:p>
            <text:p text:style-name="P9"><text:s text:c="4"/>// ...</text:p>
            <text:p text:style-name="P9"><text:s text:c="4"/>std::this_thread::sleep_for(std::chrono::milliseconds(100));</text:p>
            <text:p text:style-name="P9"><text:s text:c="2"/>}</text:p>
            <text:p text:style-name="P9">}</text:p>
            <text:p text:style-name="P9"/>
            <text:p text:style-name="P9">int main() {</text:p>
            <text:p text:style-name="P9"><text:s text:c="2"/>// Tạo các luồng sản xuất và tiêu thụ</text:p>
            <text:p text:style-name="P9"><text:s text:c="2"/>std::vector&lt;std::thread&gt; threads;</text:p>
            <text:p text:style-name="P9"><text:s text:c="2"/>threads.emplace_back(producer);</text:p>
            <text:p text:style-name="P9"><text:s text:c="2"/>threads.emplace_back(consumer);</text:p>
            <text:p text:style-name="P9"/>
            <text:p text:style-name="P9"><text:s text:c="2"/>// Chờ các luồng hoàn thành</text:p>
            <text:p text:style-name="P9"><text:s text:c="2"/>for (auto&amp; thread : threads) {</text:p>
            <text:p text:style-name="P9"><text:s text:c="4"/>thread.join();</text:p>
            <text:p text:style-name="P9"><text:s text:c="2"/>}</text:p>
            <text:p text:style-name="P9"/>
            <text:p text:style-name="P9"><text:s text:c="2"/>return 0;</text:p>
            <text:p text:style-name="P9">}</text:p>
          </table:table-cell>
        </table:table-row>
      </table:table>
      <text:p text:style-name="P5"><text:span text:style-name="T6">Lưu ý rằng lớp </text:span><text:span text:style-name="Source_20_Text"><text:span text:style-name="T6">atomic</text:span></text:span><text:span text:style-name="T6"> được sử dụng để đảm bảo các biến dùng chung </text:span><text:span text:style-name="Source_20_Text"><text:span text:style-name="T6">free_index</text:span></text:span><text:span text:style-name="T6"> và </text:span><text:span text:style-name="Source_20_Text"><text:span text:style-name="T6">full_index</text:span></text:span><text:span text:style-name="T6"> được cập nhật một cách nguyên tử (atomically). </text:span><text:span text:style-name="Source_20_Text"><text:span text:style-name="T6">mutex</text:span></text:span><text:span text:style-name="T6"> được sử dụng để bảo vệ miền găng (critical section) nơi vùng đệm dùng chung được truy cập. Hàm </text:span><text:span text:style-name="Source_20_Text"><text:span text:style-name="T6">sleep_for</text:span></text:span><text:span text:style-name="T6"> được sử dụng để mô phỏng quá trình sản xuất và tiêu thụ các mặt hàng.</text:span></text:p>
      <text:p text:style-name="P26">Kết luận</text:p>
      <text:p text:style-name="P15">Bộ nhớ dùng chung IPC là một công cụ mạnh mẽ cho việc truyền thông giữa các tiến trình, mang lại tốc độ cao và chi phí hệ thống thấp cho việc trao đổi dữ liệu. Tuy nhiên, nó cũng đi kèm với những thách thức liên quan đến việc đồng bộ hóa, bảo mật và quản lý tài nguyên. Việc hiểu rõ các khía cạnh này là rất quan trọng để triển khai hiệu quả bộ nhớ dùng chung IPC trong môi trường đa nhiệ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9T22:12:14.526206489</meta:creation-date>
    <dc:date>2026-04-20T02:05:02.825819675</dc:date>
    <meta:editing-duration>PT1H38M51S</meta:editing-duration>
    <meta:editing-cycles>32</meta:editing-cycles>
    <meta:generator>LibreOffice/24.2.7.2$Linux_X86_64 LibreOffice_project/420$Build-2</meta:generator>
    <meta:document-statistic meta:table-count="5" meta:image-count="0" meta:object-count="0" meta:page-count="7" meta:paragraph-count="193" meta:word-count="2563" meta:character-count="12999" meta:non-whitespace-character-count="10175"/>
  </office:meta>
</office:document-meta>
</file>